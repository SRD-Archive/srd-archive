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4.8104in" fo:margin-left="0in" table:align="left" style:writing-mode="lr-tb"/>
    </style:style>
    <style:style style:name="Table1.A" style:family="table-column">
      <style:table-column-properties style:column-width="1.1993in"/>
    </style:style>
    <style:style style:name="Table1.B" style:family="table-column">
      <style:table-column-properties style:column-width="1.2in"/>
    </style:style>
    <style:style style:name="Table1.D" style:family="table-column">
      <style:table-column-properties style:column-width="1.2111in"/>
    </style:style>
    <style:style style:name="Table1.A1" style:family="table-cell">
      <style:table-cell-properties fo:padding="0.0382in" fo:border-left="3pt solid #000000" fo:border-right="none" fo:border-top="3pt solid #000000" fo:border-bottom="1pt solid #000000"/>
    </style:style>
    <style:style style:name="Table1.C1" style:family="table-cell">
      <style:table-cell-properties fo:padding="0.0382in" fo:border-left="1pt solid #000000" fo:border-right="3pt solid #000000" fo:border-top="3pt solid #000000" fo:border-bottom="1pt solid #000000"/>
    </style:style>
    <style:style style:name="Table1.A2" style:family="table-cell">
      <style:table-cell-properties fo:padding="0.0382in" fo:border-left="3pt solid #000000" fo:border-right="none" fo:border-top="none" fo:border-bottom="1pt solid #000000"/>
    </style:style>
    <style:style style:name="Table1.C2" style:family="table-cell">
      <style:table-cell-properties fo:padding="0.0382in" fo:border-left="1pt solid #000000" fo:border-right="3pt solid #000000" fo:border-top="none" fo:border-bottom="1pt solid #000000"/>
    </style:style>
    <style:style style:name="Table1.A3" style:family="table-cell">
      <style:table-cell-properties fo:padding="0.0382in" fo:border-left="3pt solid #000000" fo:border-right="3pt solid #000000" fo:border-top="none" fo:border-bottom="1pt solid #000000"/>
    </style:style>
    <style:style style:name="Table1.A4" style:family="table-cell">
      <style:table-cell-properties fo:padding="0.0382in" fo:border-left="3pt solid #000000" fo:border-right="none" fo:border-top="none" fo:border-bottom="3pt solid #000000"/>
    </style:style>
    <style:style style:name="Table1.B4" style:family="table-cell">
      <style:table-cell-properties fo:padding="0.0382in" fo:border-left="1pt solid #000000" fo:border-right="none" fo:border-top="none" fo:border-bottom="3pt solid #000000"/>
    </style:style>
    <style:style style:name="Table1.D4" style:family="table-cell">
      <style:table-cell-properties fo:padding="0.0382in" fo:border-left="1pt solid #000000" fo:border-right="3pt solid #000000" fo:border-top="none" fo:border-bottom="3pt solid #000000"/>
    </style:style>
    <style:style style:name="Table2" style:family="table">
      <style:table-properties style:width="4.8125in" fo:margin-left="0in" table:align="left" style:writing-mode="lr-tb"/>
    </style:style>
    <style:style style:name="Table2.A" style:family="table-column">
      <style:table-column-properties style:column-width="1.6in"/>
    </style:style>
    <style:style style:name="Table2.C" style:family="table-column">
      <style:table-column-properties style:column-width="1.6125in"/>
    </style:style>
    <style:style style:name="Table2.A1" style:family="table-cell">
      <style:table-cell-properties fo:padding="0.0382in" fo:border-left="3pt solid #000000" fo:border-right="none" fo:border-top="3pt solid #000000" fo:border-bottom="1pt solid #000000"/>
    </style:style>
    <style:style style:name="Table2.C1" style:family="table-cell">
      <style:table-cell-properties fo:padding="0.0382in" fo:border-left="3pt solid #000000" fo:border-right="3pt solid #000000" fo:border-top="3pt solid #000000" fo:border-bottom="1pt solid #000000"/>
    </style:style>
    <style:style style:name="Table2.A2" style:family="table-cell">
      <style:table-cell-properties fo:padding="0.0382in" fo:border-left="3pt solid #000000" fo:border-right="none" fo:border-top="none" fo:border-bottom="1pt solid #000000"/>
    </style:style>
    <style:style style:name="Table2.C2" style:family="table-cell">
      <style:table-cell-properties fo:padding="0.0382in" fo:border-left="3pt solid #000000" fo:border-right="3pt solid #000000" fo:border-top="none" fo:border-bottom="1pt solid #000000"/>
    </style:style>
    <style:style style:name="Table2.3" style:family="table-row">
      <style:table-row-properties style:row-height="0.1in"/>
    </style:style>
    <style:style style:name="Table2.A3" style:family="table-cell">
      <style:table-cell-properties fo:padding="0.0382in" fo:border-left="0.05pt solid #000000" fo:border-right="none" fo:border-top="1.5pt solid #000000" fo:border-bottom="1.5pt solid #000000"/>
    </style:style>
    <style:style style:name="Table2.B3" style:family="table-cell">
      <style:table-cell-properties fo:padding="0.0382in" fo:border-left="none" fo:border-right="none" fo:border-top="1.5pt solid #000000" fo:border-bottom="1.5pt solid #000000"/>
    </style:style>
    <style:style style:name="Table2.C3" style:family="table-cell">
      <style:table-cell-properties fo:padding="0.0382in" fo:border-left="none" fo:border-right="0.05pt solid #000000" fo:border-top="1.5pt solid #000000" fo:border-bottom="1.5pt solid #000000"/>
    </style:style>
    <style:style style:name="Table2.5" style:family="table-row">
      <style:table-row-properties style:min-row-height="0.2993in"/>
    </style:style>
    <style:style style:name="Table2.A18" style:family="table-cell">
      <style:table-cell-properties fo:padding="0.0382in" fo:border-left="3pt solid #000000" fo:border-right="none" fo:border-top="none" fo:border-bottom="3pt solid #000000"/>
    </style:style>
    <style:style style:name="Table2.C18" style:family="table-cell">
      <style:table-cell-properties fo:padding="0.0382in" fo:border-left="3pt solid #000000" fo:border-right="3pt solid #000000" fo:border-top="none" fo:border-bottom="3pt solid #000000"/>
    </style:style>
    <style:style style:name="P1" style:family="paragraph" style:parent-style-name="Footer">
      <style:paragraph-properties fo:text-align="center" style:justify-single-word="false" fo:break-before="page"/>
    </style:style>
    <style:style style:name="P2" style:family="paragraph" style:parent-style-name="Table_20_Contents">
      <style:paragraph-properties fo:line-height="100%"/>
      <style:text-properties fo:font-size="9pt" officeooo:rsid="0078408c" officeooo:paragraph-rsid="001eb046" style:font-size-asian="9pt" style:font-size-complex="9pt"/>
    </style:style>
    <style:style style:name="P3" style:family="paragraph" style:parent-style-name="Table_20_Contents">
      <style:paragraph-properties fo:margin-left="0in" fo:margin-right="0.0299in" fo:line-height="100%" fo:text-indent="0in" style:auto-text-indent="false"/>
      <style:text-properties fo:font-size="9pt" officeooo:rsid="0024c93e" officeooo:paragraph-rsid="001eb046" style:font-size-asian="9pt" style:font-size-complex="9pt"/>
    </style:style>
    <style:style style:name="P4" style:family="paragraph" style:parent-style-name="Table_20_Contents">
      <style:paragraph-properties fo:line-height="100%"/>
      <style:text-properties fo:font-size="9pt" officeooo:rsid="00257952" officeooo:paragraph-rsid="001eb046" style:font-size-asian="9pt" style:font-size-complex="9pt"/>
    </style:style>
    <style:style style:name="P5" style:family="paragraph" style:parent-style-name="Table_20_Contents">
      <style:paragraph-properties fo:margin-left="0in" fo:margin-right="0.0299in" fo:line-height="100%" fo:text-indent="0in" style:auto-text-indent="false"/>
      <style:text-properties fo:font-size="9pt" officeooo:rsid="00267e1b" officeooo:paragraph-rsid="001eb046" style:font-size-asian="9pt" style:font-size-complex="9pt"/>
    </style:style>
    <style:style style:name="P6" style:family="paragraph" style:parent-style-name="Table_20_Contents">
      <style:paragraph-properties fo:line-height="100%"/>
      <style:text-properties fo:font-size="9pt" officeooo:rsid="00267e1b" officeooo:paragraph-rsid="001eb046" style:font-size-asian="9pt" style:font-size-complex="9pt"/>
    </style:style>
    <style:style style:name="P7" style:family="paragraph" style:parent-style-name="Table_20_Contents">
      <style:paragraph-properties fo:line-height="100%"/>
      <style:text-properties fo:font-size="9pt" officeooo:rsid="00281914" officeooo:paragraph-rsid="001eb046" style:font-size-asian="9pt" style:font-size-complex="9pt"/>
    </style:style>
    <style:style style:name="P8" style:family="paragraph" style:parent-style-name="Table_20_Contents">
      <style:paragraph-properties fo:line-height="100%"/>
      <style:text-properties fo:font-size="9pt" officeooo:rsid="001eb046" officeooo:paragraph-rsid="001eb046" style:font-size-asian="9pt" style:font-size-complex="9pt"/>
    </style:style>
    <style:style style:name="P9" style:family="paragraph" style:parent-style-name="Table_20_Contents">
      <style:paragraph-properties fo:line-height="100%"/>
      <style:text-properties fo:font-size="9pt" officeooo:paragraph-rsid="001eb046" style:font-size-asian="9pt" style:font-size-complex="9pt"/>
    </style:style>
    <style:style style:name="P10" style:family="paragraph" style:parent-style-name="Table_20_Contents">
      <style:paragraph-properties fo:margin-left="0in" fo:margin-right="0.0299in" fo:line-height="100%" fo:text-indent="0in" style:auto-text-indent="false"/>
      <style:text-properties fo:font-size="9pt" officeooo:paragraph-rsid="001eb046" style:font-size-asian="9pt" style:font-size-complex="9pt"/>
    </style:style>
    <style:style style:name="P11" style:family="paragraph" style:parent-style-name="Compact">
      <style:paragraph-properties fo:line-height="100%"/>
    </style:style>
    <style:style style:name="P12" style:family="paragraph" style:parent-style-name="Heading_20_1">
      <style:paragraph-properties fo:line-height="100%" fo:break-before="column"/>
    </style:style>
    <style:style style:name="P13" style:family="paragraph" style:parent-style-name="Heading_20_2">
      <style:paragraph-properties fo:line-height="100%" fo:break-before="column"/>
    </style:style>
    <style:style style:name="P14" style:family="paragraph" style:parent-style-name="Text_20_body">
      <style:paragraph-properties fo:line-height="100%" fo:break-before="column"/>
    </style:style>
    <style:style style:name="P15" style:family="paragraph" style:parent-style-name="Heading_20_2">
      <style:paragraph-properties fo:line-height="100%"/>
      <style:text-properties officeooo:paragraph-rsid="001a89ca"/>
    </style:style>
    <style:style style:name="P16" style:family="paragraph" style:parent-style-name="Text_20_body">
      <style:paragraph-properties fo:line-height="100%"/>
      <style:text-properties officeooo:paragraph-rsid="001a89ca"/>
    </style:style>
    <style:style style:name="P17" style:family="paragraph" style:parent-style-name="Compact">
      <style:paragraph-properties fo:line-height="100%"/>
      <style:text-properties officeooo:paragraph-rsid="001eb046"/>
    </style:style>
    <style:style style:name="P18" style:family="paragraph" style:parent-style-name="Standard">
      <style:paragraph-properties fo:line-height="100%"/>
      <style:text-properties officeooo:paragraph-rsid="001eb046"/>
    </style:style>
    <style:style style:name="P19" style:family="paragraph" style:parent-style-name="First_20_Paragraph">
      <style:paragraph-properties fo:line-height="100%"/>
    </style:style>
    <style:style style:name="P20" style:family="paragraph" style:parent-style-name="First_20_Paragraph">
      <style:paragraph-properties fo:line-height="100%"/>
      <style:text-properties officeooo:paragraph-rsid="002620aa"/>
    </style:style>
    <style:style style:name="P21" style:family="paragraph" style:parent-style-name="Heading_20_1">
      <loext:graphic-properties draw:fill-hatch-name="hatch"/>
      <style:paragraph-properties fo:margin-top="0.3299in" fo:margin-bottom="0.1299in" style:contextual-spacing="false" fo:line-height="100%"/>
    </style:style>
    <style:style style:name="P22" style:family="paragraph" style:parent-style-name="Heading_20_1">
      <loext:graphic-properties draw:fill-hatch-name="hatch"/>
      <style:paragraph-properties fo:margin-top="0.3299in" fo:margin-bottom="0.1299in" style:contextual-spacing="false" fo:line-height="100%" fo:break-before="column"/>
    </style:style>
    <style:style style:name="P23" style:family="paragraph" style:parent-style-name="Heading_20_1">
      <loext:graphic-properties draw:fill-hatch-name="hatch"/>
      <style:paragraph-properties fo:margin-top="0in" fo:margin-bottom="0in" style:contextual-spacing="false" fo:line-height="100%"/>
    </style:style>
    <style:style style:name="P24" style:family="paragraph" style:parent-style-name="Text_20_body">
      <loext:graphic-properties draw:fill-hatch-name="hatch"/>
      <style:paragraph-properties fo:margin-top="0in" fo:margin-bottom="0in" style:contextual-spacing="false" fo:line-height="100%"/>
    </style:style>
    <style:style style:name="P25" style:family="paragraph" style:parent-style-name="Heading_20_1">
      <style:paragraph-properties fo:line-height="100%"/>
    </style:style>
    <style:style style:name="P26" style:family="paragraph" style:parent-style-name="Heading_20_2">
      <style:paragraph-properties fo:line-height="100%"/>
    </style:style>
    <style:style style:name="P27" style:family="paragraph" style:parent-style-name="Heading_20_2">
      <style:paragraph-properties fo:line-height="100%"/>
      <style:text-properties officeooo:paragraph-rsid="0014b97b"/>
    </style:style>
    <style:style style:name="P28" style:family="paragraph" style:parent-style-name="Text_20_body">
      <style:paragraph-properties fo:line-height="100%"/>
      <style:text-properties officeooo:paragraph-rsid="0014b97b"/>
    </style:style>
    <style:style style:name="P29" style:family="paragraph" style:parent-style-name="Heading_20_2">
      <style:paragraph-properties fo:line-height="100%"/>
      <style:text-properties officeooo:paragraph-rsid="00116623"/>
    </style:style>
    <style:style style:name="P30" style:family="paragraph" style:parent-style-name="Text_20_body">
      <style:paragraph-properties fo:line-height="100%"/>
      <style:text-properties officeooo:paragraph-rsid="00116623"/>
    </style:style>
    <style:style style:name="P31" style:family="paragraph" style:parent-style-name="Heading_20_2">
      <style:paragraph-properties fo:line-height="100%"/>
      <style:text-properties officeooo:paragraph-rsid="0023b7b7"/>
    </style:style>
    <style:style style:name="P32" style:family="paragraph" style:parent-style-name="Text_20_body">
      <style:paragraph-properties fo:line-height="100%"/>
    </style:style>
    <style:style style:name="P33" style:family="paragraph" style:parent-style-name="Text_20_body">
      <loext:graphic-properties draw:fill-hatch-name="hatch"/>
      <style:paragraph-properties fo:margin-top="0.1299in" fo:margin-bottom="0.05in" style:contextual-spacing="false" fo:line-height="100%"/>
    </style:style>
    <style:style style:name="P34" style:family="paragraph" style:parent-style-name="Text_20_body">
      <style:paragraph-properties fo:line-height="100%"/>
      <style:text-properties officeooo:paragraph-rsid="00125b63"/>
    </style:style>
    <style:style style:name="P35" style:family="paragraph" style:parent-style-name="Text_20_body">
      <style:paragraph-properties fo:line-height="100%"/>
      <style:text-properties officeooo:paragraph-rsid="000fe280"/>
    </style:style>
    <style:style style:name="P36" style:family="paragraph" style:parent-style-name="Text_20_body">
      <style:paragraph-properties fo:line-height="100%"/>
      <style:text-properties officeooo:paragraph-rsid="001bc965"/>
    </style:style>
    <style:style style:name="P37" style:family="paragraph" style:parent-style-name="Text_20_body">
      <style:paragraph-properties fo:line-height="100%"/>
      <style:text-properties officeooo:paragraph-rsid="002f5333"/>
    </style:style>
    <style:style style:name="P38" style:family="paragraph" style:parent-style-name="Text_20_body">
      <loext:graphic-properties draw:fill-gradient-name="gradient" draw:fill-hatch-name="hatch"/>
      <style:paragraph-properties fo:margin-top="0in" fo:margin-bottom="0.05in" style:contextual-spacing="false" fo:line-height="100%"/>
    </style:style>
    <style:style style:name="P39" style:family="paragraph" style:parent-style-name="First_20_Paragraph">
      <style:paragraph-properties fo:line-height="100%"/>
      <style:text-properties fo:font-weight="bold" style:font-weight-asian="bold"/>
    </style:style>
    <style:style style:name="P40" style:family="paragraph" style:parent-style-name="First_20_Paragraph">
      <style:paragraph-properties fo:line-height="100%" fo:break-before="column"/>
      <style:text-properties fo:font-weight="bold" style:font-weight-asian="bold"/>
    </style:style>
    <style:style style:name="P41" style:family="paragraph" style:parent-style-name="Text_20_body">
      <style:paragraph-properties fo:line-height="100%" fo:break-before="column"/>
      <style:text-properties fo:font-weight="bold" style:font-weight-asian="bold"/>
    </style:style>
    <style:style style:name="P42" style:family="paragraph" style:parent-style-name="First_20_Paragraph">
      <style:paragraph-properties fo:line-height="100%"/>
      <style:text-properties fo:font-weight="bold" officeooo:paragraph-rsid="0014b97b" style:font-weight-asian="bold"/>
    </style:style>
    <style:style style:name="P43" style:family="paragraph" style:parent-style-name="First_20_Paragraph">
      <style:paragraph-properties fo:line-height="100%" fo:break-before="column"/>
      <style:text-properties fo:font-weight="bold" officeooo:paragraph-rsid="0014b97b" style:font-weight-asian="bold"/>
    </style:style>
    <style:style style:name="P44" style:family="paragraph" style:parent-style-name="First_20_Paragraph">
      <style:paragraph-properties fo:line-height="100%"/>
      <style:text-properties fo:font-weight="bold" officeooo:paragraph-rsid="00058b03" style:font-weight-asian="bold"/>
    </style:style>
    <style:style style:name="P45" style:family="paragraph" style:parent-style-name="First_20_Paragraph">
      <loext:graphic-properties draw:fill-hatch-name="hatch"/>
      <style:paragraph-properties fo:margin-top="0.1299in" fo:margin-bottom="0.1299in" style:contextual-spacing="false" fo:line-height="100%"/>
      <style:text-properties fo:font-weight="bold" officeooo:paragraph-rsid="00116623" style:font-weight-asian="bold"/>
    </style:style>
    <style:style style:name="P46" style:family="paragraph" style:parent-style-name="First_20_Paragraph">
      <loext:graphic-properties draw:fill-hatch-name="hatch"/>
      <style:paragraph-properties fo:margin-top="0.1299in" fo:margin-bottom="0.1in" style:contextual-spacing="false" fo:line-height="100%"/>
      <style:text-properties fo:font-weight="bold" style:font-weight-asian="bold"/>
    </style:style>
    <style:style style:name="P47" style:family="paragraph" style:parent-style-name="Text_20_body">
      <style:paragraph-properties fo:line-height="100%"/>
      <style:text-properties fo:font-weight="bold" style:font-weight-asian="bold"/>
    </style:style>
    <style:style style:name="P48" style:family="paragraph" style:parent-style-name="Text_20_body">
      <style:paragraph-properties fo:line-height="100%"/>
      <style:text-properties fo:font-weight="bold" officeooo:paragraph-rsid="000fe280" style:font-weight-asian="bold"/>
    </style:style>
    <style:style style:name="P49" style:family="paragraph" style:parent-style-name="Text_20_body">
      <loext:graphic-properties draw:fill-gradient-name="gradient" draw:fill-hatch-name="hatch"/>
      <style:paragraph-properties fo:margin-top="0in" fo:margin-bottom="0.1299in" style:contextual-spacing="false" fo:line-height="100%" fo:break-before="column"/>
      <style:text-properties fo:font-weight="bold" officeooo:paragraph-rsid="000fe280" style:font-weight-asian="bold"/>
    </style:style>
    <style:style style:name="P50" style:family="paragraph" style:parent-style-name="Text_20_body">
      <loext:graphic-properties draw:fill-gradient-name="gradient" draw:fill-hatch-name="hatch"/>
      <style:paragraph-properties fo:margin-top="0in" fo:margin-bottom="0.1299in" style:contextual-spacing="false" fo:line-height="100%" fo:break-before="column"/>
      <style:text-properties fo:font-weight="bold" style:font-weight-asian="bold"/>
    </style:style>
    <style:style style:name="P51" style:family="paragraph" style:parent-style-name="First_20_Paragraph">
      <loext:graphic-properties draw:fill-gradient-name="gradient" draw:fill-hatch-name="hatch"/>
      <style:paragraph-properties fo:margin-top="0in" fo:margin-bottom="0.1299in" style:contextual-spacing="false" fo:line-height="100%" fo:break-before="column"/>
      <style:text-properties fo:font-weight="bold" style:font-weight-asian="bold"/>
    </style:style>
    <style:style style:name="P52" style:family="paragraph" style:parent-style-name="Text_20_body">
      <style:paragraph-properties fo:line-height="100%"/>
      <style:text-properties fo:font-weight="bold" officeooo:paragraph-rsid="00125b63" style:font-weight-asian="bold"/>
    </style:style>
    <style:style style:name="P53" style:family="paragraph" style:parent-style-name="Text_20_body">
      <loext:graphic-properties draw:fill-gradient-name="gradient" draw:fill-hatch-name="hatch"/>
      <style:paragraph-properties fo:margin-top="0in" fo:margin-bottom="0.1299in" style:contextual-spacing="false" fo:line-height="100%"/>
      <style:text-properties fo:font-weight="bold" officeooo:paragraph-rsid="002193c8" style:font-weight-asian="bold"/>
    </style:style>
    <style:style style:name="P54" style:family="paragraph" style:parent-style-name="Text_20_body">
      <loext:graphic-properties draw:fill-gradient-name="gradient" draw:fill-hatch-name="hatch"/>
      <style:paragraph-properties fo:margin-top="0in" fo:margin-bottom="0.1299in" style:contextual-spacing="false" fo:line-height="100%" fo:break-before="column"/>
      <style:text-properties fo:font-weight="bold" officeooo:paragraph-rsid="002193c8" style:font-weight-asian="bold"/>
    </style:style>
    <style:style style:name="P55" style:family="paragraph" style:parent-style-name="Text_20_body">
      <style:paragraph-properties fo:line-height="100%"/>
      <style:text-properties fo:font-weight="bold" officeooo:paragraph-rsid="00236559" style:font-weight-asian="bold"/>
    </style:style>
    <style:style style:name="P56" style:family="paragraph" style:parent-style-name="First_20_Paragraph">
      <loext:graphic-properties draw:fill-gradient-name="gradient" draw:fill-hatch-name="hatch"/>
      <style:paragraph-properties fo:margin-top="0.1299in" fo:margin-bottom="0.05in" style:contextual-spacing="false" fo:line-height="100%"/>
      <style:text-properties fo:font-weight="bold" style:font-weight-asian="bold"/>
    </style:style>
    <style:style style:name="P57" style:family="paragraph" style:parent-style-name="Text_20_body">
      <loext:graphic-properties draw:fill-gradient-name="gradient" draw:fill-hatch-name="hatch"/>
      <style:paragraph-properties fo:margin-top="0.1299in" fo:margin-bottom="0.05in" style:contextual-spacing="false" fo:line-height="100%"/>
      <style:text-properties fo:font-weight="bold" style:font-weight-asian="bold"/>
    </style:style>
    <style:style style:name="P58" style:family="paragraph" style:parent-style-name="Text_20_body">
      <loext:graphic-properties draw:fill-hatch-name="hatch"/>
      <style:paragraph-properties fo:margin-top="0.0598in" fo:margin-bottom="0.1299in" style:contextual-spacing="false" fo:line-height="100%"/>
      <style:text-properties fo:font-weight="bold" style:font-weight-asian="bold" style:font-weight-complex="bold"/>
    </style:style>
    <style:style style:name="P59" style:family="paragraph" style:parent-style-name="Standard">
      <style:paragraph-properties fo:line-height="100%"/>
      <style:text-properties fo:font-weight="bold" style:font-weight-asian="bold" style:font-weight-complex="bold"/>
    </style:style>
    <style:style style:name="P60" style:family="paragraph" style:parent-style-name="Heading_20_1">
      <loext:graphic-properties draw:fill-gradient-name="gradient" draw:fill-hatch-name="hatch"/>
      <style:paragraph-properties fo:margin-top="0in" fo:margin-bottom="0in" style:contextual-spacing="false" fo:line-height="100%"/>
      <style:text-properties fo:font-size="22pt" style:font-size-asian="16pt" style:font-size-complex="16pt"/>
    </style:style>
    <style:style style:name="P61" style:family="paragraph" style:parent-style-name="Heading_20_1">
      <loext:graphic-properties draw:fill-hatch-name="hatch"/>
      <style:paragraph-properties fo:margin-top="0.3299in" fo:margin-bottom="0.1299in" style:contextual-spacing="false" fo:line-height="100%"/>
      <style:text-properties style:text-underline-style="solid" style:text-underline-width="bold" style:text-underline-color="font-color" officeooo:rsid="001d92aa" officeooo:paragraph-rsid="001d92aa"/>
    </style:style>
    <style:style style:name="P62" style:family="paragraph" style:parent-style-name="Text_20_body">
      <style:paragraph-properties fo:line-height="100%"/>
      <style:text-properties fo:font-size="9.5pt" fo:font-weight="bold" style:font-size-asian="9.5pt" style:font-weight-asian="bold" style:font-size-complex="9.5pt" style:font-weight-complex="bold"/>
    </style:style>
    <style:style style:name="P63" style:family="paragraph" style:parent-style-name="Text_20_body">
      <loext:graphic-properties draw:fill-hatch-name="hatch"/>
      <style:paragraph-properties fo:margin-top="0.0598in" fo:margin-bottom="0.1299in" style:contextual-spacing="false" fo:line-height="100%"/>
      <style:text-properties fo:font-style="italic" style:font-style-asian="italic" style:font-style-complex="italic"/>
    </style:style>
    <style:style style:name="P64" style:family="paragraph" style:parent-style-name="Text_20_body">
      <style:paragraph-properties fo:line-height="100%"/>
      <style:text-properties fo:font-style="italic" fo:font-weight="normal" officeooo:rsid="00118fbf" officeooo:paragraph-rsid="00125b63" style:font-style-asian="italic" style:font-weight-asian="normal" style:font-style-complex="italic" style:font-weight-complex="normal"/>
    </style:style>
    <style:style style:name="P65" style:family="paragraph" style:parent-style-name="Text_20_body">
      <loext:graphic-properties draw:fill-gradient-name="gradient" draw:fill-hatch-name="hatch"/>
      <style:paragraph-properties fo:margin-top="0in" fo:margin-bottom="0in" style:contextual-spacing="false" fo:line-height="100%"/>
      <style:text-properties officeooo:rsid="00241a84" officeooo:paragraph-rsid="00241a84"/>
    </style:style>
    <style:style style:name="P66" style:family="paragraph" style:parent-style-name="Text_20_body">
      <loext:graphic-properties draw:fill-gradient-name="gradient" draw:fill-hatch-name="hatch"/>
      <style:paragraph-properties fo:margin-top="0in" fo:margin-bottom="0in" style:contextual-spacing="false" fo:line-height="100%"/>
      <style:text-properties officeooo:rsid="002620aa"/>
    </style:style>
    <style:style style:name="P67" style:family="paragraph" style:parent-style-name="Text_20_body">
      <loext:graphic-properties draw:fill-hatch-name="hatch"/>
      <style:paragraph-properties fo:margin-top="0in" fo:margin-bottom="0in" style:contextual-spacing="false" fo:break-before="column"/>
    </style:style>
    <style:style style:name="P68" style:family="paragraph" style:parent-style-name="Compact" style:list-style-name="WWNum1001">
      <style:paragraph-properties fo:line-height="100%"/>
    </style:style>
    <style:style style:name="P69" style:family="paragraph" style:parent-style-name="Compact" style:list-style-name="WWNum1002">
      <style:paragraph-properties fo:line-height="100%"/>
    </style:style>
    <style:style style:name="P70" style:family="paragraph" style:parent-style-name="Compact" style:list-style-name="WWNum1003">
      <style:paragraph-properties fo:line-height="100%"/>
    </style:style>
    <style:style style:name="P71" style:family="paragraph" style:parent-style-name="Compact" style:list-style-name="WWNum1004">
      <style:paragraph-properties fo:line-height="100%"/>
    </style:style>
    <style:style style:name="P72" style:family="paragraph" style:parent-style-name="Compact" style:list-style-name="WWNum1005">
      <style:paragraph-properties fo:line-height="100%"/>
    </style:style>
    <style:style style:name="P73" style:family="paragraph" style:parent-style-name="Compact" style:list-style-name="WWNum1006">
      <style:paragraph-properties fo:line-height="100%"/>
    </style:style>
    <style:style style:name="P74" style:family="paragraph" style:parent-style-name="Compact" style:list-style-name="WWNum1007">
      <style:paragraph-properties fo:line-height="100%"/>
    </style:style>
    <style:style style:name="P75" style:family="paragraph" style:parent-style-name="Compact" style:list-style-name="WWNum1008">
      <style:paragraph-properties fo:line-height="100%"/>
    </style:style>
    <style:style style:name="P76" style:family="paragraph" style:parent-style-name="Compact" style:list-style-name="WWNum1009">
      <style:paragraph-properties fo:line-height="100%"/>
    </style:style>
    <style:style style:name="P77" style:family="paragraph" style:parent-style-name="Compact" style:list-style-name="WWNum1010">
      <style:paragraph-properties fo:line-height="100%"/>
    </style:style>
    <style:style style:name="P78" style:family="paragraph" style:parent-style-name="Compact" style:list-style-name="WWNum1011">
      <style:paragraph-properties fo:line-height="100%"/>
    </style:style>
    <style:style style:name="P79" style:family="paragraph" style:parent-style-name="Compact" style:list-style-name="WWNum1012">
      <style:paragraph-properties fo:line-height="100%"/>
    </style:style>
    <style:style style:name="P80" style:family="paragraph" style:parent-style-name="Compact" style:list-style-name="WWNum1013">
      <style:paragraph-properties fo:line-height="100%"/>
    </style:style>
    <style:style style:name="P81" style:family="paragraph" style:parent-style-name="Compact" style:list-style-name="WWNum1014">
      <style:paragraph-properties fo:line-height="100%"/>
    </style:style>
    <style:style style:name="P82" style:family="paragraph" style:parent-style-name="Compact" style:list-style-name="WWNum1015">
      <style:paragraph-properties fo:line-height="100%"/>
    </style:style>
    <style:style style:name="P83" style:family="paragraph" style:parent-style-name="Compact" style:list-style-name="WWNum1016">
      <style:paragraph-properties fo:line-height="100%"/>
    </style:style>
    <style:style style:name="P84" style:family="paragraph" style:parent-style-name="Compact" style:list-style-name="WWNum1016">
      <style:paragraph-properties fo:line-height="100%" fo:break-before="column"/>
    </style:style>
    <style:style style:name="P85" style:family="paragraph" style:parent-style-name="Compact" style:list-style-name="WWNum1017">
      <style:paragraph-properties fo:line-height="100%"/>
    </style:style>
    <style:style style:name="P86" style:family="paragraph" style:parent-style-name="Compact" style:list-style-name="WWNum1018">
      <style:paragraph-properties fo:line-height="100%"/>
    </style:style>
    <style:style style:name="P87" style:family="paragraph" style:parent-style-name="Compact" style:list-style-name="WWNum1019">
      <style:paragraph-properties fo:line-height="100%"/>
    </style:style>
    <style:style style:name="P88" style:family="paragraph" style:parent-style-name="Compact" style:list-style-name="WWNum1020">
      <style:paragraph-properties fo:line-height="100%"/>
    </style:style>
    <style:style style:name="P89" style:family="paragraph" style:parent-style-name="Compact" style:list-style-name="WWNum1021">
      <style:paragraph-properties fo:line-height="100%"/>
    </style:style>
    <style:style style:name="P90" style:family="paragraph" style:parent-style-name="Compact" style:list-style-name="WWNum1022">
      <style:paragraph-properties fo:line-height="100%"/>
    </style:style>
    <style:style style:name="P91" style:family="paragraph" style:parent-style-name="Compact" style:list-style-name="WWNum1023">
      <style:paragraph-properties fo:line-height="100%"/>
    </style:style>
    <style:style style:name="P92" style:family="paragraph" style:parent-style-name="Compact" style:list-style-name="WWNum1024">
      <style:paragraph-properties fo:line-height="100%"/>
    </style:style>
    <style:style style:name="P93" style:family="paragraph" style:parent-style-name="Compact" style:list-style-name="WWNum1025">
      <style:paragraph-properties fo:line-height="100%"/>
    </style:style>
    <style:style style:name="P94" style:family="paragraph" style:parent-style-name="Compact" style:list-style-name="WWNum1026">
      <style:paragraph-properties fo:line-height="100%"/>
    </style:style>
    <style:style style:name="P95" style:family="paragraph" style:parent-style-name="Compact" style:list-style-name="WWNum1027">
      <style:paragraph-properties fo:line-height="100%"/>
    </style:style>
    <style:style style:name="P96" style:family="paragraph" style:parent-style-name="Compact" style:list-style-name="WWNum1028">
      <style:paragraph-properties fo:line-height="100%"/>
    </style:style>
    <style:style style:name="P97" style:family="paragraph" style:parent-style-name="Compact" style:list-style-name="WWNum1029">
      <style:paragraph-properties fo:line-height="100%"/>
    </style:style>
    <style:style style:name="P98" style:family="paragraph" style:parent-style-name="Compact" style:list-style-name="WWNum1034">
      <style:paragraph-properties fo:line-height="100%"/>
      <style:text-properties officeooo:paragraph-rsid="001a89ca"/>
    </style:style>
    <style:style style:name="P99" style:family="paragraph" style:parent-style-name="Compact" style:list-style-name="WWNum1034">
      <style:paragraph-properties fo:line-height="100%" fo:break-before="column"/>
      <style:text-properties officeooo:paragraph-rsid="001a89ca"/>
    </style:style>
    <style:style style:name="P100" style:family="paragraph" style:parent-style-name="Compact" style:list-style-name="WWNum1030">
      <style:paragraph-properties fo:line-height="100%"/>
    </style:style>
    <style:style style:name="P101" style:family="paragraph" style:parent-style-name="Compact" style:list-style-name="WWNum1031">
      <style:paragraph-properties fo:line-height="100%"/>
    </style:style>
    <style:style style:name="P102" style:family="paragraph" style:parent-style-name="Compact" style:list-style-name="WWNum1032">
      <style:paragraph-properties fo:line-height="100%"/>
    </style:style>
    <style:style style:name="P103" style:family="paragraph" style:parent-style-name="Compact" style:list-style-name="WWNum1033">
      <style:paragraph-properties fo:line-height="100%"/>
    </style:style>
    <style:style style:name="P104" style:family="paragraph" style:parent-style-name="Compact" style:list-style-name="WWNum1035">
      <style:paragraph-properties fo:line-height="100%"/>
    </style:style>
    <style:style style:name="P105" style:family="paragraph" style:parent-style-name="Compact" style:list-style-name="WWNum1036">
      <style:paragraph-properties fo:line-height="100%"/>
    </style:style>
    <style:style style:name="P106" style:family="paragraph" style:parent-style-name="Compact" style:list-style-name="WWNum1037">
      <style:paragraph-properties fo:line-height="100%"/>
    </style:style>
    <style:style style:name="P107" style:family="paragraph" style:parent-style-name="Compact" style:list-style-name="WWNum1038">
      <style:paragraph-properties fo:line-height="100%"/>
    </style:style>
    <style:style style:name="P108" style:family="paragraph" style:parent-style-name="Compact" style:list-style-name="WWNum1039">
      <style:paragraph-properties fo:line-height="100%"/>
    </style:style>
    <style:style style:name="P109" style:family="paragraph" style:parent-style-name="Compact" style:list-style-name="WWNum1041">
      <style:paragraph-properties fo:line-height="100%"/>
    </style:style>
    <style:style style:name="P110" style:family="paragraph" style:parent-style-name="Compact" style:list-style-name="WWNum1042">
      <style:paragraph-properties fo:line-height="100%"/>
    </style:style>
    <style:style style:name="P111" style:family="paragraph" style:parent-style-name="Compact" style:list-style-name="WWNum1044">
      <style:paragraph-properties fo:line-height="100%"/>
    </style:style>
    <style:style style:name="P112" style:family="paragraph" style:parent-style-name="Compact" style:list-style-name="WWNum1045">
      <style:paragraph-properties fo:line-height="100%"/>
    </style:style>
    <style:style style:name="P113" style:family="paragraph" style:parent-style-name="Compact" style:list-style-name="WWNum1046">
      <style:paragraph-properties fo:line-height="100%"/>
    </style:style>
    <style:style style:name="P114" style:family="paragraph" style:parent-style-name="Compact" style:list-style-name="WWNum1046">
      <style:paragraph-properties fo:line-height="100%"/>
      <style:text-properties officeooo:paragraph-rsid="002f5333"/>
    </style:style>
    <style:style style:name="P115" style:family="paragraph" style:parent-style-name="Compact" style:list-style-name="WWNum1049">
      <style:paragraph-properties fo:line-height="100%"/>
    </style:style>
    <style:style style:name="P116" style:family="paragraph" style:parent-style-name="Compact" style:list-style-name="WWNum1051">
      <style:paragraph-properties fo:line-height="100%"/>
    </style:style>
    <style:style style:name="P117" style:family="paragraph" style:parent-style-name="Compact" style:list-style-name="WWNum1052">
      <style:paragraph-properties fo:line-height="100%"/>
    </style:style>
    <style:style style:name="P118" style:family="paragraph" style:parent-style-name="Compact" style:list-style-name="WWNum1034">
      <style:paragraph-properties fo:line-height="100%"/>
      <style:text-properties fo:font-weight="bold" officeooo:paragraph-rsid="001a89ca" style:font-weight-asian="bold"/>
    </style:style>
    <style:style style:name="P119" style:family="paragraph" style:parent-style-name="Standard" style:list-style-name="WWNum1040">
      <style:paragraph-properties fo:line-height="100%"/>
    </style:style>
    <style:style style:name="P120" style:family="paragraph" style:parent-style-name="Standard" style:list-style-name="WWNum1043">
      <style:paragraph-properties fo:line-height="100%"/>
    </style:style>
    <style:style style:name="P121" style:family="paragraph" style:parent-style-name="Standard" style:list-style-name="WWNum1047">
      <style:paragraph-properties fo:line-height="100%"/>
    </style:style>
    <style:style style:name="P122" style:family="paragraph" style:parent-style-name="Standard" style:list-style-name="WWNum1047">
      <style:paragraph-properties fo:line-height="100%" fo:break-before="column"/>
    </style:style>
    <style:style style:name="P123" style:family="paragraph" style:parent-style-name="Standard" style:list-style-name="WWNum1048">
      <style:paragraph-properties fo:line-height="100%"/>
    </style:style>
    <style:style style:name="P124" style:family="paragraph" style:parent-style-name="Standard" style:list-style-name="WWNum1050">
      <style:paragraph-properties fo:line-height="100%"/>
    </style:style>
    <style:style style:name="P125" style:family="paragraph" style:parent-style-name="Standard" style:list-style-name="WWNum1050">
      <style:paragraph-properties fo:line-height="100%" fo:break-before="column"/>
    </style:style>
    <style:style style:name="P126" style:family="paragraph" style:parent-style-name="Standard" style:list-style-name="WWNum1047">
      <style:paragraph-properties fo:line-height="100%"/>
      <style:text-properties fo:font-weight="bold"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officeooo:rsid="00037a79"/>
    </style:style>
    <style:style style:name="T5" style:family="text">
      <style:text-properties officeooo:rsid="00058b03"/>
    </style:style>
    <style:style style:name="T6" style:family="text">
      <style:text-properties officeooo:rsid="00116623"/>
    </style:style>
    <style:style style:name="T7" style:family="text">
      <style:text-properties officeooo:rsid="00125b63"/>
    </style:style>
    <style:style style:name="T8" style:family="text">
      <style:text-properties officeooo:rsid="0014b97b"/>
    </style:style>
    <style:style style:name="T9" style:family="text">
      <style:text-properties officeooo:rsid="00257952"/>
    </style:style>
    <style:style style:name="T10" style:family="text">
      <style:text-properties officeooo:rsid="0025f5fe"/>
    </style:style>
    <style:style style:name="T11" style:family="text">
      <style:text-properties officeooo:rsid="002620aa"/>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60" text:outline-level="1"><text:bookmark-start text:name="mini-cairn"/>Mini <text:line-break/>Cairn<text:bookmark-end text:name="mini-cairn"/></text:h>
        <text:p text:style-name="P65"/>
        <text:p text:style-name="P66"/>
        <text:p text:style-name="P20"><text:span text:style-name="T1">Cairn</text:span> is licensed under CC-BY-SA 4.0 by Yochai Gal. <text:span text:style-name="T5">(</text:span>github.com/ yochaigal/cairn<text:span text:style-name="T5">)</text:span></text:p>
        <text:p text:style-name="P32"><text:span text:style-name="T1">Cairn</text:span> is an adventure game for one facilitator (the <text:span text:style-name="T1">Warden</text:span>) and at least one other player inspired by the likes of Chris McDowall’s Into the Odd and Ben Milton’s Knave.</text:p>
        <text:p text:style-name="P32">Players act as hardened adventurers exploring a dark &amp; mysterious Wood filled with strange folk, hidden treasure, and unspeakable monstrosities.</text:p>
        <text:h text:style-name="P26" text:outline-level="2"><text:bookmark-start text:name="character-creation"/>Character Creation<text:bookmark-end text:name="character-creation"/></text:h>
        <text:p text:style-name="P19">First, choose a <text:span text:style-name="T1">name</text:span> for your character, then choose or roll their <text:span text:style-name="T1">background</text:span>, which informs their knowledge and potential skills. Lastly, roll for the rest of your character’s <text:span text:style-name="T1">traits</text:span> and <text:span text:style-name="T1">gear</text:span> on the <text:span text:style-name="T3">Character Traits</text:span> and <text:span text:style-name="T3">Starting Gear</text:span> tables.</text:p>
        <text:h text:style-name="P26" text:outline-level="2"><text:bookmark-start text:name="ability-scores"/>Ability Scores<text:bookmark-end text:name="ability-scores"/></text:h>
        <text:p text:style-name="P19">Player Characters (PCs) have just three attributes:</text:p>
        <text:p text:style-name="P32"><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h text:style-name="P26" text:outline-level="2"><text:bookmark-start text:name="hit-protection"/>Hit Protection<text:bookmark-end text:name="hit-protection"/></text:h>
        <text:p text:style-name="P19">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span text:style-name="T1">Scars</text:span> table.</text:p>
        <text:h text:style-name="P26" text:outline-level="2"><text:bookmark-start text:name="inventory"/>Inventory<text:bookmark-end text:name="inventory"/></text:h>
        <text:p text:style-name="P19">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32">Most items take up one slot, and small items can be bundled together. Slots are abstract and can be rearranged per the Warden’s discretion.</text:p>
        <text:p text:style-name="P32"><text:span text:style-name="T1">Bulky</text:span> items take up two slots and are typically two-handed or awkward to carry. Anyone carrying a full inventory (e.g. filling all 10 slots) is reduced to 0 HP.</text:p>
        <text:p text:style-name="P32">A PC cannot carry more items than their inventory allows. Carts (which must be pulled with both hands), horses, or mules can increase inventory. <text:span text:style-name="T1">Hirelings</text:span> can also be paid to carry equipment.</text:p>
        <text:h text:style-name="P26" text:outline-level="2"/>
        <text:h text:style-name="P13" text:outline-level="2"><text:bookmark-start text:name="starting-gear"/><text:soft-page-break/>Starting Gear<text:bookmark-end text:name="starting-gear"/></text:h>
        <text:p text:style-name="P19">All PCs begin with:or</text:p>
        <text:list xml:id="list3025113426" text:style-name="WWNum1001">
          <text:list-item>
            <text:p text:style-name="P68">Three days’ rations (one slot)</text:p>
          </text:list-item>
          <text:list-item>
            <text:p text:style-name="P68">A torch (one slot)</text:p>
          </text:list-item>
          <text:list-item>
            <text:p text:style-name="P68">3d6 gold pieces</text:p>
          </text:list-item>
        </text:list>
        <text:p text:style-name="P19">Roll on the <text:span text:style-name="T1">Starting Gear</text:span> tables to determine your PC’s armor, weapons, tools, and equipment. If indicated, roll on the <text:span text:style-name="T3">Spell-books</text:span> table with a d100 (or roll 2d10, using one die as the ones place,and one as the tens place).</text:p>
        <text:p text:style-name="P32">See the <text:span text:style-name="T1">Equipment List</text:span> for related armor, damage, and slot values. Smaller items can sometimes be bundled together into one slot.</text:p>
        <text:h text:style-name="P27" text:outline-level="2"><text:bookmark-start text:name="background-and-traits-d20-and-d10"/>Background and Traits <text:bookmark-end text:name="background-and-traits-d20-and-d10"/></text:h>
        <text:p text:style-name="P62">Background</text:p>
        <text:list xml:id="list3266171792" text:style-name="WWNum1002">
          <text:list-item text:start-value="1">
            <text:p text:style-name="P69">Alchemist</text:p>
          </text:list-item>
          <text:list-item>
            <text:p text:style-name="P69">Beggar</text:p>
          </text:list-item>
          <text:list-item>
            <text:p text:style-name="P69">Butcher</text:p>
          </text:list-item>
          <text:list-item>
            <text:p text:style-name="P69">Burglar</text:p>
          </text:list-item>
          <text:list-item>
            <text:p text:style-name="P69">Charlatan</text:p>
          </text:list-item>
          <text:list-item>
            <text:p text:style-name="P69">Cleric</text:p>
          </text:list-item>
          <text:list-item>
            <text:p text:style-name="P69">Cook</text:p>
          </text:list-item>
          <text:list-item>
            <text:p text:style-name="P69">Cultist</text:p>
          </text:list-item>
          <text:list-item>
            <text:p text:style-name="P69">Gambler</text:p>
          </text:list-item>
          <text:list-item>
            <text:p text:style-name="P69">Herbalist</text:p>
          </text:list-item>
          <text:list-item>
            <text:p text:style-name="P69">Magician</text:p>
          </text:list-item>
          <text:list-item>
            <text:p text:style-name="P69">Mariner</text:p>
          </text:list-item>
          <text:list-item>
            <text:p text:style-name="P69">Mercenary</text:p>
          </text:list-item>
          <text:list-item>
            <text:p text:style-name="P69">Merchant</text:p>
          </text:list-item>
          <text:list-item>
            <text:p text:style-name="P69">Outlaw</text:p>
          </text:list-item>
          <text:list-item>
            <text:p text:style-name="P69">Performer</text:p>
          </text:list-item>
          <text:list-item>
            <text:p text:style-name="P69">Pickpocket</text:p>
          </text:list-item>
          <text:list-item>
            <text:p text:style-name="P69">Smuggler</text:p>
          </text:list-item>
          <text:list-item>
            <text:p text:style-name="P69">Student</text:p>
          </text:list-item>
          <text:list-item>
            <text:p text:style-name="P69">Tracker</text:p>
          </text:list-item>
        </text:list>
        <text:p text:style-name="P39"/>
        <text:p text:style-name="P40">Virtue</text:p>
        <text:list xml:id="list93343081549032" text:continue-list="list3266171792" text:style-name="WWNum1003">
          <text:list-item text:start-value="1">
            <text:p text:style-name="P70">Ambitious</text:p>
          </text:list-item>
          <text:list-item>
            <text:p text:style-name="P70">Cautious</text:p>
          </text:list-item>
          <text:list-item>
            <text:p text:style-name="P70">Courageous</text:p>
          </text:list-item>
          <text:list-item>
            <text:p text:style-name="P70">Disciplined</text:p>
          </text:list-item>
          <text:list-item>
            <text:p text:style-name="P70">Gregarious</text:p>
          </text:list-item>
          <text:list-item>
            <text:p text:style-name="P70">Honorable</text:p>
          </text:list-item>
          <text:list-item>
            <text:p text:style-name="P70">Humble</text:p>
          </text:list-item>
          <text:list-item>
            <text:p text:style-name="P70">Merciful</text:p>
          </text:list-item>
          <text:list-item>
            <text:p text:style-name="P70">Serene</text:p>
          </text:list-item>
          <text:list-item>
            <text:p text:style-name="P70">Tolerant</text:p>
          </text:list-item>
        </text:list>
        <text:p text:style-name="P39">Vice</text:p>
        <text:list xml:id="list93344289468838" text:continue-list="list93343081549032" text:style-name="WWNum1004">
          <text:list-item text:start-value="1">
            <text:p text:style-name="P71">Aggressive</text:p>
          </text:list-item>
          <text:list-item>
            <text:p text:style-name="P71">Bitter</text:p>
          </text:list-item>
          <text:list-item>
            <text:p text:style-name="P71">Craven</text:p>
          </text:list-item>
          <text:list-item>
            <text:p text:style-name="P71">Deceitful</text:p>
          </text:list-item>
          <text:list-item>
            <text:p text:style-name="P71">Greedy</text:p>
          </text:list-item>
          <text:list-item>
            <text:p text:style-name="P71">Lazy</text:p>
          </text:list-item>
          <text:list-item>
            <text:p text:style-name="P71">Nervous</text:p>
          </text:list-item>
          <text:list-item>
            <text:p text:style-name="P71">Rude</text:p>
          </text:list-item>
          <text:list-item>
            <text:p text:style-name="P71">Vain</text:p>
          </text:list-item>
          <text:list-item>
            <text:p text:style-name="P71">Vengeful</text:p>
          </text:list-item>
        </text:list>
        <text:p text:style-name="P39">Reputation</text:p>
        <text:list xml:id="list93344394031910" text:continue-list="list93344289468838" text:style-name="WWNum1005">
          <text:list-item text:start-value="1">
            <text:p text:style-name="P72">Ambitious</text:p>
          </text:list-item>
          <text:list-item>
            <text:p text:style-name="P72">Boor</text:p>
          </text:list-item>
          <text:list-item>
            <text:p text:style-name="P72">Dangerous</text:p>
          </text:list-item>
          <text:list-item>
            <text:p text:style-name="P72">Entertainer</text:p>
          </text:list-item>
          <text:list-item>
            <text:p text:style-name="P72">Honest</text:p>
          </text:list-item>
          <text:list-item>
            <text:p text:style-name="P72">Loafer</text:p>
          </text:list-item>
          <text:list-item>
            <text:p text:style-name="P72">Oddball</text:p>
          </text:list-item>
          <text:list-item>
            <text:p text:style-name="P72">Repulsive</text:p>
          </text:list-item>
          <text:list-item>
            <text:p text:style-name="P72">Respected</text:p>
          </text:list-item>
          <text:list-item>
            <text:p text:style-name="P72">Wise</text:p>
          </text:list-item>
        </text:list>
        <text:p text:style-name="P42"/>
        <text:p text:style-name="P43"><text:soft-page-break/>Misfortunes</text:p>
        <text:list xml:id="list93342756893128" text:continue-list="list93344394031910" text:style-name="WWNum1006">
          <text:list-item text:start-value="1">
            <text:p text:style-name="P73">Abandoned</text:p>
          </text:list-item>
          <text:list-item>
            <text:p text:style-name="P73">Addicted</text:p>
          </text:list-item>
          <text:list-item>
            <text:p text:style-name="P73">Blackmailed</text:p>
          </text:list-item>
          <text:list-item>
            <text:p text:style-name="P73">Condemned</text:p>
          </text:list-item>
          <text:list-item>
            <text:p text:style-name="P73">Cursed</text:p>
          </text:list-item>
          <text:list-item>
            <text:p text:style-name="P73">Defrauded</text:p>
          </text:list-item>
          <text:list-item>
            <text:p text:style-name="P73">Demoted</text:p>
          </text:list-item>
          <text:list-item>
            <text:p text:style-name="P73">Discredited</text:p>
          </text:list-item>
          <text:list-item>
            <text:p text:style-name="P73">Disowned</text:p>
          </text:list-item>
          <text:list-item>
            <text:p text:style-name="P73">Exiled</text:p>
          </text:list-item>
        </text:list>
        <text:h text:style-name="P26" text:outline-level="2"><text:bookmark-start text:name="starting-gear-d20"/>Starting Gear<text:bookmark-end text:name="starting-gear-d20"/></text:h>
        <text:p text:style-name="P39">Armor</text:p>
        <text:list xml:id="list93343373230616" text:continue-list="list3025113426" text:style-name="WWNum1007">
          <text:list-item>
            <text:p text:style-name="P74">1-3: None</text:p>
          </text:list-item>
          <text:list-item>
            <text:p text:style-name="P74">4-14: Studded Leather (Brigandine)</text:p>
          </text:list-item>
          <text:list-item>
            <text:p text:style-name="P74">5-19: Chasinmail</text:p>
          </text:list-item>
          <text:list-item>
            <text:p text:style-name="P74">20: Plate</text:p>
          </text:list-item>
        </text:list>
        <text:p text:style-name="P39">Helmets &amp; Shields</text:p>
        <text:list xml:id="list93343660935518" text:continue-list="list93343373230616" text:style-name="WWNum1008">
          <text:list-item>
            <text:p text:style-name="P75">1-13: None</text:p>
          </text:list-item>
          <text:list-item>
            <text:p text:style-name="P75">14-16: Helmet</text:p>
          </text:list-item>
          <text:list-item>
            <text:p text:style-name="P75">17-19: Shield</text:p>
          </text:list-item>
          <text:list-item>
            <text:p text:style-name="P75">20: Helmet &amp; Shield</text:p>
          </text:list-item>
        </text:list>
        <text:p text:style-name="P39">Weapons</text:p>
        <text:list xml:id="list93343267083935" text:continue-list="list93343660935518" text:style-name="WWNum1009">
          <text:list-item>
            <text:p text:style-name="P76">1-5: Dagger, Cudgel, Staff</text:p>
          </text:list-item>
          <text:list-item>
            <text:p text:style-name="P76">6-14: Sword, Mace, Axe</text:p>
          </text:list-item>
          <text:list-item>
            <text:p text:style-name="P76">15-19: Longbow, Crossbow, Sling</text:p>
          </text:list-item>
          <text:list-item>
            <text:p text:style-name="P76">20: Halberd, War Hammer, Battleaxe</text:p>
          </text:list-item>
        </text:list>
        <text:p text:style-name="P39">Expeditionary Gear</text:p>
        <text:list xml:id="list93343780696761" text:continue-list="list93342756893128" text:style-name="WWNum1010">
          <text:list-item text:start-value="1">
            <text:p text:style-name="P77">Air Bladder</text:p>
          </text:list-item>
          <text:list-item>
            <text:p text:style-name="P77">Antitoxin</text:p>
          </text:list-item>
          <text:list-item>
            <text:p text:style-name="P77">Cart (+4 slots, bulky)</text:p>
          </text:list-item>
          <text:list-item>
            <text:p text:style-name="P77">Chain (10ft)</text:p>
          </text:list-item>
          <text:list-item>
            <text:p text:style-name="P77">Dowsing Rod</text:p>
          </text:list-item>
          <text:list-item>
            <text:p text:style-name="P77">Fire Oil</text:p>
          </text:list-item>
          <text:list-item>
            <text:p text:style-name="P77">Grappling Hook</text:p>
          </text:list-item>
          <text:list-item>
            <text:p text:style-name="P77">Large Sack</text:p>
          </text:list-item>
          <text:list-item>
            <text:p text:style-name="P77">Large Trap</text:p>
          </text:list-item>
          <text:list-item>
            <text:p text:style-name="P77">Lockpicks</text:p>
          </text:list-item>
          <text:list-item>
            <text:p text:style-name="P77">Manacles</text:p>
          </text:list-item>
          <text:list-item>
            <text:p text:style-name="P77">Pick</text:p>
          </text:list-item>
          <text:list-item>
            <text:p text:style-name="P77">Pole (10ft)</text:p>
          </text:list-item>
          <text:list-item>
            <text:p text:style-name="P77">Pulley</text:p>
          </text:list-item>
          <text:list-item>
            <text:p text:style-name="P77">Repellent</text:p>
          </text:list-item>
          <text:list-item>
            <text:p text:style-name="P77">Rope (25ft)</text:p>
          </text:list-item>
          <text:list-item>
            <text:p text:style-name="P77">Spirit Ward</text:p>
          </text:list-item>
          <text:list-item>
            <text:p text:style-name="P77">Spyglass</text:p>
          </text:list-item>
          <text:list-item>
            <text:p text:style-name="P77">Tinderbox</text:p>
          </text:list-item>
          <text:list-item>
            <text:p text:style-name="P77">Wolfsbane</text:p>
          </text:list-item>
        </text:list>
        <text:p text:style-name="P39">Tools</text:p>
        <text:list xml:id="list93344388796373" text:continue-list="list93343780696761" text:style-name="WWNum1011">
          <text:list-item text:start-value="1">
            <text:p text:style-name="P78">Bellows</text:p>
          </text:list-item>
          <text:list-item>
            <text:p text:style-name="P78">Bucket</text:p>
          </text:list-item>
          <text:list-item>
            <text:p text:style-name="P78">Caltrops</text:p>
          </text:list-item>
          <text:list-item>
            <text:p text:style-name="P78">Chalk</text:p>
          </text:list-item>
          <text:list-item>
            <text:p text:style-name="P78">Chisel</text:p>
          </text:list-item>
          <text:list-item>
            <text:p text:style-name="P78">Cook Pots</text:p>
          </text:list-item>
          <text:list-item>
            <text:p text:style-name="P78">Crowbar</text:p>
          </text:list-item>
          <text:list-item>
            <text:p text:style-name="P78">Drill (Manual)</text:p>
          </text:list-item>
          <text:list-item>
            <text:p text:style-name="P78">FishingRod</text:p>
          </text:list-item>
          <text:list-item>
            <text:p text:style-name="P78">Glue</text:p>
          </text:list-item>
          <text:list-item>
            <text:p text:style-name="P78">Grease</text:p>
          </text:list-item>
          <text:list-item>
            <text:p text:style-name="P78">Hammer</text:p>
          </text:list-item>
          <text:list-item>
            <text:p text:style-name="P78">Hourglass</text:p>
          </text:list-item>
          <text:list-item>
            <text:p text:style-name="P78">Metal File</text:p>
          </text:list-item>
          <text:list-item>
            <text:p text:style-name="P78">Nails</text:p>
          </text:list-item>
          <text:list-item>
            <text:p text:style-name="P78">Net</text:p>
          </text:list-item>
          <text:list-item>
            <text:p text:style-name="P78">Saw</text:p>
          </text:list-item>
          <text:list-item>
            <text:p text:style-name="P78">Sealant</text:p>
          </text:list-item>
          <text:list-item>
            <text:p text:style-name="P78">Shovel</text:p>
          </text:list-item>
          <text:list-item>
            <text:p text:style-name="P78">Tongs</text:p>
          </text:list-item>
        </text:list>
        <text:p text:style-name="P39">Trinkets</text:p>
        <text:list xml:id="list93344709432104" text:continue-list="list93344388796373" text:style-name="WWNum1012">
          <text:list-item text:start-value="1">
            <text:p text:style-name="P79">Bottle</text:p>
          </text:list-item>
          <text:list-item>
            <text:p text:style-name="P79">Card Deck</text:p>
          </text:list-item>
          <text:list-item>
            <text:p text:style-name="P79">Dice Set</text:p>
          </text:list-item>
          <text:list-item>
            <text:p text:style-name="P79">Face Paint</text:p>
          </text:list-item>
          <text:list-item>
            <text:p text:style-name="P79">Fake Jewels</text:p>
          </text:list-item>
          <text:list-item>
            <text:p text:style-name="P79">Horn</text:p>
          </text:list-item>
          <text:list-item>
            <text:p text:style-name="P79"><text:soft-page-break/>Incense</text:p>
          </text:list-item>
          <text:list-item>
            <text:p text:style-name="P79">Instrument</text:p>
          </text:list-item>
          <text:list-item>
            <text:p text:style-name="P79">Lens</text:p>
          </text:list-item>
          <text:list-item>
            <text:p text:style-name="P79">Marbles</text:p>
          </text:list-item>
          <text:list-item>
            <text:p text:style-name="P79">Mirror</text:p>
          </text:list-item>
          <text:list-item>
            <text:p text:style-name="P79">Perfume</text:p>
          </text:list-item>
          <text:list-item>
            <text:p text:style-name="P79">Quill &amp; Ink</text:p>
          </text:list-item>
          <text:list-item>
            <text:p text:style-name="P79">Salt Pack</text:p>
          </text:list-item>
          <text:list-item>
            <text:p text:style-name="P79">Small Bell</text:p>
          </text:list-item>
          <text:list-item>
            <text:p text:style-name="P79">Soap</text:p>
          </text:list-item>
          <text:list-item>
            <text:p text:style-name="P79">Sponge</text:p>
          </text:list-item>
          <text:list-item>
            <text:p text:style-name="P79">Tar Pot</text:p>
          </text:list-item>
          <text:list-item>
            <text:p text:style-name="P79">Twine</text:p>
          </text:list-item>
          <text:list-item>
            <text:p text:style-name="P79">Whistle</text:p>
          </text:list-item>
        </text:list>
        <text:p text:style-name="P39">Bonus Item (roll on table indicated)</text:p>
        <text:list xml:id="list93342850108098" text:continue-list="list93343267083935" text:style-name="WWNum1013">
          <text:list-item>
            <text:p text:style-name="P80">1-5: Tool or Trinket</text:p>
          </text:list-item>
          <text:list-item>
            <text:p text:style-name="P80">6-13: Expeditionary Gear</text:p>
          </text:list-item>
          <text:list-item>
            <text:p text:style-name="P80">14-17: Armor or Weapon</text:p>
          </text:list-item>
          <text:list-item>
            <text:p text:style-name="P80">18-20: Spellbook</text:p>
          </text:list-item>
        </text:list>
        <text:p text:style-name="P39">Spellbooks (d100)</text:p>
        <text:p text:style-name="P32">Roll d100 <text:span text:style-name="T6">on </text:span><text:span text:style-name="T3">100 Spells</text:span> <text:span text:style-name="T8">list.</text:span></text:p>
        <text:h text:style-name="P29" text:outline-level="2"><text:bookmark-start text:name="equipment-list-prices-in-gold-pieces"/>Equipment List </text:h>
        <text:p text:style-name="P63">(Prices in Gold Pieces)<text:bookmark-end text:name="equipment-list-prices-in-gold-pieces"/></text:p>
        <text:p text:style-name="P58">Armor</text:p>
        <text:list xml:id="list93343789906604" text:continue-list="list93342850108098" text:style-name="WWNum1014">
          <text:list-item>
            <text:p text:style-name="P81">Shield (+1 Armor): 10</text:p>
          </text:list-item>
          <text:list-item>
            <text:p text:style-name="P81">Helmet (+1 Armor): 10</text:p>
          </text:list-item>
          <text:list-item>
            <text:p text:style-name="P81">Padded Armor “Gambeson” (+1 Armor): 15</text:p>
          </text:list-item>
          <text:list-item>
            <text:p text:style-name="P81">Studded Leather “Brigandine” (1 Armor, bulky): 20</text:p>
          </text:list-item>
          <text:list-item>
            <text:p text:style-name="P81">Chainmail (2 Armor, bulky): 40</text:p>
          </text:list-item>
          <text:list-item>
            <text:p text:style-name="P81">Plate (3 Armor, bulky): 60</text:p>
          </text:list-item>
        </text:list>
        <text:p text:style-name="P39"/>
        <text:p text:style-name="P40">Weapons</text:p>
        <text:list xml:id="list93344213684966" text:continue-list="list93343789906604" text:style-name="WWNum1015">
          <text:list-item>
            <text:p text:style-name="P82">Dagger, Cudgel, Sickle, Staff, etc. (d6 damage): 5</text:p>
          </text:list-item>
          <text:list-item>
            <text:p text:style-name="P82">Spear, Sword, Mace, Axe, Flail, etc. (d8 damage): 10</text:p>
          </text:list-item>
          <text:list-item>
            <text:p text:style-name="P82">Halberd, War Hammer, Long Sword , etc. (d10 damage, bulky): 20</text:p>
          </text:list-item>
          <text:list-item>
            <text:p text:style-name="P82">Sling (d4 damage): 5</text:p>
          </text:list-item>
          <text:list-item>
            <text:p text:style-name="P82">Bow (d6 damage, bulky): 20</text:p>
          </text:list-item>
          <text:list-item>
            <text:p text:style-name="P82">Crossbow (d8 damage, bulky): 30</text:p>
          </text:list-item>
        </text:list>
        <text:p text:style-name="P39">Gear &amp; Tools</text:p>
        <text:list xml:id="list93344529230053" text:continue-list="list93344213684966" text:style-name="WWNum1016">
          <text:list-item>
            <text:p text:style-name="P83">Air Bladder: 5</text:p>
          </text:list-item>
          <text:list-item>
            <text:p text:style-name="P83">Bellows: 10</text:p>
          </text:list-item>
          <text:list-item>
            <text:p text:style-name="P83">Bedroll: 5</text:p>
          </text:list-item>
          <text:list-item>
            <text:p text:style-name="P83">Book: 50</text:p>
          </text:list-item>
          <text:list-item>
            <text:p text:style-name="P83">Bucket: 5</text:p>
          </text:list-item>
          <text:list-item>
            <text:p text:style-name="P83">Caltrops: 10</text:p>
          </text:list-item>
          <text:list-item>
            <text:p text:style-name="P83">Cart (+4 slots, bulky): 30</text:p>
          </text:list-item>
          <text:list-item>
            <text:p text:style-name="P83">Chain (10ft): 10</text:p>
          </text:list-item>
          <text:list-item>
            <text:p text:style-name="P83">Chalk: 1</text:p>
          </text:list-item>
          <text:list-item>
            <text:p text:style-name="P83">Chisel: 5</text:p>
          </text:list-item>
          <text:list-item>
            <text:p text:style-name="P83">Cook Pots: 10</text:p>
          </text:list-item>
          <text:list-item>
            <text:p text:style-name="P83">Crowbar: 10</text:p>
          </text:list-item>
          <text:list-item>
            <text:p text:style-name="P83">Drill (Manual): 10</text:p>
          </text:list-item>
          <text:list-item>
            <text:p text:style-name="P83">Face Paint: 10</text:p>
          </text:list-item>
          <text:list-item>
            <text:p text:style-name="P83">Fire Oil: 10</text:p>
          </text:list-item>
          <text:list-item>
            <text:p text:style-name="P83">Fishing Rod: 10</text:p>
          </text:list-item>
          <text:list-item>
            <text:p text:style-name="P83">Glass Marbles: 5</text:p>
          </text:list-item>
          <text:list-item>
            <text:p text:style-name="P83">Glue: 5</text:p>
          </text:list-item>
          <text:list-item>
            <text:p text:style-name="P83">Grease: 10</text:p>
          </text:list-item>
          <text:list-item>
            <text:p text:style-name="P83">Grappling Hook: 25</text:p>
          </text:list-item>
          <text:list-item>
            <text:p text:style-name="P83">Hammer: 5</text:p>
          </text:list-item>
          <text:list-item>
            <text:p text:style-name="P83">Holy Water: 25</text:p>
          </text:list-item>
          <text:list-item>
            <text:p text:style-name="P83">Horn: 10</text:p>
          </text:list-item>
          <text:list-item>
            <text:p text:style-name="P83">Horse (+4 slots): 75</text:p>
          </text:list-item>
          <text:list-item>
            <text:p text:style-name="P83">Hourglass: 50</text:p>
          </text:list-item>
          <text:list-item>
            <text:p text:style-name="P83">Incense: 10</text:p>
            <text:p text:style-name="P83"/>
          </text:list-item>
          <text:list-item>
            <text:p text:style-name="P84"><text:soft-page-break/>Ladder (bulky, 10ft): 10</text:p>
          </text:list-item>
          <text:list-item>
            <text:p text:style-name="P83">Lantern &amp; Oil: 10</text:p>
          </text:list-item>
          <text:list-item>
            <text:p text:style-name="P83">Large Trap: 20</text:p>
          </text:list-item>
          <text:list-item>
            <text:p text:style-name="P83">Large Sponge: 5</text:p>
          </text:list-item>
          <text:list-item>
            <text:p text:style-name="P83">Lens: 10</text:p>
          </text:list-item>
          <text:list-item>
            <text:p text:style-name="P83">Lockpicks: 25</text:p>
          </text:list-item>
          <text:list-item>
            <text:p text:style-name="P83">Manacles: 10</text:p>
          </text:list-item>
          <text:list-item>
            <text:p text:style-name="P83">Metal File: 5</text:p>
          </text:list-item>
          <text:list-item>
            <text:p text:style-name="P83">Mirror: 5</text:p>
          </text:list-item>
          <text:list-item>
            <text:p text:style-name="P83">Mule (+6 slots, slow): 30</text:p>
          </text:list-item>
          <text:list-item>
            <text:p text:style-name="P83">Net: 10</text:p>
          </text:list-item>
          <text:list-item>
            <text:p text:style-name="P83">Oilskin Bag: 5</text:p>
          </text:list-item>
          <text:list-item>
            <text:p text:style-name="P83">Pick: 10</text:p>
          </text:list-item>
          <text:list-item>
            <text:p text:style-name="P83">Pulley: 10</text:p>
          </text:list-item>
          <text:list-item>
            <text:p text:style-name="P83">Pole (10ft): 5</text:p>
          </text:list-item>
          <text:list-item>
            <text:p text:style-name="P83">Quill &amp; Ink: 10</text:p>
          </text:list-item>
          <text:list-item>
            <text:p text:style-name="P83">Rations (<text:span text:style-name="T4">3</text:span> day’s worth): 10</text:p>
          </text:list-item>
          <text:list-item>
            <text:p text:style-name="P83">Rope (25ft): 5</text:p>
          </text:list-item>
          <text:list-item>
            <text:p text:style-name="P83">Saw: 5</text:p>
          </text:list-item>
          <text:list-item>
            <text:p text:style-name="P83">Sack: 5</text:p>
          </text:list-item>
          <text:list-item>
            <text:p text:style-name="P83">Shovel: 5</text:p>
          </text:list-item>
          <text:list-item>
            <text:p text:style-name="P83">Soap: 1</text:p>
          </text:list-item>
          <text:list-item>
            <text:p text:style-name="P83">Spike: 1</text:p>
          </text:list-item>
          <text:list-item>
            <text:p text:style-name="P83">Spiked Boots: 5</text:p>
          </text:list-item>
          <text:list-item>
            <text:p text:style-name="P83">Spyglass: 40</text:p>
          </text:list-item>
          <text:list-item>
            <text:p text:style-name="P83">Tar: 10</text:p>
          </text:list-item>
          <text:list-item>
            <text:p text:style-name="P83">Tent (fits 2 people, bulky): 20</text:p>
          </text:list-item>
          <text:list-item>
            <text:p text:style-name="P83">Torch: 1</text:p>
          </text:list-item>
          <text:list-item>
            <text:p text:style-name="P83">Wagon (+8 slots, slow): 200</text:p>
          </text:list-item>
          <text:list-item>
            <text:p text:style-name="P83">Wolfsbane: 10</text:p>
          </text:list-item>
        </text:list>
        <text:h text:style-name="P26" text:outline-level="2"><text:bookmark-start text:name="optional-gear-packages"/>Optional Gear Packages<text:bookmark-end text:name="optional-gear-packages"/></text:h>
        <text:p text:style-name="P39">Cleric</text:p>
        <text:list xml:id="list93342683889972" text:continue-list="list93344529230053" text:style-name="WWNum1017">
          <text:list-item>
            <text:p text:style-name="P85">War Hammer (d10, bulky)</text:p>
          </text:list-item>
          <text:list-item>
            <text:p text:style-name="P85">Chainmail (2 Armor, bulky)</text:p>
          </text:list-item>
          <text:list-item>
            <text:p text:style-name="P85">Gauntlets (+1 Armor)</text:p>
          </text:list-item>
          <text:list-item>
            <text:p text:style-name="P85">Cleansing Blade (d6)</text:p>
          </text:list-item>
          <text:list-item>
            <text:p text:style-name="P85">Holy Symbol (Ward once per day)</text:p>
          </text:list-item>
          <text:list-item>
            <text:p text:style-name="P85">Cloak of the Order</text:p>
          </text:list-item>
        </text:list>
        <text:p text:style-name="P39"/>
        <text:p text:style-name="P40">Dowser</text:p>
        <text:list xml:id="list93343907612289" text:continue-list="list93342683889972" text:style-name="WWNum1018">
          <text:list-item>
            <text:p text:style-name="P86">Sickle (d6)</text:p>
          </text:list-item>
          <text:list-item>
            <text:p text:style-name="P86">Patchwork Doublet (+1 Armor)</text:p>
          </text:list-item>
          <text:list-item>
            <text:p text:style-name="P86">Dowsing Rod</text:p>
          </text:list-item>
          <text:list-item>
            <text:p text:style-name="P86">Eyestone (Sense if placed in fresh water)</text:p>
          </text:list-item>
          <text:list-item>
            <text:p text:style-name="P86">Worn Map</text:p>
          </text:list-item>
          <text:list-item>
            <text:p text:style-name="P86">Spyglass</text:p>
          </text:list-item>
        </text:list>
        <text:p text:style-name="P44">Dwarf</text:p>
        <text:list xml:id="list93343981299674" text:continue-list="list93343907612289" text:style-name="WWNum1019">
          <text:list-item>
            <text:p text:style-name="P87">Prickly Root (d6)</text:p>
          </text:list-item>
          <text:list-item>
            <text:p text:style-name="P87">Pinecone Lattice (1 Armor)</text:p>
          </text:list-item>
          <text:list-item>
            <text:p text:style-name="P87">Trowel</text:p>
          </text:list-item>
          <text:list-item>
            <text:p text:style-name="P87">Jar of Forest Ants</text:p>
          </text:list-item>
          <text:list-item>
            <text:p text:style-name="P87">Poisonous mushroom</text:p>
          </text:list-item>
          <text:list-item>
            <text:p text:style-name="P87">Hand Drill</text:p>
          </text:list-item>
        </text:list>
        <text:p text:style-name="P45">Elf</text:p>
        <text:list xml:id="list93342802173011" text:continue-list="list93343981299674" text:style-name="WWNum1020">
          <text:list-item>
            <text:p text:style-name="P88">Elegant Sword (d8)</text:p>
          </text:list-item>
          <text:list-item>
            <text:p text:style-name="P88">Recurve Bow (d8)</text:p>
          </text:list-item>
          <text:list-item>
            <text:p text:style-name="P88">Gilt Clothing (1 Armor)</text:p>
          </text:list-item>
          <text:list-item>
            <text:p text:style-name="P88">Spellbook (Charm or Detect Magic)</text:p>
          </text:list-item>
          <text:list-item>
            <text:p text:style-name="P88">Golden Flute</text:p>
          </text:list-item>
          <text:list-item>
            <text:p text:style-name="P88">Air Bladder</text:p>
          </text:list-item>
        </text:list>
        <text:p text:style-name="P39">Fighter</text:p>
        <text:list xml:id="list93344288535495" text:continue-list="list93342802173011" text:style-name="WWNum1021">
          <text:list-item>
            <text:p text:style-name="P89">Glaive (d10, bulky)</text:p>
          </text:list-item>
          <text:list-item>
            <text:p text:style-name="P89">Scimitar (d8)</text:p>
          </text:list-item>
          <text:list-item>
            <text:p text:style-name="P89">Shortsword (d6)</text:p>
          </text:list-item>
          <text:list-item>
            <text:p text:style-name="P89">Tobacco Pouch &amp; Pipe</text:p>
          </text:list-item>
          <text:list-item>
            <text:p text:style-name="P89">Dice Set</text:p>
          </text:list-item>
        </text:list>
        <text:p text:style-name="P39">Friar</text:p>
        <text:list xml:id="list93344145923087" text:continue-list="list93344288535495" text:style-name="WWNum1022">
          <text:list-item>
            <text:p text:style-name="P90">Scepter (d6)</text:p>
          </text:list-item>
          <text:list-item>
            <text:p text:style-name="P90">Deceptive Robes (+1 Armor)</text:p>
          </text:list-item>
          <text:list-item>
            <text:p text:style-name="P90">Censer &amp; Holy Water</text:p>
          </text:list-item>
          <text:list-item>
            <text:p text:style-name="P90">Jug of Honey Wine</text:p>
          </text:list-item>
          <text:list-item>
            <text:p text:style-name="P90">Folk Songbook</text:p>
          </text:list-item>
          <text:list-item>
            <text:p text:style-name="P90">Cart (+4 slots, bulky)</text:p>
          </text:list-item>
        </text:list>
        <text:p text:style-name="P39"><text:soft-page-break/>Knight</text:p>
        <text:list xml:id="list93344203921141" text:continue-list="list93344145923087" text:style-name="WWNum1023">
          <text:list-item>
            <text:p text:style-name="P91">Longsword (d8, bulky)</text:p>
          </text:list-item>
          <text:list-item>
            <text:p text:style-name="P91">Chainmail (2 Armor, bulky)</text:p>
          </text:list-item>
          <text:list-item>
            <text:p text:style-name="P91">Helmet (+1 Armor)</text:p>
          </text:list-item>
          <text:list-item>
            <text:p text:style-name="P91">Heraldic Cape</text:p>
          </text:list-item>
          <text:list-item>
            <text:p text:style-name="P91">Manacles</text:p>
          </text:list-item>
          <text:list-item>
            <text:p text:style-name="P91">Fine Rope</text:p>
          </text:list-item>
        </text:list>
        <text:p text:style-name="P39">Magic User</text:p>
        <text:list xml:id="list93344092881408" text:continue-list="list93344203921141" text:style-name="WWNum1024">
          <text:list-item>
            <text:p text:style-name="P92">Fizzled Staff (d8, bulky)</text:p>
          </text:list-item>
          <text:list-item>
            <text:p text:style-name="P92">Dagger (d6)</text:p>
          </text:list-item>
          <text:list-item>
            <text:p text:style-name="P92">Spellbook (random spell)</text:p>
          </text:list-item>
          <text:list-item>
            <text:p text:style-name="P92">Spellbook (random spell)</text:p>
          </text:list-item>
          <text:list-item>
            <text:p text:style-name="P92">Ragged Clothing (hidden pockets)</text:p>
          </text:list-item>
          <text:list-item>
            <text:p text:style-name="P92">Leycap (x2, see Relics)</text:p>
          </text:list-item>
        </text:list>
        <text:p text:style-name="P39">Thief</text:p>
        <text:list xml:id="list93344380648965" text:continue-list="list93344092881408" text:style-name="WWNum1025">
          <text:list-item>
            <text:p text:style-name="P93">Two daggers (d6+d6)</text:p>
          </text:list-item>
          <text:list-item>
            <text:p text:style-name="P93">Hooded Jerkin (1 Armor)</text:p>
          </text:list-item>
          <text:list-item>
            <text:p text:style-name="P93">Lockpicks</text:p>
          </text:list-item>
          <text:list-item>
            <text:p text:style-name="P93">Caltrops</text:p>
          </text:list-item>
          <text:list-item>
            <text:p text:style-name="P93">Grappling Hook</text:p>
          </text:list-item>
          <text:list-item>
            <text:p text:style-name="P93">Metal File</text:p>
          </text:list-item>
        </text:list>
        <text:p text:style-name="P39">Ranger</text:p>
        <text:list xml:id="list93342873108526" text:continue-list="list93344380648965" text:style-name="WWNum1026">
          <text:list-item>
            <text:p text:style-name="P94">Longbow (d8, bulky)</text:p>
          </text:list-item>
          <text:list-item>
            <text:p text:style-name="P94">Hatchet (d6)</text:p>
          </text:list-item>
          <text:list-item>
            <text:p text:style-name="P94">Padded Leathers (1 Armor)</text:p>
          </text:list-item>
          <text:list-item>
            <text:p text:style-name="P94">Large Trap</text:p>
          </text:list-item>
          <text:list-item>
            <text:p text:style-name="P94">Bloodhound: 2 HP, 12 DEX, bite (d6)</text:p>
          </text:list-item>
          <text:list-item>
            <text:p text:style-name="P94">Thundering Horn</text:p>
          </text:list-item>
        </text:list>
        <text:h text:style-name="P31" text:outline-level="2"><text:bookmark-start text:name="rules"/>Rules<text:bookmark-end text:name="rules"/></text:h>
        <text:p text:style-name="P19">Each of the three <text:span text:style-name="T1">abilities</text:span> are used in different circumstances (see <text:span text:style-name="T1">saves</text:span>, below).</text:p>
        <text:p text:style-name="P32"><text:span text:style-name="T1">Strength (STR</text:span>): Used for saves requiring physical power, like lifting gates, bending bars, resisting poison, etc.</text:p>
        <text:p text:style-name="P32"><text:span text:style-name="T1">Dexterity (DEX):</text:span> Used for saves requiring poise, speed, and reflexes like dodging, climbing, sneaking, balancing, etc.</text:p>
        <text:p text:style-name="P32"><text:span text:style-name="T1">Willpower (WIL):</text:span> Used for saves to persuade, deceive, interrogate, intimidate, charm, provoke, manipulate spells, etc.</text:p>
        <text:p text:style-name="P47">Saves</text:p>
        <text:p text:style-name="P32">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32"><text:span text:style-name="T1">Example:</text:span> <text:span text:style-name="T3">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47">Deprivation &amp; Fatigue</text:p>
        <text:p text:style-name="P32">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 PCs can also gain Fatigue by <text:span text:style-name="T1">casting spells</text:span> or through events in the fiction.</text:p>
        <text:p text:style-name="P47"/>
        <text:p text:style-name="P41"><text:soft-page-break/>Healing</text:p>
        <text:p text:style-name="P32">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47">Armor</text:p>
        <text:p text:style-name="P32">Before calculating damage to HP, subtract the target’s <text:span text:style-name="T1">Armor</text:span> value from the result of damage rolls. Shields and similar armor provides a bonus defense (e.g. +1 Armor), but only while the item is held or worn.</text:p>
        <text:p text:style-name="P32">No one can have more than 3 Armor.</text:p>
        <text:p text:style-name="P32">Shields, gauntlets, and helms may provide additional benefits according to their use.</text:p>
        <text:p text:style-name="P48">Reactions</text:p>
        <text:p text:style-name="P33">When the PCs encounter an NPC whose reaction to the party is not obvious, the Warden may roll 2d6 and consult the following table:</text:p>
        <text:list xml:id="list93344632611099" text:continue-list="list93342873108526" text:style-name="WWNum1027">
          <text:list-item>
            <text:p text:style-name="P95">2: Hostile</text:p>
          </text:list-item>
          <text:list-item>
            <text:p text:style-name="P95">3-5: Wry</text:p>
          </text:list-item>
          <text:list-item>
            <text:p text:style-name="P95">6-8: Curious</text:p>
          </text:list-item>
          <text:list-item>
            <text:p text:style-name="P95">9-11: Kind</text:p>
          </text:list-item>
          <text:list-item>
            <text:p text:style-name="P95">12: Helpful</text:p>
          </text:list-item>
        </text:list>
        <text:p text:style-name="P39"/>
        <text:p text:style-name="P51">Morale</text:p>
        <text:p text:style-name="P32">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55">Hirelings</text:p>
        <text:p text:style-name="P32">PCs can hire <text:span text:style-name="T1">hirelings</text:span> to aid them in their expeditions. To create a hireling, roll 3d6 for each ability score, then give them 1d6 HP and a simple weapon (d6), then roll on the <text:span text:style-name="T3">Character Creation</text:span> tables to further flesh them out. Hirelings cost between 1-3gp per day, or a share of whatever treasure the party obtains.</text:p>
        <text:p text:style-name="P47">Wealth &amp; Treasure</text:p>
        <text:p text:style-name="P32">The most common coin is the gold piece (gp), which is equal to 10 silver pieces (sp) and 100 copper pieces (cp).</text:p>
        <text:p text:style-name="P32">Treasure is highly valuable, usually bulky, and rarely useful beyond its value. It can be a lure, taking PCs to exotic and even dangerous locations, and is often under the protection of intimidating foes.</text:p>
        <text:p text:style-name="P32">Villages,strongholds, and ports of call barter and trade based on the local rarity and value of an item or commodity.</text:p>
        <text:h text:style-name="P26" text:outline-level="2"/>
        <text:h text:style-name="P13" text:outline-level="2"><text:bookmark-start text:name="magic"/><text:soft-page-break/>Magic<text:bookmark-end text:name="magic"/></text:h>
        <text:p text:style-name="P19"><text:span text:style-name="T1">Spellbooks</text:span> contain a single spell and take up one slot. They cannot be transcribed or created; instead they are recovered from places like tombs, dungeons, and manors.</text:p>
        <text:p text:style-name="P32">Spellbooks sometimes display unusual properties or limitations, such as producing a foul or unearthly smell when opened, possessing an innate intelligence,or being legible only when held in moonlight.</text:p>
        <text:p text:style-name="P32">Spellbooks will attract the attention of those who seek the arcane power within, and it is considered dangerous to display them openly.</text:p>
        <text:p text:style-name="P32"><text:span text:style-name="T1">Scrolls</text:span> are similar to Spellbooks, however:</text:p>
        <text:list xml:id="list93343688326458" text:continue-list="list93344632611099" text:style-name="WWNum1028">
          <text:list-item>
            <text:p text:style-name="P96">They do not take up an inventory slot.</text:p>
          </text:list-item>
          <text:list-item>
            <text:p text:style-name="P96">They do not cause fatigue.</text:p>
          </text:list-item>
          <text:list-item>
            <text:p text:style-name="P96">They disappear after one use.</text:p>
          </text:list-item>
        </text:list>
        <text:p text:style-name="P39">Casting Spells</text:p>
        <text:p text:style-name="P32">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p text:style-name="P47">Relics</text:p>
        <text:p text:style-name="P32"><text:span text:style-name="T1">Relics</text:span> are items imbued with a magical spell or power. They do not cause Fatigue. Relics usually have a limited use, as well as a recharge condition. A few examples:</text:p>
        <text:p text:style-name="P28"><text:span text:style-name="T1">Honeyclasp</text:span> , 3 charges. A rusted ring that shrinks the bearer to 6" tall. Recharge: place in a thimble-sized cup of royal jelly.</text:p>
        <text:p text:style-name="P28"><text:span text:style-name="T1">Falconer’s Friend</text:span> , 1 charge. A bolt-shaped wand carrying the Haste spell. Recharge: fire from a crossbow and recover.</text:p>
        <text:p text:style-name="P32"><text:span text:style-name="T1">Staff of Silence</text:span> , 1 charge. This blackened rod temporarily disables all magic within 50ft. Recharge: bathe in the light of a full moon.</text:p>
        <text:p text:style-name="P32"><text:span text:style-name="T1">Leycap</text:span> ,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h text:style-name="P26" text:outline-level="2"/>
        <text:h text:style-name="P13" text:outline-level="2"><text:bookmark-start text:name="combat"/><text:soft-page-break/>Combat<text:bookmark-end text:name="combat"/></text:h>
        <text:p text:style-name="P39">Rounds</text:p>
        <text:p text:style-name="P32">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47">Actions</text:p>
        <text:p text:style-name="P32">On their turn, a character may move up to 40ft and take up to one action. This may be_casting a spell, attacking, making a second move, or some other reasonable action.</text:p>
        <text:p text:style-name="P32">Each round, the PCs declare what they are doing before dice are rolled. If a character attempts something risky, the Warden calls for a save for appropriate players or NPCs. </text:p>
        <text:p text:style-name="P47">Turns</text:p>
        <text:p text:style-name="P32">The Warden will telegraph the most likely actions taken by NPCs or monsters. At the start of combat, each PC must make a DEX save to act before their opponents.</text:p>
        <text:p text:style-name="P32"><text:span text:style-name="T1">Example:</text:span> <text:span text:style-name="T3">Bea has accidentally stumbled onto the stomping grounds of a massive Wood Troll. In order to make a move before the Troll, she makes a DEX save. She fails, and the Troll gets to attack first.</text:span></text:p>
        <text:p text:style-name="P47"/>
        <text:p text:style-name="P50">Attacking &amp; Damage</text:p>
        <text:p text:style-name="P32">The attacker rolls their weapon die and subtracts the target’s armor, then deals the remaining total to their opponent’s HP. Unarmed attacks always do 1d4 damage.</text:p>
        <text:p text:style-name="P32"><text:span text:style-name="T1">Example:</text:span> <text:span text:style-name="T3">The Wood Troll roars, swinging its club at Bea, who has 5 HP. The club does 1d10 damage and the Warden rolls a 4. They subtract 1 to account for Bea’s leather armor, leaving Bea with 2 HP remaining.</text:span></text:p>
        <text:p text:style-name="P47">Attack Modifiers</text:p>
        <text:p text:style-name="P32">If fighting from a position of weakness (such as through cover or with bound hands), the attack is <text:span text:style-name="T1">impaired</text:span> and the attacker must roll 1d4 damage_regardless_of the attacks damage die.</text:p>
        <text:p text:style-name="P32">If fighting from a position of advantage (such as against a helpless foe or through a daring maneuver), the attack is <text:span text:style-name="T1">enhanced</text:span> , allowing the attacker to roll 1d12 damage instead of their normal die.</text:p>
        <text:p text:style-name="P52">Multiple Attackers</text:p>
        <text:p text:style-name="P34">If multiple attackers target the same foe, roll all damage dice and keep the single highest result.</text:p>
        <text:p text:style-name="P64"><text:span text:style-name="T7">O</text:span>ptionally, you can allow subsequent attacks on a target in a round, but they are impaired.</text:p>
        <text:p text:style-name="P47"/>
        <text:p text:style-name="P41"><text:soft-page-break/>Dual Weapons</text:p>
        <text:p text:style-name="P16">If attacking with two weapons at the same time, roll both damage dice and keep the single highest result.</text:p>
        <text:p text:style-name="P47">Blast</text:p>
        <text:p text:style-name="P32">Attacks with the <text:span text:style-name="T1">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47">Scars</text:p>
        <text:p text:style-name="P32">When damage to a PC reduces their HP to exactly 0, they are sometimes changed irrevocably. See the <text:span text:style-name="T1">Scars</text:span> for more.</text:p>
        <text:p text:style-name="P48">Critical Damage</text:p>
        <text:p text:style-name="P35">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P32">Any PC that suffers critical damage cannot do anything but crawl weakly, grasping for life. If given aid and rest, they will stabilize. If left untreated, they die within the hour.</text:p>
        <text:p text:style-name="P48"/>
        <text:p text:style-name="P49">Ability Score Loss</text:p>
        <text:p text:style-name="P32">If a PC’s STR is reduced to 0, they die. If their DEX is reduced to 0, they are paralyzed. If their WIL is reduced to 0, they are delirious.</text:p>
        <text:p text:style-name="P32">Complete DEX and WIL loss renders the character unable to act until they are restored through extended rest or by extraordinary means.</text:p>
        <text:p text:style-name="P47">Unconsciousness &amp; Death</text:p>
        <text:p text:style-name="P32">When a character dies, the player is free to create a new character or take control of a hireling. They immediately join the party in order to reduce downtime.</text:p>
        <text:p text:style-name="P47">Detachments</text:p>
        <text:p text:style-name="P32">Large groups of similar combatants fighting together are treated as a single <text:span text:style-name="T1">detachment</text:span>. When a detachment takes critical damage, it is routed or significantly weakened. When it reaches 0 STR, it is destroyed.</text:p>
        <text:p text:style-name="P32">Attacks against detachments by individuals are impaired (excluding blast damage).</text:p>
        <text:p text:style-name="P32">Attacks against individuals by detachments are enhanced and deal blast damage.</text:p>
        <text:p text:style-name="P47">Retreat</text:p>
        <text:p text:style-name="P32">Running away from a dire situation always requires a successful DEX save, as well as a safe destination to run to.</text:p>
        <text:p text:style-name="P53"/>
        <text:p text:style-name="P54"><text:soft-page-break/>Scars</text:p>
        <text:p text:style-name="P32">When an attack reduces a PC’s HP to exactly 0, they are uniquely impacted. Look up the result on the table below based on the total damage taken:</text:p>
        <text:list xml:id="list93344254996753" text:continue-list="list93344709432104" text:style-name="WWNum1029">
          <text:list-item text:start-value="1">
            <text:p text:style-name="P97"><text:span text:style-name="T1">Lasting Scar:</text:span> Roll 1d6 (1: Neck, 2: Hands, 3: Eye, 4: Chest, 5: Legs, 6: Ear). Roll 1d6. If the total is higher than your max HP, take the new result.</text:p>
          </text:list-item>
          <text:list-item>
            <text:p text:style-name="P97"><text:span text:style-name="T1">Rattling Blow:</text:span> You’re disoriented and shaken. Describe how you refocus. Roll 1d6. If the total is higher than your max HP, take the new result.</text:p>
          </text:list-item>
          <text:list-item>
            <text:p text:style-name="P97"><text:span text:style-name="T1">Walloped:</text:span> You’re sent flying and land flat on your face, winded. You are deprived until you rest for a few hours. Then, roll 1d6. Add that amount to your max HP.</text:p>
          </text:list-item>
          <text:list-item>
            <text:p text:style-name="P97"><text:span text:style-name="T1">Broken Limb:</text:span> Roll 1d6 (1-2: Leg, 3-4: Arm, 5: Rib, 6: Skull). Once mended, roll 2d6. If the total is higher than your max HP, take the new result.</text:p>
          </text:list-item>
          <text:list-item>
            <text:p text:style-name="P97"><text:span text:style-name="T1">Diseased:</text:span> You’re afflicted with a gross, uncomfortable infection. When you get over it, roll 2d6. If the total is higher than your max HP, take the new result.</text:p>
          </text:list-item>
          <text:list-item>
            <text:p text:style-name="P97"><text:span text:style-name="T1">Reorienting Head Wound:</text:span> Roll 1d6 (1-2: STR, 3-4: DEX, 5-6: WIL). Roll 3d6. If the total is higher than your current ability score, take the new result.</text:p>
          </text:list-item>
          <text:list-item>
            <text:p text:style-name="P97"><text:span text:style-name="T1">Hamstrung:</text:span> You can barely move until you get serious help and rest. After recovery, roll 3d6. If the total is higher than your max DEX, take the new result.</text:p>
          </text:list-item>
          <text:list-item>
            <text:p text:style-name="P97"><text:span text:style-name="T1">Deafened:</text:span> You cannot hear anything until you find extraordinary aid. Regardless, make a WIL save. If you pass, increase your max WIL by 1d4.</text:p>
          </text:list-item>
          <text:list-item>
            <text:p text:style-name="P97"><text:span text:style-name="T1">Re-brained:</text:span> Some hidden part of your psyche is knocked loose. Roll 3d6. If the total is higher than your max WIL, take the new result.</text:p>
          </text:list-item>
          <text:list-item>
            <text:p text:style-name="P97"><text:span text:style-name="T1">Sundered:</text:span> An appendage is torn off, crippled or useless. The Warden will tell you which. Then, make a WIL save. If you pass, increase your max WIL by 1d6.</text:p>
          </text:list-item>
          <text:list-item>
            <text:p text:style-name="P97"><text:span text:style-name="T1">Mortal Wound:</text:span> You are deprived and out of action. You die in one hour unless healed. Upon recovery, roll 2d6. Take the new result as your max HP.</text:p>
          </text:list-item>
          <text:list-item>
            <text:p text:style-name="P97"><text:span text:style-name="T1">Doomed:</text:span> Death seemed ever so close, but somehow you survived. If your next save against critical damage is a fail, you die horribly. If you pass, roll 3d6. If the total is higher than your max HP, take the new result.</text:p>
          </text:list-item>
        </text:list>
        <text:h text:style-name="P21" text:outline-level="1"/>
        <text:h text:style-name="P22" text:outline-level="1"><text:bookmark-start text:name="spells"/><text:soft-page-break/>100 Spells<text:bookmark-end text:name="spells"/></text:h>
        <text:list xml:id="list93344148031262" text:continue-list="list93344254996753" text:style-name="WWNum1034">
          <text:list-item text:start-value="1">
            <text:p text:style-name="P98"><text:span text:style-name="T1">Adhere:</text:span> An object is covered in extremely sticky slime.</text:p>
          </text:list-item>
          <text:list-item>
            <text:p text:style-name="P98"><text:span text:style-name="T1">Anchor:</text:span> A strong wire sprouts from your arms, affixing itself to two points within 50ft on each side.</text:p>
          </text:list-item>
          <text:list-item>
            <text:p text:style-name="P98"><text:span text:style-name="T1">Animate Object:</text:span> An object obeys your commands as best it can.</text:p>
          </text:list-item>
          <text:list-item>
            <text:p text:style-name="P98"><text:span text:style-name="T1">Anthropomorphize:</text:span> An animal either gains human intelligence or human appearance for one day.</text:p>
          </text:list-item>
          <text:list-item>
            <text:p text:style-name="P98"><text:span text:style-name="T1">Arcane Eye:</text:span> You can see through a magical floating eyeball that flies around at your command.</text:p>
          </text:list-item>
          <text:list-item>
            <text:p text:style-name="P98"><text:span text:style-name="T1">Astral Prison:</text:span> An object is frozen in time and space within an invulnerable crystal shell.</text:p>
          </text:list-item>
          <text:list-item>
            <text:p text:style-name="P98"><text:span text:style-name="T1">Attract:</text:span> Two objects are strongly magnetically attracted to each other if they come within 10 feet.</text:p>
          </text:list-item>
          <text:list-item>
            <text:p text:style-name="P98"><text:span text:style-name="T1">Auditory Illusion:</text:span> You create illusory sounds that seem to come from a direction of your choice.</text:p>
          </text:list-item>
          <text:list-item>
            <text:p text:style-name="P98"><text:span text:style-name="T1">Babble:</text:span> A creature must loudly and clearly repeat everything you think. It is otherwise mute.</text:p>
          </text:list-item>
          <text:list-item>
            <text:p text:style-name="P98"><text:span text:style-name="T1">Bait Flower:</text:span> A plant sprouts from the ground that emanates the smell of decaying flesh.</text:p>
          </text:list-item>
          <text:list-item>
            <text:p text:style-name="P98"><text:span text:style-name="T1">Beast Form:</text:span> You and your possessions transform into a mundane animal.</text:p>
          </text:list-item>
          <text:list-item>
            <text:p text:style-name="P98"><text:span text:style-name="T1">Befuddle:</text:span> A creature of your choice is unable to form new short-term memories for the duration of the spell.</text:p>
          </text:list-item>
          <text:list-item>
            <text:p text:style-name="P98"><text:span text:style-name="T1">Body Swap:</text:span> You switch bodies with a creature you touch. If one body dies, the other dies as well.</text:p>
          </text:list-item>
          <text:list-item>
            <text:p text:style-name="P98"><text:span text:style-name="T1">Charm:</text:span> A creature you can see treats you as a friend.</text:p>
          </text:list-item>
          <text:list-item>
            <text:p text:style-name="P98"><text:span text:style-name="T1">Command:</text:span> A target obeys a single three-word command that does not cause it harm.</text:p>
          </text:list-item>
          <text:list-item>
            <text:p text:style-name="P98"><text:span text:style-name="T1">Comprehend:</text:span> You become fluent in all languages for a short while.</text:p>
          </text:list-item>
          <text:list-item>
            <text:p text:style-name="P98"><text:span text:style-name="T1">Cone of Foam:</text:span> Dense foam sprays from your hand, coating the target.</text:p>
          </text:list-item>
          <text:list-item>
            <text:p text:style-name="P98"><text:span text:style-name="T1">Control Plants:</text:span> Nearby plants and trees obey you and gain the ability to move at a slow pace.</text:p>
          </text:list-item>
          <text:list-item>
            <text:p text:style-name="P98"><text:span text:style-name="T1">Control Weather:</text:span> You may alter the type of weather at will, but you do not otherwise control it.</text:p>
          </text:list-item>
          <text:list-item>
            <text:p text:style-name="P98"><text:span text:style-name="T1">Cure Wounds:</text:span> Restore 1d4 STR per day to a creature you can touch.</text:p>
          </text:list-item>
          <text:list-item>
            <text:p text:style-name="P98"><text:span text:style-name="T1">Deafen:</text:span> All nearby creatures are deafened.</text:p>
          </text:list-item>
          <text:list-item>
            <text:p text:style-name="P98"><text:span text:style-name="T1">Detect Magic:</text:span> You can see or hear nearby magical auras.</text:p>
          </text:list-item>
          <text:list-item>
            <text:p text:style-name="P98"><text:span text:style-name="T1">Disassemble:</text:span> Any of your body parts may be detached and reattached at will, without causing pain or damage. You can still control them.</text:p>
          </text:list-item>
          <text:list-item>
            <text:p text:style-name="P98"><text:span text:style-name="T1">Disguise:</text:span> You may alter the appearance of one character atwill as long as they remain humanoid. Attempts to duplicate other characters will seem uncanny.</text:p>
          </text:list-item>
          <text:list-item>
            <text:p text:style-name="P98"><text:span text:style-name="T1">Displace:</text:span> An object appears to be up to 15ft from its actual position.</text:p>
          </text:list-item>
          <text:list-item>
            <text:p text:style-name="P98"><text:span text:style-name="T1">Earthquake:</text:span> The ground begins shaking violently. Structures maybe damaged or collapse.</text:p>
          </text:list-item>
          <text:list-item>
            <text:p text:style-name="P98"><text:span text:style-name="T1">Elasticity:</text:span> Your body can stretch up to 10ft.</text:p>
          </text:list-item>
          <text:list-item>
            <text:p text:style-name="P98"><text:soft-page-break/><text:span text:style-name="T1">Elemental Wall:</text:span> A straight wall of ice or fire 50ft long and 10ft high rises from the ground.</text:p>
          </text:list-item>
          <text:list-item>
            <text:p text:style-name="P98"><text:span text:style-name="T1">Filch:</text:span> A visible item teleports to your hands.</text:p>
          </text:list-item>
          <text:list-item>
            <text:p text:style-name="P98"><text:span text:style-name="T1">Fish Lung:</text:span> A target can breathe underwater until they surface again. Smells strongly of the sea.</text:p>
          </text:list-item>
          <text:list-item>
            <text:p text:style-name="P98"><text:span text:style-name="T1">Flare:</text:span> A bright ball of energy fires a trail of light into the sky, revealing your location to friend or foe.</text:p>
          </text:list-item>
          <text:list-item>
            <text:p text:style-name="P98"><text:span text:style-name="T1">Fog Cloud:</text:span> A dense fog spreads out from you.</text:p>
          </text:list-item>
          <text:list-item>
            <text:p text:style-name="P98"><text:span text:style-name="T1">Frenzy:</text:span> A nearby creature erupts in a frenzy of violence.</text:p>
          </text:list-item>
          <text:list-item>
            <text:p text:style-name="P98"><text:span text:style-name="T1">Gate:</text:span> A portal to a random plane opens.</text:p>
          </text:list-item>
          <text:list-item>
            <text:p text:style-name="P98"><text:span text:style-name="T1">Gravity Shift:</text:span> You can change the direction of gravity, but only for yourself.</text:p>
          </text:list-item>
          <text:list-item>
            <text:p text:style-name="P98"><text:span text:style-name="T1">Greed:</text:span> A creature develops the overwhelming urge to possess a visible item of your choice.</text:p>
          </text:list-item>
          <text:list-item>
            <text:p text:style-name="P98"><text:span text:style-name="T1">Haste:</text:span> Your movement speed is tripled.</text:p>
          </text:list-item>
          <text:list-item>
            <text:p text:style-name="P98"><text:span text:style-name="T1">Hatred:</text:span> A creature develops a deep hatred of another creature or group and wishes to destroy them.</text:p>
          </text:list-item>
          <text:list-item>
            <text:p text:style-name="P98"><text:span text:style-name="T1">Hear Whispers:</text:span> You can hear faint sounds clearly.</text:p>
          </text:list-item>
          <text:list-item>
            <text:p text:style-name="P98"><text:span text:style-name="T1">Hover:</text:span> An object hovers, frictionless, 2ft above the ground. It can hold up to one humanoid.</text:p>
          </text:list-item>
          <text:list-item>
            <text:p text:style-name="P98"><text:span text:style-name="T1">Hypnotize:</text:span> A creature enters a trance and will truthfully answer one yes or no question you ask it.</text:p>
          </text:list-item>
          <text:list-item>
            <text:p text:style-name="P98"><text:span text:style-name="T1">Icy Touch:</text:span> A thick ice layer spreads across a touched surface, up to 10ft in radius.</text:p>
          </text:list-item>
          <text:list-item>
            <text:p text:style-name="P98"><text:span text:style-name="T1">Identify Owner:</text:span> Letters appear over the object you touch,spelling out the name of the object’s owners, if there are any.</text:p>
          </text:list-item>
          <text:list-item>
            <text:p text:style-name="P98"><text:span text:style-name="T1">Illuminate:</text:span> A floating light moves as you command. When held in light, the pages become a prism of vibrant rainbows.</text:p>
          </text:list-item>
          <text:list-item>
            <text:p text:style-name="P98"><text:span text:style-name="T1">Invisible Tether:</text:span> Two objects within 10ft of each other cannot be moved more than 10ft apart.</text:p>
          </text:list-item>
          <text:list-item>
            <text:p text:style-name="P98"><text:span text:style-name="T1">Knock:</text:span> A nearby mundane or magical lock unlocks loudly.</text:p>
          </text:list-item>
          <text:list-item>
            <text:p text:style-name="P98"><text:span text:style-name="T1">Leap:</text:span> You jump up to 10ft high, once.</text:p>
          </text:list-item>
          <text:list-item>
            <text:p text:style-name="P98"><text:span text:style-name="T1">Liquid Air:</text:span> The air around you becomes swimmable.</text:p>
          </text:list-item>
          <text:list-item>
            <text:p text:style-name="P98"><text:span text:style-name="T1">Magic Dampener:</text:span> All nearby magical effects have their effectiveness halved.</text:p>
          </text:list-item>
          <text:list-item>
            <text:p text:style-name="P98"><text:span text:style-name="T1">Manse:</text:span> A sturdy, furnished cottage appears for hours. You can permit and forbid entry to it at will.</text:p>
          </text:list-item>
          <text:list-item>
            <text:p text:style-name="P98"><text:span text:style-name="T1">Madness of Marbles:</text:span> Your pockets are full of marbles and will refill every 30 seconds.</text:p>
          </text:list-item>
          <text:list-item>
            <text:p text:style-name="P98"><text:span text:style-name="T1">Masquerade:</text:span> A character’s appearance and voice becomes identical to those of a character you touch.</text:p>
          </text:list-item>
          <text:list-item>
            <text:p text:style-name="P98"><text:span text:style-name="T1">Miniaturize:</text:span> A creature you touch is shrunk down to the size of a mouse.</text:p>
          </text:list-item>
          <text:list-item>
            <text:p text:style-name="P98"><text:span text:style-name="T1">Mirror Image:</text:span> An illusory duplicate of yourself appears and is under your control.</text:p>
          </text:list-item>
          <text:list-item>
            <text:p text:style-name="P98"><text:span text:style-name="T1">Mirrorwalk:</text:span> A mirror becomes a gateway to another mirror that you looked into today.</text:p>
          </text:list-item>
          <text:list-item>
            <text:p text:style-name="P98"><text:span text:style-name="T1">Multiarm:</text:span> You temporarily gain an extra arm.</text:p>
            <text:p text:style-name="P118"/>
          </text:list-item>
          <text:list-item>
            <text:p text:style-name="P99"><text:soft-page-break/><text:span text:style-name="T1">Night Sphere:</text:span> A 50ft-wide sphere of darkness displaying the night sky appears before you.</text:p>
          </text:list-item>
          <text:list-item>
            <text:p text:style-name="P98"><text:span text:style-name="T1">Objectify:</text:span> You become any inanimate object between the size ofa grand piano and an apple.</text:p>
          </text:list-item>
          <text:list-item>
            <text:p text:style-name="P98"><text:span text:style-name="T1">Ooze Form:</text:span> You become a living jelly.</text:p>
          </text:list-item>
          <text:list-item>
            <text:p text:style-name="P98"><text:span text:style-name="T1">Pacify:</text:span> A creature near you has an aversion to violence.</text:p>
          </text:list-item>
          <text:list-item>
            <text:p text:style-name="P98"><text:span text:style-name="T1">Passage:</text:span> Creates a temporary path through wood, stone or brick.</text:p>
          </text:list-item>
          <text:list-item>
            <text:p text:style-name="P98"><text:span text:style-name="T1">Phobia:</text:span> A nearby creature becomes terrified of an object of your choice.</text:p>
          </text:list-item>
          <text:list-item>
            <text:p text:style-name="P98"><text:span text:style-name="T1">Pit:</text:span> A pit 10ft wide and 10ft deep opens in the ground.</text:p>
          </text:list-item>
          <text:list-item>
            <text:p text:style-name="P98"><text:span text:style-name="T1">Primal Surge:</text:span> A creature rapidly evolves into a future version of its species.</text:p>
          </text:list-item>
          <text:list-item>
            <text:p text:style-name="P98"><text:span text:style-name="T1">Push/Pull:</text:span> An object of any size is pulled directly towards you or pushed directly away from you with the strength of one man.</text:p>
          </text:list-item>
          <text:list-item>
            <text:p text:style-name="P98"><text:span text:style-name="T1">Raise Dead:</text:span> A skeleton rises from the ground to serve you. They are incredibly stupid and can only obey simple orders.</text:p>
          </text:list-item>
          <text:list-item>
            <text:p text:style-name="P98"><text:span text:style-name="T1">Raise Spirit:</text:span> The spirit of a nearby corpse manifests and will answer 1 question.</text:p>
          </text:list-item>
          <text:list-item>
            <text:p text:style-name="P98"><text:span text:style-name="T1">Read Mind:</text:span> You can hear the surface thoughts of nearby creatures.</text:p>
          </text:list-item>
          <text:list-item>
            <text:p text:style-name="P98"><text:span text:style-name="T1">Repel:</text:span> Two objects are strongly magnetically repelled from each other within 10 feet.</text:p>
          </text:list-item>
          <text:list-item>
            <text:p text:style-name="P98"><text:span text:style-name="T1">Scry:</text:span> You can see through the eyes of a creature you touched earlier today.</text:p>
          </text:list-item>
          <text:list-item>
            <text:p text:style-name="P98"><text:span text:style-name="T1">Sculpt Elements:</text:span> Inanimate material behaves like clay in your hands.</text:p>
          </text:list-item>
          <text:list-item>
            <text:p text:style-name="P98"><text:span text:style-name="T1">Sense:</text:span> Choose one kind of object (key, gold, arrow, jug, etc). You can sense the nearest example.</text:p>
          </text:list-item>
          <text:list-item>
            <text:p text:style-name="P98"><text:span text:style-name="T1">Shield:</text:span> A creature you touch is protected from mundane attacks for one minute.</text:p>
          </text:list-item>
          <text:list-item>
            <text:p text:style-name="P98"><text:span text:style-name="T1">Shroud:</text:span> A creature you touch is invisible until they move.</text:p>
          </text:list-item>
          <text:list-item>
            <text:p text:style-name="P98"><text:span text:style-name="T1">Shuffle:</text:span> Two creatures you can see instantly switch places.</text:p>
          </text:list-item>
          <text:list-item>
            <text:p text:style-name="P98"><text:span text:style-name="T1">Skillful Repair:</text:span> You make minor repairs to a nonliving object.</text:p>
          </text:list-item>
          <text:list-item>
            <text:p text:style-name="P98"><text:span text:style-name="T1">Sleep:</text:span> A creature you can see falls into a light sleep.</text:p>
          </text:list-item>
          <text:list-item>
            <text:p text:style-name="P98"><text:span text:style-name="T1">Slick:</text:span> Every surface in a 30ft radius becomes extremely slippery.</text:p>
          </text:list-item>
          <text:list-item>
            <text:p text:style-name="P98"><text:span text:style-name="T1">Smoke Form:</text:span> Every surface in a 30ft radius becomes extremely slippery.</text:p>
          </text:list-item>
          <text:list-item>
            <text:p text:style-name="P98"><text:span text:style-name="T1">Sniff:</text:span> You can smell even the faintest traces of scents.</text:p>
          </text:list-item>
          <text:list-item>
            <text:p text:style-name="P98"><text:span text:style-name="T1">Snuff:</text:span> The source of any mundane light you can see is instantly snuffed out.</text:p>
          </text:list-item>
          <text:list-item>
            <text:p text:style-name="P98"><text:span text:style-name="T1">Sort:</text:span> Inanimate items sort themselves according to categories you set.</text:p>
          </text:list-item>
          <text:list-item>
            <text:p text:style-name="P98"><text:span text:style-name="T1">Spellsaw:</text:span> A whirling blade flies from your chest, clearing any plant material in its way. It is otherwise harmless.</text:p>
          </text:list-item>
          <text:list-item>
            <text:p text:style-name="P98"><text:span text:style-name="T1">Spider Climb:</text:span> You can climb surfaces like a spider.</text:p>
          </text:list-item>
          <text:list-item>
            <text:p text:style-name="P98"><text:span text:style-name="T1">Swarm:</text:span> You become a swarm of crows, rats, or piranhas. You can only be harmed by blast attacks.</text:p>
          </text:list-item>
          <text:list-item>
            <text:p text:style-name="P98"><text:span text:style-name="T1">Target Lure:</text:span> An object you touch becomes the target of any nearby spell.</text:p>
          </text:list-item>
          <text:list-item>
            <text:p text:style-name="P98"><text:soft-page-break/><text:span text:style-name="T1">Telekinesis:</text:span> You may mentally 1 move item under 60lbs. .</text:p>
          </text:list-item>
          <text:list-item>
            <text:p text:style-name="P98"><text:span text:style-name="T1">Telepathy:</text:span> Two creatures can hear each other’s thoughts, no matter how far apart.</text:p>
          </text:list-item>
          <text:list-item>
            <text:p text:style-name="P98"><text:span text:style-name="T1">Teleport:</text:span> An object or person you can see is transported from one place to another in a 50ft radius.</text:p>
          </text:list-item>
          <text:list-item>
            <text:p text:style-name="P98"><text:span text:style-name="T1">Thicket:</text:span> A thicket of trees and dense brush up to 50ft wide suddenly sprouts up.</text:p>
          </text:list-item>
          <text:list-item>
            <text:p text:style-name="P98"><text:span text:style-name="T1">Time Control:</text:span> Time in a 50ft bubble slows down or increases by 10% for 30 seconds.</text:p>
          </text:list-item>
          <text:list-item>
            <text:p text:style-name="P98"><text:span text:style-name="T1">True Sight:</text:span> You see through all nearby illusions.</text:p>
          </text:list-item>
          <text:list-item>
            <text:p text:style-name="P98"><text:span text:style-name="T1">Upwell:</text:span> A spring of seawater appears.</text:p>
          </text:list-item>
          <text:list-item>
            <text:p text:style-name="P98"><text:span text:style-name="T1">Vision:</text:span> You completely control what a creature sees.</text:p>
          </text:list-item>
          <text:list-item>
            <text:p text:style-name="P98"><text:span text:style-name="T1">Visual Illusion:</text:span> A silent, immobile, room-sized illusion of your choice appears.</text:p>
          </text:list-item>
          <text:list-item>
            <text:p text:style-name="P98"><text:span text:style-name="T1">Ward:</text:span> A silver circle 50ft across appears on the ground. Choose one species that cannot cross it.</text:p>
          </text:list-item>
          <text:list-item>
            <text:p text:style-name="P98"><text:span text:style-name="T1">Web:</text:span> Your wrists shoot thick webbing.</text:p>
          </text:list-item>
          <text:list-item>
            <text:p text:style-name="P98"><text:span text:style-name="T1">Widget:</text:span> A primitive version of a drawn tool or item appears before you and disappears after a short time.</text:p>
          </text:list-item>
          <text:list-item>
            <text:p text:style-name="P98"><text:span text:style-name="T1">Wizard Mark:</text:span> Your finger can shoot a stream of ulfire-colored paint. This paint is only visible to you and can be seen at any distance, even through solid objects.</text:p>
          </text:list-item>
          <text:list-item>
            <text:p text:style-name="P98"><text:span text:style-name="T1">X-Ray Vision:</text:span> You can see through walls, dirt, clothing, etc.</text:p>
          </text:list-item>
        </text:list>
        <text:h text:style-name="Heading_20_1" text:outline-level="1"><text:bookmark-start text:name="bestiary"/>Bestiary<text:bookmark-end text:name="bestiary"/></text:h>
        <text:p text:style-name="P19"><text:span text:style-name="T1">Bandit:</text:span> 4 HP, 11 STR, 14 DEX, 12 WIL, dagger (d6). Thieves who value wealth over all else. Use disguises, stealth, and trickery to surprise victims.</text:p>
        <text:p text:style-name="P32"><text:span text:style-name="T1">Basilisk:</text:span> 10 HP, 1 Armor, 12 STR, 13 DEX, 13 WIL, bite (d10). Long, serpentine lizards that nest deep below the earth or in brambles just underfoot. Gaze: A PC meeting the Basilisk’s gaze must make a WIL save or turn instantly to stone. Its reflection is harmless. Fighting a Basilisk without meeting its gaze is difficult (direct attacks are Impaired).</text:p>
        <text:p text:style-name="P32"><text:span text:style-name="T1">Bear:</text:span> 6 HP, 15 STR, 13 DEX, 5 WIL, claws (d8+d8), bite (d10). Aggressive, 9’ tall. <text:span text:style-name="T11">F</text:span>ound in mountains, woodlands, and prairies. They are not opposed to attacking the rare unfortunate to cross their path.</text:p>
        <text:p text:style-name="P32"><text:span text:style-name="T1">Creeping Vines</text:span> 8 HP, 10 STR, 12 DEX, 2 WIL, vines (d4, blast). Appear as an inert, typical vine. Attacks passing creatures to use their corpses as fertilizer. Critical Damage: Target is pulled into the air where they asphyxiate within a few minutes.</text:p>
        <text:p text:style-name="P32"><text:span text:style-name="T1">Demonic Knight:</text:span> 12 HP, 3 Armor, 16 STR, 8 DEX, 12 WIL, longsword (d10). Once holy warriors who fell to the temptation of dark powers they now serve in undeath. Rides nightmarish steeds into battle. Their evil aura frightens anyone who comes into melee range. Critical Damage: Everyone who sees the knight landing the blow is driven into bloodthirsty hatred.</text:p>
        <text:p text:style-name="P32"><text:soft-page-break/><text:span text:style-name="T1">Dragon, Red:</text:span> 18 HP, 3 Armor, 18 STR, 12 DEX, 16 WIL, bite (d12), detachment. Flaming titans of smoke and fire, boasting a greater wingspan than any of their brethren. Lair close to volcanos and lava flows. Immune to fire damage of any kind. Ice and water evaporate on contact. Fire Breath: Deals 8 STR damage to anyone nearby, destroying all mundane armor it touches in the process.</text:p>
        <text:p text:style-name="P32"><text:span text:style-name="T1">Dryad:</text:span> 4 HP, 14 WIL, unarmed (d4). Shy, peaceful tree spirits whose manifest in a beautiful female form. Spiritually bound with a tree, may disappear by joining with the tree again. Can’t go too far away from it and dies if the tree is destroyed. Charm strangers that come near. Charmed creatures mindlessly walk into the tree, disappearing forever if not rescued quickly.</text:p>
        <text:p text:style-name="P32"><text:span text:style-name="T1">Elemental, Earth:</text:span> 12 HP, 3 Armor, 16 STR, 6 DEX, fists (d12). Huge humanoid beings made of earth and stone. Create constant earth tremors with their presence. Can meld into the earth and move through it as if swimming.</text:p>
        <text:p text:style-name="P32"><text:span text:style-name="T1">Elemental, Fire:</text:span> 16 HP, 12 DEX, 14 WIL, flare (d10, Blast). Living columns of pure flame that burn everything in their path. Highly vulnerable to being touched by water or rain. Can scatter their flames, freely changing its form.</text:p>
        <text:p text:style-name="P37"><text:span text:style-name="T1">Elf, Frost:</text:span> 14 HP, 1 Armor, 8 STR, 13 DEX, 14 WIL, icicle dagger (d6), a Spellbook (Choose one: Sleep, Teleport, Detect Magic). Beautiful, amoral, and long-lived. Resistant to most forms of magic.</text:p>
        <text:p text:style-name="P32"><text:span text:style-name="T1">Gargoyle:</text:span> 8 HP, 3 Armor, 14 STR, 6 DEX, 12 WIL, claws (d8+d6). Magical creatures that look like monstrous, horned, winged statues. Guard places by standing still to pass like inanimate statues and attacking what comes near. Cannot be charmed and put to sleep.</text:p>
        <text:p text:style-name="P30"><text:span text:style-name="T1">Gelatinous Cube:</text:span> 8 HP, 15 STR, 6 DEX, 3 WIL, devouring touch (d8). Large cubes of transparent jelly, dwell in dungeons absorbing items and living creatures. Difficult to be detected due to being transparent. Critical Damage: The target is engulfed into the cube and keeps being absorbed.</text:p>
        <text:p text:style-name="P30"><text:span text:style-name="T1">Ghost:</text:span> 8 HP, 15 WIL, cold touch (d4). Incorporeal spirits of the restless dead. Avoids direct confrontation, instead it quietly posesses a target and acts through them when possible. Immune to most forms of damage, only susceptible to magic and holy water. Possession: One target must save WIL or be possessed, being controlled by the ghost until it’s somehow driven off.</text:p>
        <text:p text:style-name="P30"><text:span text:style-name="T1">Ghoul:</text:span> 6 HP, 14 STR, 3 WIL, elongated claws jagged teeth (d8+d6). Grey-skinned man-things wearing shredded clothes, hunkering over the ground. Craves the flesh of the living, as it grows only more powerful with each victim. Critical Damage: target is paralyzed. The wound turns fatal in a day if not treated by a priest or skilled healer. If not burned, the body will rise as a Ghoul.</text:p>
        <text:p text:style-name="P30"><text:soft-page-break/><text:span text:style-name="T1">Giant, Frost:</text:span> 14 HP, 2 Armor, 18 STR, 12 WIL, greataxe (d12+d10) or longbow (d12). 18’ tall humanoids with blue-ish skin and pale hair. Wear furs and iron Armor. Unharmed by cold and ice. Excellent trackers, hunt accompanied by dire wolves.</text:p>
        <text:p text:style-name="P30"><text:span text:style-name="T1">Goblin:</text:span> 4 HP, 8 STR, 12 DEX, 8 WIL, dagger (d6) or sling (d4). Small, grotesque humanoids with skin in earthly tones of green, brown, and grey. Avoid combat, only attacking when in advantage, using hit-and-run tactics. Sometimes are found using dire wolves as mounts.</text:p>
        <text:p text:style-name="P37"><text:span text:style-name="T1">Hawk, Giant:</text:span> 10 HP, 8 STR, 15 DEX, 8 WIL, talons and beak (d8+d6). Large birds of prey, the size of a wolf. Can carry animals up to their size. Hunt animals that they can carry, but might attack humans or greater prey if despaired. Surprise their victims by diving to attack from a great height. Can supposedly be trained to be hunting companions.</text:p>
        <text:p text:style-name="P37"><text:span text:style-name="T1">Hooded Men:</text:span> 12 HP, 9 STR, 12 DEX, 14 WIL, leystaff (d8), a Spellbook (Choose one: Charm, Hypnotize, Push/Pull, Shield). The Watchers of the Wood; a cult that derive their power from leylines, rune stones, and the like. Critical damage: leech a part of the victim’s soul (1d4 WIL damage).</text:p>
        <text:p text:style-name="P30"><text:span text:style-name="T1">Mimic:</text:span> 9 HP, 2 Armor, 13 STR, 12 WIL, bite (d12). Monstrous shape-shifters that take on the form of inanimate objects made of wood and stone. Found only underground. Remain motionless (generally in the form of chests or doors), devouring anything that touches it. The mimic’s saliva is extremely sticky, taking great strength to remove something from its mouth once glued.</text:p>
        <text:p text:style-name="P32"><text:span text:style-name="T1">Minotaur:</text:span> 12 HP, 1 Armor, 16 STR, 8 WIL, axe (d10) or horns (d6+d6). A large, muscular humanoid with the head of a bull. Generally lair in a maze or dungeon, making the whole place it’s territory. Notably strong, is able to easily break stone, which it uses to alter the environment and separate its foes to kill then one by one. If the minotaur succeeds in a Critical Damage save, it is driven into a bloodthirsty state, enhancing all its attacks and impairing all attacks against it. Only stops when killed or if it no longer sees any foe.</text:p>
        <text:p text:style-name="P32"><text:span text:style-name="T1">Octopus, Giant:</text:span> 8 HP, 14 STR, 8 WIL, tentacles (d6, Blast). Large, eight-armed saltwater creatures. Dwell nearby warm coasts. Can attack up to 8 nearby creatures. When threatened, spills a thick cloud of ink and quickly swims away.</text:p>
        <text:p text:style-name="P32"><text:span text:style-name="T1">Ogre:</text:span> 6 HP, 1 Armor, 16 STR, 8 DEX, 6 WIL, club (d10). 10’ tall brute humanoids dressed in animal hides. Mostly live in caves. Mostly antisocial, drive away any other beings from nearby its lair. Easily impressed by shiny materials, carry sacks full of coins with them.</text:p>
        <text:p text:style-name="P32"><text:span text:style-name="T1">Skeleton:</text:span> 5 HP, 1 Armor, 13 DEX, rusty sword (d6). If a skeleton is killed and its bones are not scattered, it reforms.</text:p>
        <text:p text:style-name="P47"/>
        <text:p text:style-name="P14"><text:soft-page-break/><text:span text:style-name="T1">Wolf:</text:span> 6 HP, 12 STR, 14 DEX, bite (d8). Large canines that dwell primarily in wildlands, but occasionally lair in caves. Can be trained like dogs if captured young. When found in packs of at least 4, wolfs never fail morale saves.</text:p>
        <text:p text:style-name="P32"><text:span text:style-name="T1">Wolf, Dire:</text:span> 8 HP, 14 STR, 12 DEX, bite (d10). Horse-sized, semi-intelligent wolves. Highly territorial, live in forests or mountains and ferociously guard its surroundings. Regular wolves are scared of them, but will fight alongside them against invaders. Can be trained like dogs if captured young, but it’s a extremely difficult challenging.</text:p>
        <text:p text:style-name="P36"><text:span text:style-name="T1">Wood Troll:</text:span> 12 HP, 15 STR, 12 DEX, 7 WIL, claws and bite (d8+d8 blast). As an action, can recover lost HP. Critical damage: moss and twigs begin growing out of target’s wounds.</text:p>
        <text:p text:style-name="P32"><text:span text:style-name="T1">Wyvern:</text:span> 7 HP, 14 DEX, bite (d8+d8) or poisonous sting (d6). Winged, two-legged, reptilian monsters with a long tail tipped with a venomous sting. Dwell in any terrain, but favor dry cliffs. Shy away from other creatures, but attacks anything that comes in the victiny of its nest. Critical Damage: The deadly poison permanently debilitates the target, reducing its maximum STR to the current value.</text:p>
        <text:p text:style-name="P32"><text:span text:style-name="T1">Zombie:</text:span> 6 HP, 6 DEX, 3 WIL, rusted weapon (d6). Slow, mindless re-animated corpses. Created by wicked wizards to serve as guardians in hordes. Simply attacks anything that comes nearby. Cannot be affected by anything that targets the mind.</text:p>
        <text:h text:style-name="P15" text:outline-level="2"><text:bookmark-start text:name="creating-monsters"/>Creating Monsters<text:bookmark-end text:name="creating-monsters"/></text:h>
        <text:p text:style-name="P19">Use the following template to model any more sophisticated Monster or NPC:</text:p>
        <text:p text:style-name="P57">Name:</text:p>
        <text:p text:style-name="P38">X HP, X Armor, X STR, X DEX, X WIL, Weapon (dX, special items, qualities)</text:p>
        <text:list xml:id="list93344400051202" text:continue-list="list93343688326458" text:style-name="WWNum1030">
          <text:list-item>
            <text:p text:style-name="P100">Engaging descriptor of appearance or demeanor</text:p>
          </text:list-item>
          <text:list-item>
            <text:p text:style-name="P100">Quirk, tactic, or peculiarity making this NPC unique</text:p>
          </text:list-item>
          <text:list-item>
            <text:p text:style-name="P100">Special effect or critical damage consequence</text:p>
          </text:list-item>
        </text:list>
        <text:p text:style-name="P39">General Principles</text:p>
        <text:p text:style-name="P32">Ability Scores: 3 is deficient, 6 is weak, 10 is average, 14 is noteworthy, and 18 is legendary. Adjust as necessary.</text:p>
        <text:list xml:id="list93343983655045" text:continue-list="list93344400051202" text:style-name="WWNum1031">
          <text:list-item>
            <text:p text:style-name="P101">Give average creatures 3 HP, give hardy ones 6 HP, and serious threats get 10+ HP.</text:p>
          </text:list-item>
          <text:list-item>
            <text:p text:style-name="P101">Use flavor and style to help them stand out. Players will remember a pig-faced humanoid looking for his missing sheep more easily than a generic goblin archer.</text:p>
          </text:list-item>
          <text:list-item>
            <text:p text:style-name="P101">Use critical damage to lean into the threat or strangeness of any aggressive NPC.</text:p>
          </text:list-item>
          <text:list-item>
            <text:p text:style-name="P101">Remember that HP is <text:span text:style-name="T1">Hit Protection</text:span> , not Hit Points. It’s a measure of resilience, luck, and gumption - not health.</text:p>
          </text:list-item>
        </text:list>
        <text:p text:style-name="P56">Converting from OSR Games</text:p>
        <text:list xml:id="list93343645573727" text:continue-list="list93343983655045" text:style-name="WWNum1032">
          <text:list-item>
            <text:p text:style-name="P102">Give 1 HP per HD for most creatures.</text:p>
          </text:list-item>
          <text:list-item>
            <text:p text:style-name="P102">Most humanoids have at least 4HP.</text:p>
          </text:list-item>
          <text:list-item>
            <text:p text:style-name="P102"><text:span text:style-name="T1">Morale</text:span> can also be used as a baseline.</text:p>
          </text:list-item>
        </text:list>
        <text:p text:style-name="P19"><text:soft-page-break/>Some pointers:</text:p>
        <text:list xml:id="list93343499103317" text:continue-list="list93343645573727" text:style-name="WWNum1033">
          <text:list-item>
            <text:p text:style-name="P103">Is it good at avoiding a hit? Give it HP.</text:p>
          </text:list-item>
          <text:list-item>
            <text:p text:style-name="P103">Does it soak up damage? Give it Armor.</text:p>
          </text:list-item>
          <text:list-item>
            <text:p text:style-name="P103">Is it strong? Give it a high <text:span text:style-name="T1">STR</text:span>.</text:p>
          </text:list-item>
          <text:list-item>
            <text:p text:style-name="P103">Is it nimble? Give it high <text:span text:style-name="T1">DEX</text:span>.</text:p>
          </text:list-item>
          <text:list-item>
            <text:p text:style-name="P103">Is it charismatic? Give it high WIL.</text:p>
          </text:list-item>
        </text:list>
        <text:p text:style-name="P19">Damage die are roughly the same, though armed attacks do at least 1d6 damage.</text:p>
        <text:h text:style-name="P61" text:outline-level="1"><text:bookmark-start text:name="ancestries"/>O<text:bookmark-end text:name="ancestries"/>ptional Rules</text:h>
        <text:h text:style-name="P23" text:outline-level="1">Advantage &amp; Disadvantage</text:h>
        <text:p text:style-name="P24"/>
        <text:p text:style-name="P24">A Warden has the option of modifying the difficulty of saves using <text:span text:style-name="T2">Advantage</text:span> (where a character rolls two d20 and uses the higher roll) or <text:span text:style-name="T2">Disadvantage</text:span> (where a character rolls two d20 and uses the lower roll).</text:p>
        <text:h text:style-name="P23" text:outline-level="1"/>
        <text:h text:style-name="P23" text:outline-level="1">Ancestries</text:h>
        <text:p text:style-name="P39">Dwellers of the Underground</text:p>
        <text:list xml:id="list93343692436369" text:continue-list="list93343499103317" text:style-name="WWNum1035">
          <text:list-item>
            <text:p text:style-name="P104">Darkvision: Perfect vision in low-light, somewhat blinded by bright lights.</text:p>
          </text:list-item>
          <text:list-item>
            <text:p text:style-name="P104">Earthhardy: You are tougher than sun-dwellers, often recovering from injuries or poison thought to be lethal.</text:p>
          </text:list-item>
        </text:list>
        <text:p text:style-name="P39"/>
        <text:p text:style-name="P51">Fair Folk</text:p>
        <text:list xml:id="list93344724455339" text:continue-list="list93343692436369" text:style-name="WWNum1036">
          <text:list-item>
            <text:p text:style-name="P105">Magic-Sense: You can tell when arcane energies are at work.</text:p>
          </text:list-item>
          <text:list-item>
            <text:p text:style-name="P105">Third Eye: You cannot be fooled by magical illusions, save those created by one of your own.</text:p>
          </text:list-item>
        </text:list>
        <text:p text:style-name="P39">Smallfolk</text:p>
        <text:list xml:id="list93343356444852" text:continue-list="list93344724455339" text:style-name="WWNum1037">
          <text:list-item>
            <text:p text:style-name="P106">Easily Missed: Enemies tend to ignore you, going for the bigger targets first or ignoring you altogether.</text:p>
          </text:list-item>
          <text:list-item>
            <text:p text:style-name="P106">Quicksilver: Escaping sudden capture or a killing blow is like second nature to you. Sneaking comes naturally, too.</text:p>
          </text:list-item>
        </text:list>
        <text:p text:style-name="P39">Greenskin</text:p>
        <text:list xml:id="list93344095539251" text:continue-list="list93343356444852" text:style-name="WWNum1038">
          <text:list-item>
            <text:p text:style-name="P107">Blood Brothers: If any fellow adventurers go first in battle, then you also go first.</text:p>
          </text:list-item>
          <text:list-item>
            <text:p text:style-name="P107">Battle Fury: Once per encounter you may perform an Enhanced blast attack.</text:p>
          </text:list-item>
        </text:list>
        <text:p text:style-name="P39">Humankind</text:p>
        <text:list xml:id="list93342820351528" text:continue-list="list93344095539251" text:style-name="WWNum1039">
          <text:list-item>
            <text:p text:style-name="P108">Eclectic: Humans are many and varied. Select an additional background.</text:p>
          </text:list-item>
          <text:list-item>
            <text:p text:style-name="P108">Aggressive Opportunist: Once per encounter, you can re-roll a damage roll.</text:p>
          </text:list-item>
        </text:list>
        <text:h text:style-name="P25" text:outline-level="1"/>
        <text:h text:style-name="P12" text:outline-level="1"><text:bookmark-start text:name="classic-classes"/><text:soft-page-break/>Classic Classes<text:bookmark-end text:name="classic-classes"/></text:h>
        <text:p text:style-name="P19">Classic Classes is by Danger is Real and licensed under CC-BY-SA 4.0 (dangerisreal.itch.io/ classic-classes-for-cairn)</text:p>
        <text:h text:style-name="P26" text:outline-level="2"><text:bookmark-start text:name="fighter"/>Fighter<text:bookmark-end text:name="fighter"/></text:h>
        <text:p text:style-name="P19">You are the Mercenary, the Barbarian, the Gladiator, The Knight. You are the master of the arts of combat and warfare</text:p>
        <text:list xml:id="list93344461062151" text:continue-list="list93342820351528" text:style-name="WWNum1040">
          <text:list-item>
            <text:p text:style-name="P119"><text:span text:style-name="T2">Mercenary:</text:span> You have a contact you can turn to in almost every city. They aren’t always happy to see you, though. Men blindly follow you in battle (they always pass morale saves).</text:p>
          </text:list-item>
          <text:list-item>
            <text:p text:style-name="P119"><text:span text:style-name="T2">Barbarian:</text:span> Your place is in the wilderness, you despise civilization and fear magic. You drink blood like ale, regain 1d3 HP when you kill or CD an enemy. Your battle rage is so strong that you can harm creatures immune to mundane damage.</text:p>
          </text:list-item>
          <text:list-item>
            <text:p text:style-name="P119"><text:span text:style-name="T2">Gladiator:</text:span> Your favorite weapon is an extension of you (your attacks are enhanced). You are a trained merciless killer. Your reputation is not always serving you and your former master is probably looking for you.</text:p>
          </text:list-item>
          <text:list-item>
            <text:p text:style-name="P119"><text:span text:style-name="T2">Knight:</text:span> Your rank gives you credibility with the nobles. The peasantry will generally follow you into dangerous situations without <text:span text:style-name="T8">any </text:span>the slightest hesitation. However if you fail them somehow, they may strip you of your rank. You are also a skilled horseman, your mounted attacks are enhanced.</text:p>
          </text:list-item>
        </text:list>
        <text:p text:style-name="P46">Character creation</text:p>
        <text:list xml:id="list93343002993083" text:continue-list="list93344461062151" text:style-name="WWNum1041">
          <text:list-item>
            <text:p text:style-name="P109">Start with 1d4+2 HP.</text:p>
          </text:list-item>
          <text:list-item>
            <text:p text:style-name="P109">Swirl: do a Blast attack and gain 1 Fatigue.</text:p>
          </text:list-item>
          <text:list-item>
            <text:p text:style-name="P109">Death Storm: when you kill or CD an enemy you can attack again.</text:p>
          </text:list-item>
        </text:list>
        <text:p text:style-name="P46">Starting Gear</text:p>
        <text:list xml:id="list93343271836505" text:continue-list="list93343002993083" text:style-name="WWNum1042">
          <text:list-item>
            <text:p text:style-name="P110">Roll 1d10+10 on the Armor Table.</text:p>
          </text:list-item>
          <text:list-item>
            <text:p text:style-name="P110">Roll 1d10+10 on the Helmets and Shields Table.</text:p>
          </text:list-item>
          <text:list-item>
            <text:p text:style-name="P110">Roll for Weapons and choose a second one.</text:p>
          </text:list-item>
          <text:list-item>
            <text:p text:style-name="P110">Roll the rest as usual.</text:p>
          </text:list-item>
        </text:list>
        <text:h text:style-name="P26" text:outline-level="2"><text:bookmark-start text:name="cleric"/>Cleric<text:bookmark-end text:name="cleric"/></text:h>
        <text:p text:style-name="P19">You are the Priest, the Druid, the Paladin. You are a faithful servant of your deity. Battle ready to channel the power of your cult.</text:p>
        <text:list xml:id="list93344801733110" text:continue-list="list93343271836505" text:style-name="WWNum1043">
          <text:list-item>
            <text:p text:style-name="P120"><text:span text:style-name="T2">Priest:</text:span> You always find help and resources in the temple of your deity but stay in line with the dogma of your religion or be disfavored. You can invoke the divine power, brandishing your holy symbol, to repel undead (creatures Save WIL to resist).</text:p>
          </text:list-item>
          <text:list-item>
            <text:p text:style-name="P120"><text:span text:style-name="T2">Druid:</text:span> You belong to the wild lands and feel uncomfortable in cities. You worship the elements and the old bestial deities. You can communicate with animals and always find resources in the wilderness. You can shape-shift into your totem animal (get 1 Fatigue when you shift back).</text:p>
          </text:list-item>
          <text:list-item>
            <text:p text:style-name="P120"><text:soft-page-break/><text:span text:style-name="T2">Paladin:</text:span> As a sacred warrior of your faith you will be obeyed by zealots. Priests will favor you but if you step out of the line you will fall in disgrace. You dedicate your life to the cult and sworn vow of humility (you should not hoard treasures). Once per day you can Lay on Hands on someone to cure disease, poison or heal 1d6 STR.</text:p>
          </text:list-item>
        </text:list>
        <text:p text:style-name="P46">Character creation</text:p>
        <text:list xml:id="list93344059620320" text:continue-list="list93344801733110" text:style-name="WWNum1044">
          <text:list-item>
            <text:p text:style-name="P111">Salvation Grace: heal 1D6 to any abilities but you became Deprived.</text:p>
          </text:list-item>
          <text:list-item>
            <text:p text:style-name="P111">Miracles: you can choose 3 spells related to your religion to cast without Spellbooks while holding your holy symbol.</text:p>
          </text:list-item>
        </text:list>
        <text:p text:style-name="P46">Starting Gear</text:p>
        <text:list xml:id="list93343378819476" text:continue-list="list93344059620320" text:style-name="WWNum1045">
          <text:list-item>
            <text:p text:style-name="P112">You start with a holy symbol from your deity.</text:p>
          </text:list-item>
          <text:list-item>
            <text:p text:style-name="P112">Roll 1d12+8 on the Armor Table.</text:p>
          </text:list-item>
          <text:list-item>
            <text:p text:style-name="P112">Roll 1d12+8 on the Helmets and Shields Table.</text:p>
          </text:list-item>
          <text:list-item>
            <text:p text:style-name="P112">Roll the rest as usual.</text:p>
          </text:list-item>
        </text:list>
        <text:p text:style-name="P39">d20 Cleric Spells</text:p>
        <text:list xml:id="list93343394076073" text:continue-list="list93344148031262" text:style-name="WWNum1046">
          <text:list-item text:start-value="1">
            <text:p text:style-name="P113"><text:span text:style-name="T2">Blessing:</text:span> Target’s attacks are enhanced and non-Blast attacks are impaired against them until they next take damage.</text:p>
          </text:list-item>
          <text:list-item>
            <text:p text:style-name="P113"><text:span text:style-name="T2">Cure-All:</text:span> A single illness or disease dissipates at your touch.</text:p>
          </text:list-item>
          <text:list-item>
            <text:p text:style-name="P113"><text:span text:style-name="T2">Curse Unlife:</text:span> Deals 1d4+2 STR loss to one undead, ignoring armor and resistances.</text:p>
          </text:list-item>
          <text:list-item>
            <text:p text:style-name="P114"><text:span text:style-name="T2">Fortify:</text:span> Damage from heat, ice, acid or electricity are impaired against a target for the next hour.</text:p>
          </text:list-item>
          <text:list-item>
            <text:p text:style-name="P113"><text:span text:style-name="T2">Healing Grace:</text:span> A target heals 1d6 STR, and you become deprived until you take the time to mediate, pray or sleep.</text:p>
          </text:list-item>
          <text:list-item>
            <text:p text:style-name="P113"><text:span text:style-name="T2">Induce Despair:</text:span> Target must pass a WIL save or its attacks are impaired.</text:p>
          </text:list-item>
          <text:list-item>
            <text:p text:style-name="P113"><text:span text:style-name="T2">Lichsense:</text:span> You feel any undead within 60ft. WIL save to avoid detection by intelligent undead.</text:p>
          </text:list-item>
          <text:list-item>
            <text:p text:style-name="P113"><text:span text:style-name="T2">Light Show:</text:span> You control a dazzling display of light and color.</text:p>
          </text:list-item>
          <text:list-item>
            <text:p text:style-name="P113"><text:span text:style-name="T2">Linguist:</text:span> For the next hour you can speak and understand any mundane language.</text:p>
          </text:list-item>
          <text:list-item>
            <text:p text:style-name="P113"><text:span text:style-name="T2">Magic Seal:</text:span> Magically locks a door, portal or chest.</text:p>
          </text:list-item>
          <text:list-item>
            <text:p text:style-name="P113"><text:span text:style-name="T2">Master Undead:</text:span> Undead creatures obey your command. Intelligent undead make a WIL save.</text:p>
          </text:list-item>
          <text:list-item>
            <text:p text:style-name="P113"><text:span text:style-name="T2">Otherworldly Gate:</text:span> Opens a portal to another reality. It works in both directions.</text:p>
          </text:list-item>
          <text:list-item>
            <text:p text:style-name="P113"><text:span text:style-name="T2">Passage:</text:span> Creates a temporary path through wood, stone or brick.</text:p>
          </text:list-item>
          <text:list-item>
            <text:p text:style-name="P113"><text:span text:style-name="T2">Perfect Preservation:</text:span> A weapon you touch becomes immune to wear, mundane damage or elemental effects. The spell wears off after a day.</text:p>
          </text:list-item>
          <text:list-item>
            <text:p text:style-name="P113"><text:span text:style-name="T2">Planar Anchor:</text:span> Binds an extraplanar creature to your will until it performs a task specific task, after which they must pass a WIL save to escape (good luck).</text:p>
          </text:list-item>
          <text:list-item>
            <text:p text:style-name="P114"><text:span text:style-name="T2">Ravenless Message:</text:span> You send a short message 1 mile that anyone along its path can hear.</text:p>
          </text:list-item>
          <text:list-item>
            <text:p text:style-name="P113"><text:soft-page-break/><text:span text:style-name="T2">Scrying Ward:</text:span> For 24 hours you become aware of any magical eavesdropping.</text:p>
          </text:list-item>
          <text:list-item>
            <text:p text:style-name="P113"><text:span text:style-name="T2">Song of Repose:</text:span> Target falls into a deep slumber.</text:p>
          </text:list-item>
          <text:list-item>
            <text:p text:style-name="P113"><text:span text:style-name="T2">Uncurse:</text:span> A person or object you touch is freed from a curse or nefarious spell.</text:p>
          </text:list-item>
          <text:list-item>
            <text:p text:style-name="P113"><text:span text:style-name="T2">Word of Pain:</text:span> A single phrase from your lips does 1d12 blast damage. Affected targets are also deafened.</text:p>
          </text:list-item>
        </text:list>
        <text:h text:style-name="P26" text:outline-level="2"><text:bookmark-start text:name="magic-user"/>Magic-User<text:bookmark-end text:name="magic-user"/></text:h>
        <text:p text:style-name="P19">You are the Wizard, the Necromancer, the Elementalist, the Enchanter. You are the scholar of the arcane, you handle spells and magic like no one else.</text:p>
        <text:list xml:id="list93344505055004" text:continue-list="list93343378819476" text:style-name="WWNum1047">
          <text:list-item>
            <text:p text:style-name="P121"><text:span text:style-name="T2">Wizard:</text:span> You have spent time in magic school and libraries, Your knowledge is broad and you often now something about old and forgotten things. You have a small magic creature as Familiar. You can communicate with it telepathically as long as you can see it. If it dies it can be re-summoned during an 8 hours ritual, you end up Deprived.</text:p>
          </text:list-item>
          <text:list-item>
            <text:p text:style-name="P121"><text:span text:style-name="T2">Necromancer:</text:span> You manipulate the forces of life and death and have a sick attraction for undead creatures. You will be despised, banished or imprisoned in most settlements. You can speak with recently deceased corpses, they will talk to you like a friend. Get 1 Fatigue at the end of the conversation.</text:p>
            <text:p text:style-name="P126"/>
          </text:list-item>
          <text:list-item>
            <text:p text:style-name="P122"><text:span text:style-name="T2">Elementalist:</text:span> You summon the forces of the four elements: Water, Earth, Fire and Air. You choose one element: You always have 3 Armor against it and your attack spells based on it are enhanced.</text:p>
          </text:list-item>
          <text:list-item>
            <text:p text:style-name="P121"><text:span text:style-name="T2">Enchanter:</text:span> You have sharpened your magic ability to seduce and charm mundane creatures with your words. You can hypnotize an intelligent creature by holding a trinket and speaking directly to him/her. The creature is dazed and confused until a WIL Save is passed.</text:p>
          </text:list-item>
        </text:list>
        <text:p text:style-name="P39">Character creation</text:p>
        <text:list xml:id="list93343358932307" text:continue-list="list93344505055004" text:style-name="WWNum1048">
          <text:list-item>
            <text:p text:style-name="P123">Grimoire (Bulky). This is the fruit of your research and your most precious belongings (only you can decipher it). You can spend four hours to copy a standard Spellbook into your Grimoire followed by a successful WIL Save. During this process the original Spellbook is destroyed. Scrolls cannot be copied.</text:p>
          </text:list-item>
          <text:list-item>
            <text:p text:style-name="P123">You are not comfortable wearing bulky armor. Spell casting wearing one will cost 2 Fatigue.</text:p>
          </text:list-item>
        </text:list>
        <text:p text:style-name="P39">Starting Gear</text:p>
        <text:list xml:id="list93343460750500" text:continue-list="list93343358932307" text:style-name="WWNum1049">
          <text:list-item>
            <text:p text:style-name="P115">You start with your Grimoire with a random spell inscribed.</text:p>
          </text:list-item>
          <text:list-item>
            <text:p text:style-name="P115">Roll 1d6 on the Armor Table.</text:p>
          </text:list-item>
          <text:list-item>
            <text:p text:style-name="P115">Don’t roll on the Helmets and Shields Table.</text:p>
          </text:list-item>
          <text:list-item>
            <text:p text:style-name="P115">Roll the rest as usual.</text:p>
          </text:list-item>
        </text:list>
        <text:h text:style-name="P26" text:outline-level="2"><text:bookmark-start text:name="thief"/><text:soft-page-break/>Thief<text:bookmark-end text:name="thief"/></text:h>
        <text:p text:style-name="P19">You are the Rogue, the Assassin, the Ranger, the Tomb Robber. You are the master of stealth, acrobatics and deception.</text:p>
        <text:list xml:id="list93344077306929" text:continue-list="list93343460750500" text:style-name="WWNum1050">
          <text:list-item>
            <text:p text:style-name="P124"><text:span text:style-name="T2">Rogue:</text:span> The larcenous arts are your way of living, you have contacts with the mob in most cities, You always hear the best rumors and nice job proposals. You get cheap equipment from selected shops. Nevertheless, Your reputation will not help you with the authorities and you probably “wanted” somewhere. You know how to cut a purse and you have learned the mysteries of lock-picking. As accomplished burglars you can attempt to climb unthinkable sheer surfaces.</text:p>
          </text:list-item>
          <text:list-item>
            <text:p text:style-name="P124"><text:span text:style-name="T2">Assassin:</text:span> You have learned many ways of killing, you are a deadly shadow. You still owe your mentors, probably a guild, and beware of the day they will hold you accountable. With the right ingredients you can brew all kinds of poison. With some observations and study you can create disguises that will fool detailed scrutiny.</text:p>
          </text:list-item>
        </text:list>
        <text:p text:style-name="P59"/>
        <text:list xml:id="list93342928617375" text:continue-numbering="true" text:style-name="WWNum1050">
          <text:list-item>
            <text:p text:style-name="P125"><text:span text:style-name="T2">Ranger:</text:span> You are a protector of nature, you are a wilderness survival expert and you know how to travel fast and unnoticed. Always aware, you are rarely surprised. You have a semi intelligent faithful pet of your choice. You have a deep connection with him/her and you will always protect each other. Your pet will always find you back but if it dies you will need to raise a cub.</text:p>
          </text:list-item>
          <text:list-item>
            <text:p text:style-name="P124"><text:span text:style-name="T2">Tomb Robber:</text:span> You are stealing things from the dead, they don’t need it after all. <text:span text:style-name="T10">\</text:span>You are a specialist of underground exploration and ancient structures. You feel at home in dark and damp places. You have developed skills for disabling traps, only the most advanced one should catch you. You can smell Undead creatures when they are close.</text:p>
          </text:list-item>
        </text:list>
        <text:p text:style-name="P39">Character creation</text:p>
        <text:list xml:id="list93344502622752" text:continue-list="list93342928617375" text:style-name="WWNum1051">
          <text:list-item>
            <text:p text:style-name="P116">Backstab: when you attack an unaware opponent from behind you do STR damage.</text:p>
          </text:list-item>
          <text:list-item>
            <text:p text:style-name="P116">Read languages: you can read approximately any text.</text:p>
          </text:list-item>
        </text:list>
        <text:p text:style-name="P39">Starting Gear</text:p>
        <text:list xml:id="list93343171732442" text:continue-list="list93344502622752" text:style-name="WWNum1052">
          <text:list-item>
            <text:p text:style-name="P117">You start with an Expeditionary Gear and a Tool of your choice.</text:p>
          </text:list-item>
          <text:list-item>
            <text:p text:style-name="P117">Choose a Weapon.</text:p>
          </text:list-item>
          <text:list-item>
            <text:p text:style-name="P117">Roll the rest as usual.</text:p>
          </text:list-item>
        </text:list>
        <text:p text:style-name="P11"/>
        <text:p text:style-name="P11"/>
        <text:p text:style-name="P17"/>
        <text:p text:style-name="P17"><text:line-break/></text:p>
        <text:section text:style-name="Sect2" text:name="Section2">
          <text:p text:style-name="P67"/>
          <table:table table:name="Table1" table:style-name="Table1">
            <table:table-column table:style-name="Table1.A"/>
            <table:table-column table:style-name="Table1.B" table:number-columns-repeated="2"/>
            <table:table-column table:style-name="Table1.D"/>
            <table:table-row>
              <table:table-cell table:style-name="Table1.A1" table:number-columns-spanned="2" office:value-type="string">
                <text:p text:style-name="P2">Name:</text:p>
              </table:table-cell>
              <table:covered-table-cell/>
              <table:table-cell table:style-name="Table1.C1" table:number-columns-spanned="2" office:value-type="string">
                <text:p text:style-name="P2">Player:</text:p>
              </table:table-cell>
              <table:covered-table-cell/>
            </table:table-row>
            <table:table-row>
              <table:table-cell table:style-name="Table1.A2" table:number-columns-spanned="2" office:value-type="string">
                <text:p text:style-name="P2">Quote:</text:p>
              </table:table-cell>
              <table:covered-table-cell/>
              <table:table-cell table:style-name="Table1.C2" table:number-columns-spanned="2" office:value-type="string">
                <text:p text:style-name="P2">Campaign:</text:p>
              </table:table-cell>
              <table:covered-table-cell/>
            </table:table-row>
            <table:table-row>
              <table:table-cell table:style-name="Table1.A3" table:number-columns-spanned="4" office:value-type="string">
                <text:p text:style-name="P2">Appearance:</text:p>
              </table:table-cell>
              <table:covered-table-cell/>
              <table:covered-table-cell/>
              <table:covered-table-cell/>
            </table:table-row>
            <table:table-row>
              <table:table-cell table:style-name="Table1.A4" office:value-type="string">
                <text:p text:style-name="P2">Age:</text:p>
              </table:table-cell>
              <table:table-cell table:style-name="Table1.B4" office:value-type="string">
                <text:p text:style-name="P2">Sex:</text:p>
              </table:table-cell>
              <table:table-cell table:style-name="Table1.B4" office:value-type="string">
                <text:p text:style-name="P3"/>
              </table:table-cell>
              <table:table-cell table:style-name="Table1.D4" office:value-type="string">
                <text:p text:style-name="P2"/>
              </table:table-cell>
            </table:table-row>
          </table:table>
          <table:table table:name="Table2" table:style-name="Table2">
            <table:table-column table:style-name="Table2.A" table:number-columns-repeated="2"/>
            <table:table-column table:style-name="Table2.C"/>
            <table:table-row>
              <table:table-cell table:style-name="Table2.A1" office:value-type="string">
                <text:p text:style-name="P4">Background:</text:p>
              </table:table-cell>
              <table:table-cell table:style-name="Table2.A1" office:value-type="string">
                <text:p text:style-name="P4">Virtue:</text:p>
              </table:table-cell>
              <table:table-cell table:style-name="Table2.C1" office:value-type="string">
                <text:p text:style-name="P4">Vice: </text:p>
              </table:table-cell>
            </table:table-row>
            <table:table-row>
              <table:table-cell table:style-name="Table2.A2" office:value-type="string">
                <text:p text:style-name="P4">Reputation:</text:p>
              </table:table-cell>
              <table:table-cell table:style-name="Table2.A2" office:value-type="string">
                <text:p text:style-name="P4">Misfortunes:</text:p>
              </table:table-cell>
              <table:table-cell table:style-name="Table2.C2" office:value-type="string">
                <text:p text:style-name="P9"/>
              </table:table-cell>
            </table:table-row>
            <table:table-row table:style-name="Table2.3">
              <table:table-cell table:style-name="Table2.A3" office:value-type="string">
                <text:p text:style-name="P2"/>
              </table:table-cell>
              <table:table-cell table:style-name="Table2.B3" office:value-type="string">
                <text:p text:style-name="P4"/>
              </table:table-cell>
              <table:table-cell table:style-name="Table2.C3" office:value-type="string">
                <text:p text:style-name="P4"/>
              </table:table-cell>
            </table:table-row>
            <table:table-row>
              <table:table-cell table:style-name="Table2.A2" office:value-type="string">
                <text:p text:style-name="P2"><text:span text:style-name="T9">STR (max)</text:span>:</text:p>
              </table:table-cell>
              <table:table-cell table:style-name="Table2.A2" office:value-type="string">
                <text:p text:style-name="P4">DEX (max):</text:p>
              </table:table-cell>
              <table:table-cell table:style-name="Table2.C2" office:value-type="string">
                <text:p text:style-name="P4">WIL (max): </text:p>
              </table:table-cell>
            </table:table-row>
            <table:table-row table:style-name="Table2.5">
              <table:table-cell table:style-name="Table2.A2" office:value-type="string">
                <text:p text:style-name="P4">STR: </text:p>
              </table:table-cell>
              <table:table-cell table:style-name="Table2.A2" office:value-type="string">
                <text:p text:style-name="P4">DEX: </text:p>
              </table:table-cell>
              <table:table-cell table:style-name="Table2.C2" office:value-type="string">
                <text:p text:style-name="P4">WIL: </text:p>
              </table:table-cell>
            </table:table-row>
            <table:table-row table:style-name="Table2.3">
              <table:table-cell table:style-name="Table2.B3" office:value-type="string">
                <text:p text:style-name="P5"/>
              </table:table-cell>
              <table:table-cell table:style-name="Table2.B3" office:value-type="string">
                <text:p text:style-name="P4"/>
              </table:table-cell>
              <table:table-cell table:style-name="Table2.B3" office:value-type="string">
                <text:p text:style-name="P4"/>
              </table:table-cell>
            </table:table-row>
            <table:table-row>
              <table:table-cell table:style-name="Table2.A2" office:value-type="string">
                <text:p text:style-name="P6">Armor:</text:p>
              </table:table-cell>
              <table:table-cell table:style-name="Table2.A2" office:value-type="string">
                <text:p text:style-name="P6">HP (max):</text:p>
              </table:table-cell>
              <table:table-cell table:style-name="Table2.C2" office:value-type="string">
                <text:p text:style-name="P6">HP:</text:p>
              </table:table-cell>
            </table:table-row>
            <table:table-row>
              <table:table-cell table:style-name="Table2.A2" office:value-type="string">
                <text:p text:style-name="P6">Deprived:</text:p>
              </table:table-cell>
              <table:table-cell table:style-name="Table2.A2" office:value-type="string">
                <text:p text:style-name="P6"/>
              </table:table-cell>
              <table:table-cell table:style-name="Table2.C2" office:value-type="string">
                <text:p text:style-name="P6"/>
              </table:table-cell>
            </table:table-row>
            <table:table-row table:style-name="Table2.3">
              <table:table-cell table:style-name="Table2.B3" office:value-type="string">
                <text:p text:style-name="P9"/>
              </table:table-cell>
              <table:table-cell table:style-name="Table2.B3" office:value-type="string">
                <text:p text:style-name="P10"/>
              </table:table-cell>
              <table:table-cell table:style-name="Table2.B3" office:value-type="string">
                <text:p text:style-name="P9"/>
              </table:table-cell>
            </table:table-row>
            <table:table-row>
              <table:table-cell table:style-name="Table2.A2" office:value-type="string">
                <text:p text:style-name="P6">GP:</text:p>
              </table:table-cell>
              <table:table-cell table:style-name="Table2.A2" office:value-type="string">
                <text:p text:style-name="P7">SP:</text:p>
              </table:table-cell>
              <table:table-cell table:style-name="Table2.C2" office:value-type="string">
                <text:p text:style-name="P7">CP:</text:p>
              </table:table-cell>
            </table:table-row>
            <table:table-row>
              <table:table-cell table:style-name="Table2.A2" office:value-type="string">
                <text:p text:style-name="P7">1.</text:p>
              </table:table-cell>
              <table:table-cell table:style-name="Table2.A2" office:value-type="string">
                <text:p text:style-name="P7">2.</text:p>
              </table:table-cell>
              <table:table-cell table:style-name="Table2.C2" office:value-type="string">
                <text:p text:style-name="P7">3.</text:p>
              </table:table-cell>
            </table:table-row>
            <table:table-row>
              <table:table-cell table:style-name="Table2.A2" office:value-type="string">
                <text:p text:style-name="P7">4.</text:p>
              </table:table-cell>
              <table:table-cell table:style-name="Table2.A2" office:value-type="string">
                <text:p text:style-name="P7">5.</text:p>
              </table:table-cell>
              <table:table-cell table:style-name="Table2.C2" office:value-type="string">
                <text:p text:style-name="P7">6.</text:p>
              </table:table-cell>
            </table:table-row>
            <table:table-row>
              <table:table-cell table:style-name="Table2.A2" office:value-type="string">
                <text:p text:style-name="P7">7.</text:p>
              </table:table-cell>
              <table:table-cell table:style-name="Table2.A2" office:value-type="string">
                <text:p text:style-name="P7">8.</text:p>
              </table:table-cell>
              <table:table-cell table:style-name="Table2.C2" office:value-type="string">
                <text:p text:style-name="P7">9.</text:p>
              </table:table-cell>
            </table:table-row>
            <table:table-row>
              <table:table-cell table:style-name="Table2.A2" office:value-type="string">
                <text:p text:style-name="P7">10.</text:p>
              </table:table-cell>
              <table:table-cell table:style-name="Table2.A2" office:value-type="string">
                <text:p text:style-name="P9"/>
              </table:table-cell>
              <table:table-cell table:style-name="Table2.C2" office:value-type="string">
                <text:p text:style-name="P9"/>
              </table:table-cell>
            </table:table-row>
            <table:table-row table:style-name="Table2.3">
              <table:table-cell table:style-name="Table2.B3" office:value-type="string">
                <text:p text:style-name="P9"/>
              </table:table-cell>
              <table:table-cell table:style-name="Table2.B3" office:value-type="string">
                <text:p text:style-name="P9"/>
              </table:table-cell>
              <table:table-cell table:style-name="Table2.B3" office:value-type="string">
                <text:p text:style-name="P9"/>
              </table:table-cell>
            </table:table-row>
            <table:table-row>
              <table:table-cell table:style-name="Table2.A2" office:value-type="string">
                <text:p text:style-name="P7">Notes:</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C2" office:value-type="string">
                <text:p text:style-name="P9"/>
              </table:table-cell>
            </table:table-row>
            <table:table-row>
              <table:table-cell table:style-name="Table2.A18" office:value-type="string">
                <text:p text:style-name="P9"/>
              </table:table-cell>
              <table:table-cell table:style-name="Table2.A18" office:value-type="string">
                <text:p text:style-name="P9"/>
              </table:table-cell>
              <table:table-cell table:style-name="Table2.C18" office:value-type="string">
                <text:p text:style-name="P8"/>
              </table:table-cell>
            </table:table-row>
          </table:table>
          <text:p text:style-name="P18"/>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text-properties fo:font-size="9.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text-properties fo:font-size="9.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text-properties fo:font-size="9.5pt"/>
    </style:style>
    <style:style style:name="Compact" style:family="paragraph" style:parent-style-name="Text_20_body">
      <style:paragraph-properties fo:margin-top="0.0252in" fo:margin-bottom="0.0252in" style:contextual-spacing="false"/>
      <style:text-properties fo:font-size="9.5pt"/>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text-transform="uppercase" fo:color="#000000" loext:opacity="100%" style:font-name="Calibri" fo:font-family="Calibri" style:font-family-generic="roman" style:font-pitch="variable" fo:font-size="12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000000" loext:opacity="100%" style:font-name="Calibri" fo:font-family="Calibri" style:font-family-generic="roman" style:font-pitch="variable" fo:font-size="10.5pt" style:text-underline-style="solid" style:text-underline-width="auto" style:text-underline-color="font-color"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2.4in" style:type="center"/>
          <style:tab-stop style:position="4.8in" style:type="right"/>
        </style:tab-stops>
      </style:paragraph-properties>
    </style:style>
    <style:style style:name="Footer" style:family="paragraph" style:parent-style-name="Header_20_and_20_Footer" style:class="extra">
      <style:paragraph-properties text:number-lines="false" text:line-number="0">
        <style:tab-stops>
          <style:tab-stop style:position="2.4in" style:type="center"/>
          <style:tab-stop style:position="4.8in" style:type="right"/>
        </style:tab-stops>
      </style:paragraph-properties>
      <style:text-properties fo:font-size="9pt"/>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text-properties fo:font-size="10pt" style:font-size-asian="8.75pt" style:font-size-complex="10pt"/>
    </style:style>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number text:level="1" text:style-name="ListLabel_20_3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text:style-name="ListLabel_20_4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text:style-name="ListLabel_20_10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number text:level="1" text:style-name="ListLabel_20_262" loext:num-list-format="%1%." style:num-suffix="." style:num-format="1">
        <style:list-level-properties text:list-level-position-and-space-mode="label-alignment">
          <style:list-level-label-alignment text:label-followed-by="space" fo:text-indent="-0.2in" fo:margin-left="0.2in"/>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1201in" fo:margin-left="0.1201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1201in" fo:margin-left="0.1201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1201in" fo:margin-left="0.1201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number text:level="1" text:style-name="ListLabel_20_307" loext:num-list-format="%1%." style:num-suffix="." style:num-format="1">
        <style:list-level-properties text:list-level-position-and-space-mode="label-alignment">
          <style:list-level-label-alignment text:label-followed-by="space" fo:text-indent="-0.15in" fo:margin-left="0.1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1201in" fo:margin-left="0.1201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1201in" fo:margin-left="0.1201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1201in" fo:margin-left="0.1201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1201in" fo:margin-left="0.1201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1201in" fo:margin-left="0.1201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1201in" fo:margin-left="0.1201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number text:level="1" text:style-name="ListLabel_20_415" loext:num-list-format="%1%." style:num-suffix="." style:num-format="1">
        <style:list-level-properties text:list-level-position-and-space-mode="label-alignment">
          <style:list-level-label-alignment text:label-followed-by="space" fo:text-indent="-0.1598in" fo:margin-left="0.1598in"/>
        </style:list-level-properties>
      </text:list-level-style-number>
      <text:list-level-style-number text:level="2" text:style-name="ListLabel_20_41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1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1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2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2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2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1201in" fo:margin-left="0.1201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1201in" fo:margin-left="0.1201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1201in" fo:margin-left="0.1201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1201in" fo:margin-left="0.1201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fo:break-before="page"/>
    </style:style>
    <style:page-layout style:name="Mpm1" style:page-usage="mirrored">
      <style:page-layout-properties fo:page-width="5.5in" fo:page-height="8.5in" style:num-format="1" style:print-orientation="portrait" fo:margin-top="0.3in" fo:margin-bottom="0.1in" fo:margin-left="0.5201in" fo:margin-right="0.3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3598in" fo:margin-left="0in" fo:margin-right="0in" fo:margin-top="0.1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7T19:39:52</meta:creation-date>
    <dc:date>2026-05-24T09:33:42.309884077</dc:date>
    <meta:generator>LibreOffice/7.3.7.2$Linux_X86_64 LibreOffice_project/30$Build-2</meta:generator>
    <meta:editing-duration>P1DT3H9M37S</meta:editing-duration>
    <meta:editing-cycles>32</meta:editing-cycles>
    <meta:document-statistic meta:table-count="2" meta:image-count="0" meta:object-count="0" meta:page-count="24" meta:paragraph-count="708" meta:word-count="8155" meta:character-count="45373" meta:non-whitespace-character-count="38384"/>
    <meta:user-defined meta:name="AppVersion">12.0000</meta:user-defined>
    <meta:template xlink:type="simple" xlink:actuate="onRequest" xlink:title="Normal.dotm" xlink:href=""/>
  </office:meta>
</office:document-meta>
</file>