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6799in" table:align="margins" style:writing-mode="lr-tb"/>
    </style:style>
    <style:style style:name="Table1.A" style:family="table-column">
      <style:table-column-properties style:column-width="1.1694in" style:rel-column-width="16374*"/>
    </style:style>
    <style:style style:name="Table1.B" style:family="table-column">
      <style:table-column-properties style:column-width="1.1701in" style:rel-column-width="16383*"/>
    </style:style>
    <style:style style:name="Table1.D" style:family="table-column">
      <style:table-column-properties style:column-width="1.1708in" style:rel-column-width="16395*"/>
    </style:style>
    <style:style style:name="Table1.1" style:family="table-row">
      <style:table-row-properties style:row-height="0.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6799in" table:align="margins" style:writing-mode="lr-tb"/>
    </style:style>
    <style:style style:name="Table2.A" style:family="table-column">
      <style:table-column-properties style:column-width="1.5597in" style:rel-column-width="21845*"/>
    </style:style>
    <style:style style:name="Table2.1" style:family="table-row">
      <style:table-row-properties style:row-height="0.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10" style:family="table-cell">
      <style:table-cell-properties fo:padding="0.0382in" fo:border-left="3pt solid #000000" fo:border-right="none" fo:border-top="none" fo:border-bottom="3pt solid #000000"/>
    </style:style>
    <style:style style:name="Table2.C10" style:family="table-cell">
      <style:table-cell-properties fo:padding="0.0382in" fo:border-left="3pt solid #000000" fo:border-right="3pt solid #000000" fo:border-top="none" fo:border-bottom="3pt solid #000000"/>
    </style:style>
    <style:style style:name="Table4" style:family="table">
      <style:table-properties style:width="4.6799in" table:align="margins" style:writing-mode="lr-tb"/>
    </style:style>
    <style:style style:name="Table4.A" style:family="table-column">
      <style:table-column-properties style:column-width="1.6194in" style:rel-column-width="22677*"/>
    </style:style>
    <style:style style:name="Table4.B" style:family="table-column">
      <style:table-column-properties style:column-width="0.6854in" style:rel-column-width="9595*"/>
    </style:style>
    <style:style style:name="Table4.C" style:family="table-column">
      <style:table-column-properties style:column-width="0.8708in" style:rel-column-width="12190*"/>
    </style:style>
    <style:style style:name="Table4.D" style:family="table-column">
      <style:table-column-properties style:column-width="0.1208in" style:rel-column-width="1694*"/>
    </style:style>
    <style:style style:name="Table4.E" style:family="table-column">
      <style:table-column-properties style:column-width="1.384in" style:rel-column-width="19379*"/>
    </style:style>
    <style:style style:name="Table4.1" style:family="table-row">
      <style:table-row-properties style:row-height="0.4in"/>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2" style:family="table-row">
      <style:table-row-properties style:row-height="0.25in"/>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6799in" table:align="margins" style:writing-mode="lr-tb"/>
    </style:style>
    <style:style style:name="Table5.A" style:family="table-column">
      <style:table-column-properties style:column-width="1.3681in" style:rel-column-width="19161*"/>
    </style:style>
    <style:style style:name="Table5.B" style:family="table-column">
      <style:table-column-properties style:column-width="1.3049in" style:rel-column-width="18270*"/>
    </style:style>
    <style:style style:name="Table5.C" style:family="table-column">
      <style:table-column-properties style:column-width="0.0625in" style:rel-column-width="872*"/>
    </style:style>
    <style:style style:name="Table5.D" style:family="table-column">
      <style:table-column-properties style:column-width="1.9444in" style:rel-column-width="27232*"/>
    </style:style>
    <style:style style:name="Table5.1" style:family="table-row">
      <style:table-row-properties style:row-height="0.3125in"/>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2" style:family="table-row">
      <style:table-row-properties style:row-height="0.25in"/>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1pt solid #000000"/>
    </style:style>
    <style:style style:name="Table5.B6" style:family="table-cell">
      <style:table-cell-properties fo:padding="0.0382in" fo:border-left="3pt solid #000000" fo:border-right="none" fo:border-top="none" fo:border-bottom="1pt solid #000000"/>
    </style:style>
    <style:style style:name="Table5.C6" style:family="table-cell">
      <style:table-cell-properties fo:padding="0.0201in" fo:border-left="3pt solid #000000" fo:border-right="none" fo:border-top="none" fo:border-bottom="none"/>
    </style:style>
    <style:style style:name="Table5.D6" style:family="table-cell">
      <style:table-cell-properties fo:padding-left="0.0403in" fo:padding-right="0.0201in" fo:padding-top="0.0201in" fo:padding-bottom="0.0201in" fo:border-left="3pt solid #000000" fo:border-right="3pt solid #000000" fo:border-top="none" fo:border-bottom="1pt solid #000000"/>
    </style:style>
    <style:style style:name="Table5.7" style:family="table-row">
      <style:table-row-properties style:row-height="0.125in"/>
    </style:style>
    <style:style style:name="Table5.A7" style:family="table-cell">
      <style:table-cell-properties fo:padding="0in" fo:border-left="none" fo:border-right="none" fo:border-top="3pt solid #000000" fo:border-bottom="3pt solid #000000"/>
    </style:style>
    <style:style style:name="Table5.B7" style:family="table-cell">
      <style:table-cell-properties fo:padding="0in" fo:border-left="none" fo:border-right="none" fo:border-top="3pt solid #000000" fo:border-bottom="3pt solid #000000"/>
    </style:style>
    <style:style style:name="Table5.C7" style:family="table-cell">
      <style:table-cell-properties fo:padding="0.0201in" fo:border="none"/>
    </style:style>
    <style:style style:name="Table5.D7" style:family="table-cell">
      <style:table-cell-properties fo:padding="0in" fo:border-left="none" fo:border-right="none" fo:border-top="3pt solid #000000" fo:border-bottom="3pt solid #000000"/>
    </style:style>
    <style:style style:name="Table5.A8" style:family="table-cell">
      <style:table-cell-properties fo:padding="0.0382in" fo:border-left="3pt solid #000000" fo:border-right="none" fo:border-top="none" fo:border-bottom="3pt solid #000000"/>
    </style:style>
    <style:style style:name="Table5.B8" style:family="table-cell">
      <style:table-cell-properties fo:padding="0.0382in" fo:border-left="3pt solid #000000" fo:border-right="none" fo:border-top="none" fo:border-bottom="3pt solid #000000"/>
    </style:style>
    <style:style style:name="Table5.C8" style:family="table-cell">
      <style:table-cell-properties fo:padding="0.0201in" fo:border-left="3pt solid #000000" fo:border-right="none" fo:border-top="none" fo:border-bottom="none"/>
    </style:style>
    <style:style style:name="Table5.D8" style:family="table-cell">
      <style:table-cell-properties fo:padding="0in" fo:border="3pt solid #000000"/>
    </style:style>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5"/>
    <style:style style:name="P4" style:family="paragraph" style:parent-style-name="Compact" style:list-style-name="WWNum1006"/>
    <style:style style:name="P5" style:family="paragraph" style:parent-style-name="Compact" style:list-style-name="WWNum1008"/>
    <style:style style:name="P6" style:family="paragraph" style:parent-style-name="Compact" style:list-style-name="WWNum1009"/>
    <style:style style:name="P7" style:family="paragraph" style:parent-style-name="Compact" style:list-style-name="WWNum1010"/>
    <style:style style:name="P8" style:family="paragraph" style:parent-style-name="Compact" style:list-style-name="WWNum1011"/>
    <style:style style:name="P9" style:family="paragraph" style:parent-style-name="Compact" style:list-style-name="WWNum1012"/>
    <style:style style:name="P10" style:family="paragraph" style:parent-style-name="Compact" style:list-style-name="WWNum1013"/>
    <style:style style:name="P11" style:family="paragraph" style:parent-style-name="Compact" style:list-style-name="WWNum1014"/>
    <style:style style:name="P12" style:family="paragraph" style:parent-style-name="Compact" style:list-style-name="WWNum1015"/>
    <style:style style:name="P13" style:family="paragraph" style:parent-style-name="Compact" style:list-style-name="WWNum1016"/>
    <style:style style:name="P14" style:family="paragraph" style:parent-style-name="Compact" style:list-style-name="WWNum1017"/>
    <style:style style:name="P15" style:family="paragraph" style:parent-style-name="Compact" style:list-style-name="WWNum1018"/>
    <style:style style:name="P16" style:family="paragraph" style:parent-style-name="Compact" style:list-style-name="WWNum1019"/>
    <style:style style:name="P17" style:family="paragraph" style:parent-style-name="Compact" style:list-style-name="WWNum1020"/>
    <style:style style:name="P18" style:family="paragraph" style:parent-style-name="Compact" style:list-style-name="WWNum1021"/>
    <style:style style:name="P19" style:family="paragraph" style:parent-style-name="Compact" style:list-style-name="WWNum1025"/>
    <style:style style:name="P20" style:family="paragraph" style:parent-style-name="Compact" style:list-style-name="WWNum1026"/>
    <style:style style:name="P21" style:family="paragraph" style:parent-style-name="Compact" style:list-style-name="WWNum1001">
      <style:text-properties style:font-name="FreeSerif"/>
    </style:style>
    <style:style style:name="P22" style:family="paragraph" style:parent-style-name="Compact" style:list-style-name="WWNum1002">
      <style:text-properties style:font-name="FreeSerif"/>
    </style:style>
    <style:style style:name="P23" style:family="paragraph" style:parent-style-name="Compact" style:list-style-name="WWNum1005">
      <style:text-properties style:font-name="FreeSerif"/>
    </style:style>
    <style:style style:name="P24" style:family="paragraph" style:parent-style-name="Compact" style:list-style-name="WWNum1006">
      <style:text-properties style:font-name="FreeSerif"/>
    </style:style>
    <style:style style:name="P25" style:family="paragraph" style:parent-style-name="Compact" style:list-style-name="WWNum1006">
      <style:paragraph-properties fo:break-before="column"/>
      <style:text-properties style:font-name="FreeSerif"/>
    </style:style>
    <style:style style:name="P26" style:family="paragraph" style:parent-style-name="Compact" style:list-style-name="WWNum1007">
      <style:text-properties style:font-name="FreeSerif"/>
    </style:style>
    <style:style style:name="P27" style:family="paragraph" style:parent-style-name="Compact" style:list-style-name="WWNum1008">
      <style:text-properties style:font-name="FreeSerif"/>
    </style:style>
    <style:style style:name="P28" style:family="paragraph" style:parent-style-name="Compact" style:list-style-name="WWNum1009">
      <loext:graphic-properties draw:fill-gradient-name="gradient" draw:fill-hatch-name="hatch"/>
      <style:paragraph-properties fo:margin-top="0in" fo:margin-bottom="0.0299in" style:contextual-spacing="false"/>
      <style:text-properties style:font-name="FreeSerif"/>
    </style:style>
    <style:style style:name="P29" style:family="paragraph" style:parent-style-name="Compact" style:list-style-name="WWNum1009">
      <style:text-properties style:font-name="FreeSerif"/>
    </style:style>
    <style:style style:name="P30" style:family="paragraph" style:parent-style-name="Compact" style:list-style-name="WWNum1010">
      <style:text-properties style:font-name="FreeSerif"/>
    </style:style>
    <style:style style:name="P31" style:family="paragraph" style:parent-style-name="Compact" style:list-style-name="WWNum1011">
      <style:text-properties style:font-name="FreeSerif"/>
    </style:style>
    <style:style style:name="P32" style:family="paragraph" style:parent-style-name="Compact" style:list-style-name="WWNum1012">
      <style:text-properties style:font-name="FreeSerif"/>
    </style:style>
    <style:style style:name="P33" style:family="paragraph" style:parent-style-name="Compact" style:list-style-name="WWNum1013">
      <style:text-properties style:font-name="FreeSerif"/>
    </style:style>
    <style:style style:name="P34" style:family="paragraph" style:parent-style-name="Compact" style:list-style-name="WWNum1014">
      <style:text-properties style:font-name="FreeSerif"/>
    </style:style>
    <style:style style:name="P35" style:family="paragraph" style:parent-style-name="Compact" style:list-style-name="WWNum1015">
      <style:text-properties style:font-name="FreeSerif"/>
    </style:style>
    <style:style style:name="P36" style:family="paragraph" style:parent-style-name="Compact" style:list-style-name="WWNum1016">
      <style:text-properties style:font-name="FreeSerif"/>
    </style:style>
    <style:style style:name="P37" style:family="paragraph" style:parent-style-name="Compact" style:list-style-name="WWNum1017">
      <style:text-properties style:font-name="FreeSerif"/>
    </style:style>
    <style:style style:name="P38" style:family="paragraph" style:parent-style-name="Compact" style:list-style-name="WWNum1018">
      <style:text-properties style:font-name="FreeSerif"/>
    </style:style>
    <style:style style:name="P39" style:family="paragraph" style:parent-style-name="Compact" style:list-style-name="WWNum1019">
      <style:text-properties style:font-name="FreeSerif"/>
    </style:style>
    <style:style style:name="P40" style:family="paragraph" style:parent-style-name="Compact" style:list-style-name="WWNum1020">
      <style:text-properties style:font-name="FreeSerif"/>
    </style:style>
    <style:style style:name="P41" style:family="paragraph" style:parent-style-name="Compact" style:list-style-name="WWNum1021">
      <style:text-properties style:font-name="FreeSerif"/>
    </style:style>
    <style:style style:name="P42" style:family="paragraph" style:parent-style-name="Compact" style:list-style-name="WWNum1022">
      <style:text-properties style:font-name="FreeSerif"/>
    </style:style>
    <style:style style:name="P43" style:family="paragraph" style:parent-style-name="Compact" style:list-style-name="WWNum1025">
      <style:text-properties style:font-name="FreeSerif"/>
    </style:style>
    <style:style style:name="P44" style:family="paragraph" style:parent-style-name="Compact" style:list-style-name="WWNum1026">
      <style:text-properties style:font-name="FreeSerif"/>
    </style:style>
    <style:style style:name="P45" style:family="paragraph" style:parent-style-name="Compact" style:list-style-name="WWNum1027">
      <style:text-properties style:font-name="FreeSerif"/>
    </style:style>
    <style:style style:name="P46" style:family="paragraph" style:parent-style-name="Compact" style:list-style-name="WWNum1027">
      <style:text-properties style:font-name="FreeSerif" officeooo:paragraph-rsid="001f29c0"/>
    </style:style>
    <style:style style:name="P47" style:family="paragraph" style:parent-style-name="First_20_Paragraph">
      <style:text-properties style:font-name="FreeSerif"/>
    </style:style>
    <style:style style:name="P48" style:family="paragraph" style:parent-style-name="First_20_Paragraph">
      <style:text-properties style:font-name="FreeSerif" fo:font-style="italic" fo:font-weight="bold" style:font-style-asian="italic" style:font-weight-asian="bold"/>
    </style:style>
    <style:style style:name="P49" style:family="paragraph" style:parent-style-name="First_20_Paragraph">
      <style:text-properties style:font-name="FreeSerif" fo:font-weight="bold" style:font-weight-asian="bold"/>
    </style:style>
    <style:style style:name="P50" style:family="paragraph" style:parent-style-name="First_20_Paragraph">
      <loext:graphic-properties draw:fill-gradient-name="Gradient_20_3" draw:fill-hatch-name="hatch"/>
      <style:paragraph-properties fo:margin-top="0.1299in" fo:margin-bottom="0.0598in" style:contextual-spacing="false"/>
      <style:text-properties style:font-name="FreeSerif" fo:font-weight="bold" style:font-weight-asian="bold"/>
    </style:style>
    <style:style style:name="P51" style:family="paragraph" style:parent-style-name="First_20_Paragraph">
      <loext:graphic-properties draw:fill-gradient-name="Gradient_20_4" draw:fill-hatch-name="hatch"/>
      <style:paragraph-properties fo:margin-top="0.1299in" fo:margin-bottom="0.0598in" style:contextual-spacing="false"/>
      <style:text-properties style:font-name="FreeSerif" fo:font-weight="bold" style:font-weight-asian="bold"/>
    </style:style>
    <style:style style:name="P52" style:family="paragraph" style:parent-style-name="First_20_Paragraph">
      <loext:graphic-properties draw:fill-gradient-name="Gradient_20_5" draw:fill-hatch-name="hatch"/>
      <style:paragraph-properties fo:margin-top="0.1299in" fo:margin-bottom="0.0598in" style:contextual-spacing="false"/>
      <style:text-properties style:font-name="FreeSerif" fo:font-weight="bold" style:font-weight-asian="bold"/>
    </style:style>
    <style:style style:name="P53" style:family="paragraph" style:parent-style-name="First_20_Paragraph">
      <style:text-properties style:font-name="FreeSerif" fo:font-style="normal" officeooo:paragraph-rsid="0023f96e" style:font-style-asian="normal" style:font-style-complex="normal"/>
    </style:style>
    <style:style style:name="P54" style:family="paragraph" style:parent-style-name="First_20_Paragraph">
      <style:text-properties style:font-name="FreeSerif" officeooo:paragraph-rsid="0026c384"/>
    </style:style>
    <style:style style:name="P55" style:family="paragraph" style:parent-style-name="Footer">
      <style:paragraph-properties fo:text-align="center" style:justify-single-word="false"/>
      <style:text-properties style:font-name="FreeSerif" fo:font-size="9pt" style:font-size-asian="9pt" style:font-size-complex="9pt"/>
    </style:style>
    <style:style style:name="P56" style:family="paragraph" style:parent-style-name="Heading_20_1">
      <loext:graphic-properties draw:fill-gradient-name="gradient" draw:fill-hatch-name="hatch"/>
      <style:paragraph-properties fo:margin-top="0in" fo:margin-bottom="0in" style:contextual-spacing="false">
        <style:tab-stops/>
      </style:paragraph-properties>
      <style:text-properties style:font-name="FreeSerif" officeooo:paragraph-rsid="001faef2"/>
    </style:style>
    <style:style style:name="P57" style:family="paragraph" style:parent-style-name="Heading_20_1">
      <loext:graphic-properties draw:fill-gradient-name="Gradient_20_1" draw:fill-hatch-name="hatch"/>
      <style:paragraph-properties fo:margin-top="0.1in" fo:margin-bottom="0in" style:contextual-spacing="false"/>
      <style:text-properties style:font-name="FreeSerif" style:text-underline-style="solid" style:text-underline-width="bold" style:text-underline-color="#000000"/>
    </style:style>
    <style:style style:name="P58" style:family="paragraph" style:parent-style-name="Heading_20_1">
      <style:text-properties style:font-name="FreeSerif"/>
    </style:style>
    <style:style style:name="P59" style:family="paragraph" style:parent-style-name="Heading_20_1">
      <style:text-properties style:font-name="FreeSerif" officeooo:paragraph-rsid="001d46d4"/>
    </style:style>
    <style:style style:name="P60" style:family="paragraph" style:parent-style-name="Heading_20_2">
      <style:text-properties style:font-name="FreeSerif"/>
    </style:style>
    <style:style style:name="P61" style:family="paragraph" style:parent-style-name="Heading_20_2">
      <loext:graphic-properties draw:fill-gradient-name="gradient" draw:fill-hatch-name="hatch"/>
      <style:paragraph-properties fo:margin-top="0in" fo:margin-bottom="0.0598in" style:contextual-spacing="false"/>
      <style:text-properties style:font-name="FreeSerif"/>
    </style:style>
    <style:style style:name="P62" style:family="paragraph" style:parent-style-name="Heading_20_2">
      <loext:graphic-properties draw:fill-gradient-name="Gradient_20_6" draw:fill-hatch-name="hatch"/>
      <style:paragraph-properties fo:margin-top="0in" fo:margin-bottom="0.0598in" style:contextual-spacing="false"/>
      <style:text-properties style:font-name="FreeSerif"/>
    </style:style>
    <style:style style:name="P63" style:family="paragraph" style:parent-style-name="Heading_20_2">
      <style:text-properties style:font-name="FreeSerif" officeooo:paragraph-rsid="001d003d"/>
    </style:style>
    <style:style style:name="P64" style:family="paragraph" style:parent-style-name="Heading_20_2">
      <style:text-properties style:font-name="FreeSerif" fo:font-style="normal" officeooo:paragraph-rsid="0023f96e" style:font-style-asian="normal" style:font-style-complex="normal"/>
    </style:style>
    <style:style style:name="P65" style:family="paragraph" style:parent-style-name="Heading_20_2">
      <style:paragraph-properties fo:line-height="100%"/>
      <style:text-properties style:font-name="FreeSerif"/>
    </style:style>
    <style:style style:name="P66" style:family="paragraph" style:parent-style-name="Heading_20_2">
      <style:text-properties style:font-name="FreeSerif" officeooo:paragraph-rsid="0029beef"/>
    </style:style>
    <style:style style:name="P67" style:family="paragraph" style:parent-style-name="Heading_20_2">
      <loext:graphic-properties draw:fill-gradient-name="gradient" draw:fill-hatch-name="hatch"/>
      <style:paragraph-properties fo:margin-top="0in" fo:margin-bottom="0.0598in" style:contextual-spacing="false" fo:break-before="column"/>
      <style:text-properties style:font-name="FreeSerif" officeooo:paragraph-rsid="0029beef"/>
    </style:style>
    <style:style style:name="P68" style:family="paragraph" style:parent-style-name="Standard" style:list-style-name="WWNum1003">
      <loext:graphic-properties draw:fill-gradient-name="gradient" draw:fill-hatch-name="hatch"/>
      <style:paragraph-properties fo:margin-top="0in" fo:margin-bottom="0.0701in" style:contextual-spacing="false"/>
    </style:style>
    <style:style style:name="P69" style:family="paragraph" style:parent-style-name="Standard" style:list-style-name="WWNum1004">
      <loext:graphic-properties draw:fill-gradient-name="gradient" draw:fill-hatch-name="hatch"/>
      <style:paragraph-properties fo:margin-top="0in" fo:margin-bottom="0in" style:contextual-spacing="false" fo:line-height="100%"/>
    </style:style>
    <style:style style:name="P70" style:family="paragraph" style:parent-style-name="Standard" style:list-style-name="WWNum1023">
      <style:paragraph-properties fo:line-height="100%"/>
    </style:style>
    <style:style style:name="P71" style:family="paragraph" style:parent-style-name="Standard" style:list-style-name="WWNum1003">
      <loext:graphic-properties draw:fill-gradient-name="gradient" draw:fill-hatch-name="hatch"/>
      <style:paragraph-properties fo:margin-top="0in" fo:margin-bottom="0.0701in" style:contextual-spacing="false"/>
      <style:text-properties style:font-name="FreeSerif"/>
    </style:style>
    <style:style style:name="P72" style:family="paragraph" style:parent-style-name="Standard" style:list-style-name="WWNum1004">
      <loext:graphic-properties draw:fill-gradient-name="gradient" draw:fill-hatch-name="hatch"/>
      <style:paragraph-properties fo:margin-top="0in" fo:margin-bottom="0in" style:contextual-spacing="false" fo:line-height="100%"/>
      <style:text-properties style:font-name="FreeSerif"/>
    </style:style>
    <style:style style:name="P73" style:family="paragraph" style:parent-style-name="Standard" style:list-style-name="WWNum1023">
      <loext:graphic-properties draw:fill-gradient-name="Gradient_20_7" draw:fill-hatch-name="hatch"/>
      <style:paragraph-properties fo:margin-top="0in" fo:margin-bottom="0.0701in" style:contextual-spacing="false" fo:line-height="100%"/>
      <style:text-properties style:font-name="FreeSerif"/>
    </style:style>
    <style:style style:name="P74" style:family="paragraph" style:parent-style-name="Standard" style:list-style-name="WWNum1023">
      <style:paragraph-properties fo:line-height="100%"/>
      <style:text-properties style:font-name="FreeSerif"/>
    </style:style>
    <style:style style:name="P75" style:family="paragraph" style:parent-style-name="Standard" style:list-style-name="WWNum1024">
      <style:text-properties style:font-name="FreeSerif"/>
    </style:style>
    <style:style style:name="P76" style:family="paragraph" style:parent-style-name="Standard">
      <style:paragraph-properties fo:margin-top="0in" fo:margin-bottom="0in" style:contextual-spacing="false" fo:line-height="0.0201in"/>
      <style:text-properties style:font-name="FreeSerif" fo:font-size="9pt" officeooo:paragraph-rsid="001f29c0" style:font-size-asian="9pt" style:font-size-complex="9pt"/>
    </style:style>
    <style:style style:name="P77" style:family="paragraph" style:parent-style-name="Standard">
      <style:text-properties style:font-name="FreeSerif" officeooo:paragraph-rsid="001f29c0"/>
    </style:style>
    <style:style style:name="P78" style:family="paragraph" style:parent-style-name="Table_20_Contents">
      <style:text-properties style:font-name="FreeSerif" fo:font-size="9pt" officeooo:rsid="0078408c" officeooo:paragraph-rsid="001f29c0" style:font-size-asian="9pt" style:font-size-complex="9pt"/>
    </style:style>
    <style:style style:name="P79" style:family="paragraph" style:parent-style-name="Table_20_Contents">
      <style:paragraph-properties fo:margin-left="0in" fo:margin-right="0.0299in" fo:text-indent="0in" style:auto-text-indent="false"/>
      <style:text-properties style:font-name="FreeSerif" fo:font-size="9pt" officeooo:rsid="0078408c" officeooo:paragraph-rsid="001f29c0" style:font-size-asian="9pt" style:font-size-complex="9pt"/>
    </style:style>
    <style:style style:name="P80"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8408c" officeooo:paragraph-rsid="001f29c0" style:font-size-asian="9pt" style:font-size-complex="9pt"/>
    </style:style>
    <style:style style:name="P81"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78408c" officeooo:paragraph-rsid="001f29c0" style:font-size-asian="9pt" style:font-size-complex="9pt"/>
    </style:style>
    <style:style style:name="P82" style:family="paragraph" style:parent-style-name="Table_20_Contents">
      <style:text-properties style:font-name="FreeSerif" fo:font-size="9pt" officeooo:rsid="0078dc7f" officeooo:paragraph-rsid="001f29c0" style:font-size-asian="9pt" style:font-size-complex="9pt"/>
    </style:style>
    <style:style style:name="P83"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8dc7f" officeooo:paragraph-rsid="001f29c0" style:font-size-asian="9pt" style:font-size-complex="9pt"/>
    </style:style>
    <style:style style:name="P84"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style:font-name="FreeSerif" fo:font-size="9pt" officeooo:rsid="0078dc7f" officeooo:paragraph-rsid="001f29c0" style:font-size-asian="9pt" style:font-size-complex="9pt"/>
    </style:style>
    <style:style style:name="P85"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78dc7f" officeooo:paragraph-rsid="001f29c0" style:font-size-asian="9pt" style:font-size-complex="9pt"/>
    </style:style>
    <style:style style:name="P86" style:family="paragraph" style:parent-style-name="Table_20_Contents">
      <style:text-properties style:font-name="FreeSerif" fo:font-size="9pt" officeooo:paragraph-rsid="001f29c0" style:font-size-asian="9pt" style:font-size-complex="9pt"/>
    </style:style>
    <style:style style:name="P87" style:family="paragraph" style:parent-style-name="Table_20_Contents">
      <style:paragraph-properties fo:margin-left="0in" fo:margin-right="0.0299in" fo:text-indent="0in" style:auto-text-indent="false"/>
      <style:text-properties style:font-name="FreeSerif" fo:font-size="9pt" officeooo:paragraph-rsid="001f29c0" style:font-size-asian="9pt" style:font-size-complex="9pt"/>
    </style:style>
    <style:style style:name="P88"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style:font-name="FreeSerif" fo:font-size="9pt" officeooo:rsid="007a19e8" officeooo:paragraph-rsid="001f29c0" style:font-size-asian="9pt" style:font-size-complex="9pt"/>
    </style:style>
    <style:style style:name="P89"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7a19e8" officeooo:paragraph-rsid="001f29c0" style:font-size-asian="9pt" style:font-size-complex="9pt"/>
    </style:style>
    <style:style style:name="P90" style:family="paragraph" style:parent-style-name="Table_20_Contents">
      <style:paragraph-properties fo:margin-left="0in" fo:margin-right="0in" fo:margin-top="0in" fo:margin-bottom="0in" style:contextual-spacing="false" fo:line-height="0.1402in" fo:text-align="start" style:justify-single-word="false" fo:text-indent="0in" style:auto-text-indent="false"/>
      <style:text-properties style:font-name="FreeSerif" fo:font-size="9pt" officeooo:rsid="007a19e8" officeooo:paragraph-rsid="001f29c0" style:font-size-asian="9pt" style:font-size-complex="9pt"/>
    </style:style>
    <style:style style:name="P91"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paragraph-rsid="001f29c0" style:font-size-asian="9pt" style:font-size-complex="9pt"/>
    </style:style>
    <style:style style:name="P92"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style:font-name="FreeSerif" fo:font-size="9pt" officeooo:paragraph-rsid="001f29c0" style:font-size-asian="9pt" style:font-size-complex="9pt"/>
    </style:style>
    <style:style style:name="P93"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style:font-name="FreeSerif" fo:font-size="9pt" officeooo:rsid="007d40c9" officeooo:paragraph-rsid="001f29c0" style:font-size-asian="9pt" style:font-size-complex="9pt"/>
    </style:style>
    <style:style style:name="P94"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paragraph-rsid="001f29c0" style:font-size-asian="9pt" style:font-size-complex="9pt"/>
    </style:style>
    <style:style style:name="P95"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style:font-name="FreeSerif" fo:font-size="9pt" officeooo:paragraph-rsid="001f29c0" style:font-size-asian="9pt" style:font-size-complex="9pt"/>
    </style:style>
    <style:style style:name="P96"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15bdf5" officeooo:paragraph-rsid="001f29c0" style:font-size-asian="9pt" style:font-size-complex="9pt"/>
    </style:style>
    <style:style style:name="P97"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d4966d" officeooo:paragraph-rsid="001f29c0" style:font-size-asian="9pt" style:font-size-complex="9pt"/>
    </style:style>
    <style:style style:name="P98" style:family="paragraph" style:parent-style-name="Table_20_Contents">
      <style:text-properties style:font-name="FreeSerif" fo:font-size="9pt" officeooo:rsid="0020a4ae" officeooo:paragraph-rsid="0020a4ae" style:font-size-asian="9pt" style:font-size-complex="9pt"/>
    </style:style>
    <style:style style:name="P99" style:family="paragraph" style:parent-style-name="Table_20_Contents">
      <style:paragraph-properties fo:margin-left="0in" fo:margin-right="0in" fo:margin-top="0in" fo:margin-bottom="0in" style:contextual-spacing="false" fo:line-height="0.1402in" fo:text-indent="0in" style:auto-text-indent="false"/>
      <style:text-properties style:font-name="FreeSerif" fo:font-size="9pt" officeooo:rsid="0026c384" officeooo:paragraph-rsid="0026c384" style:font-size-asian="9pt" style:font-size-complex="9pt"/>
    </style:style>
    <style:style style:name="P100"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style:font-name="FreeSerif" fo:font-size="9pt" officeooo:rsid="0026c384" officeooo:paragraph-rsid="0026c384" style:font-size-asian="9pt" style:font-size-complex="9pt"/>
    </style:style>
    <style:style style:name="P101"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officeooo:rsid="00284c53" officeooo:paragraph-rsid="00284c53" style:font-size-asian="9pt" style:font-size-complex="9pt"/>
    </style:style>
    <style:style style:name="P102" style:family="paragraph" style:parent-style-name="Table_20_Contents">
      <style:paragraph-properties fo:margin-left="0in" fo:margin-right="0in" fo:margin-top="0in" fo:margin-bottom="0in" style:contextual-spacing="false" fo:line-height="0.1598in" fo:text-indent="0in" style:auto-text-indent="false"/>
      <style:text-properties style:font-name="FreeSerif" fo:font-size="9pt" fo:font-weight="normal" officeooo:rsid="00284c53" officeooo:paragraph-rsid="00284c53" style:font-size-asian="9pt" style:font-weight-asian="normal" style:font-size-complex="9pt" style:font-weight-complex="normal"/>
    </style:style>
    <style:style style:name="P103" style:family="paragraph" style:parent-style-name="Table_20_Contents">
      <style:paragraph-properties fo:margin-left="0in" fo:margin-right="0in" fo:margin-top="0in" fo:margin-bottom="0in" style:contextual-spacing="false" fo:line-height="0.1201in" fo:text-align="start" style:justify-single-word="false" fo:text-indent="0in" style:auto-text-indent="false"/>
      <style:text-properties style:font-name="FreeSerif" fo:font-size="8pt" officeooo:paragraph-rsid="001f29c0" style:font-size-asian="8pt" style:font-size-complex="8pt"/>
    </style:style>
    <style:style style:name="P104" style:family="paragraph" style:parent-style-name="Text_20_body">
      <loext:graphic-properties draw:fill-gradient-name="gradient" draw:fill-hatch-name="hatch"/>
      <style:paragraph-properties fo:margin-top="0in" fo:margin-bottom="0in" style:contextual-spacing="false" fo:line-height="0.1in"/>
      <style:text-properties fo:color="#000000" loext:opacity="100%" style:font-name="FreeSerif" fo:font-size="9pt" officeooo:paragraph-rsid="001f29c0" style:font-size-asian="9pt" style:font-size-complex="9pt"/>
    </style:style>
    <style:style style:name="P105" style:family="paragraph" style:parent-style-name="Text_20_body">
      <style:text-properties style:font-name="FreeSerif"/>
    </style:style>
    <style:style style:name="P106" style:family="paragraph" style:parent-style-name="Text_20_body">
      <style:text-properties style:font-name="FreeSerif" fo:font-style="italic" fo:font-weight="bold" style:font-style-asian="italic" style:font-weight-asian="bold"/>
    </style:style>
    <style:style style:name="P107" style:family="paragraph" style:parent-style-name="Text_20_body">
      <style:text-properties style:font-name="FreeSerif" fo:font-style="italic" style:font-style-asian="italic"/>
    </style:style>
    <style:style style:name="P108" style:family="paragraph" style:parent-style-name="Text_20_body">
      <style:text-properties style:font-name="FreeSerif" fo:font-style="italic" officeooo:paragraph-rsid="0023f96e" style:font-style-asian="italic"/>
    </style:style>
    <style:style style:name="P109" style:family="paragraph" style:parent-style-name="Text_20_body">
      <style:text-properties style:font-name="FreeSerif" fo:font-weight="bold" style:font-weight-asian="bold"/>
    </style:style>
    <style:style style:name="P110" style:family="paragraph" style:parent-style-name="Text_20_body">
      <loext:graphic-properties draw:fill-gradient-name="Gradient_20_2" draw:fill-hatch-name="hatch"/>
      <style:paragraph-properties fo:margin-top="0.1299in" fo:margin-bottom="0.0598in" style:contextual-spacing="false"/>
      <style:text-properties style:font-name="FreeSerif" fo:font-weight="bold" style:font-weight-asian="bold"/>
    </style:style>
    <style:style style:name="P111" style:family="paragraph" style:parent-style-name="Text_20_body">
      <style:text-properties style:font-name="FreeSerif" fo:font-weight="bold" officeooo:paragraph-rsid="0026c384" style:font-weight-asian="bold"/>
    </style:style>
    <style:style style:name="P112" style:family="paragraph" style:parent-style-name="Text_20_body">
      <loext:graphic-properties draw:fill-gradient-name="gradient" draw:fill-hatch-name="hatch"/>
      <style:paragraph-properties fo:margin-top="0in" fo:margin-bottom="0.1299in" style:contextual-spacing="false" fo:break-before="column"/>
      <style:text-properties style:font-name="FreeSerif" fo:font-weight="bold" officeooo:paragraph-rsid="0026c384" style:font-weight-asian="bold"/>
    </style:style>
    <style:style style:name="P113" style:family="paragraph" style:parent-style-name="Text_20_body">
      <style:paragraph-properties fo:break-before="column"/>
      <style:text-properties style:font-name="FreeSerif"/>
    </style:style>
    <style:style style:name="P114" style:family="paragraph" style:parent-style-name="Text_20_body" style:master-page-name="">
      <loext:graphic-properties draw:fill-gradient-name="gradient" draw:fill-hatch-name="hatch"/>
      <style:paragraph-properties fo:margin-top="0in" fo:margin-bottom="0.0598in" style:contextual-spacing="false" style:page-number="auto" fo:break-before="column"/>
      <style:text-properties style:font-name="FreeSerif" fo:font-size="10pt" officeooo:rsid="001b5e0c" officeooo:paragraph-rsid="001f29c0"/>
    </style:style>
    <style:style style:name="P115" style:family="paragraph" style:parent-style-name="Text_20_body">
      <style:paragraph-properties fo:margin-top="0in" fo:margin-bottom="0in" style:contextual-spacing="false" fo:line-height="0.0201in"/>
      <style:text-properties style:font-name="FreeSerif" fo:font-size="9pt" officeooo:paragraph-rsid="001f29c0" style:font-size-asian="9pt" style:font-size-complex="9pt"/>
    </style:style>
    <style:style style:name="P116" style:family="paragraph" style:parent-style-name="Text_20_body" style:master-page-name="">
      <style:paragraph-properties fo:margin-top="0in" fo:margin-bottom="0in" style:contextual-spacing="false" fo:line-height="0.0201in" style:page-number="auto" fo:break-before="auto" fo:break-after="auto"/>
      <style:text-properties style:font-name="FreeSerif" fo:font-size="9pt" officeooo:paragraph-rsid="001f29c0" style:font-size-asian="9pt" style:font-size-complex="9pt"/>
    </style:style>
    <style:style style:name="P117" style:family="paragraph" style:parent-style-name="Text_20_body">
      <style:text-properties style:font-name="FreeSerif" officeooo:paragraph-rsid="001faef2"/>
    </style:style>
    <style:style style:name="P118" style:family="paragraph" style:parent-style-name="Text_20_body">
      <style:text-properties style:font-name="FreeSerif" officeooo:paragraph-rsid="0020a4ae"/>
    </style:style>
    <style:style style:name="P119" style:family="paragraph" style:parent-style-name="Text_20_body">
      <style:paragraph-properties fo:break-before="column"/>
      <style:text-properties style:font-name="FreeSerif" officeooo:paragraph-rsid="0020a4ae"/>
    </style:style>
    <style:style style:name="P120" style:family="paragraph" style:parent-style-name="Text_20_body">
      <style:text-properties style:font-name="FreeSerif" fo:font-weight="normal" officeooo:paragraph-rsid="0020a4ae" style:font-weight-asian="normal" style:font-weight-complex="normal"/>
    </style:style>
    <style:style style:name="P121" style:family="paragraph" style:parent-style-name="Text_20_body">
      <style:text-properties style:font-name="FreeSerif" officeooo:paragraph-rsid="0026c38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1d1849"/>
    </style:style>
    <style:style style:name="T5" style:family="text">
      <style:text-properties fo:font-size="9pt" officeooo:rsid="0078dc7f" style:font-size-asian="9pt" style:font-size-complex="9pt"/>
    </style:style>
    <style:style style:name="T6" style:family="text">
      <style:text-properties officeooo:rsid="00d4966d"/>
    </style:style>
    <style:style style:name="T7" style:family="text">
      <style:text-properties officeooo:rsid="00e163c6"/>
    </style:style>
    <style:style style:name="T8" style:family="text">
      <style:text-properties officeooo:rsid="0078dc7f"/>
    </style:style>
    <style:style style:name="T9" style:family="text">
      <style:text-properties officeooo:rsid="001b5e0c"/>
    </style:style>
    <style:style style:name="T10" style:family="text">
      <style:text-properties style:font-name="FreeSerif"/>
    </style:style>
    <style:style style:name="T11" style:family="text">
      <style:text-properties style:font-name="FreeSerif" fo:font-weight="bold" style:font-weight-asian="bold"/>
    </style:style>
    <style:style style:name="T12" style:family="text">
      <style:text-properties style:font-name="FreeSerif" fo:font-weight="bold" style:font-weight-asian="bold" style:font-weight-complex="bold"/>
    </style:style>
    <style:style style:name="T13" style:family="text">
      <style:text-properties style:font-name="FreeSerif" officeooo:rsid="001f29c0"/>
    </style:style>
    <style:style style:name="T14" style:family="text">
      <style:text-properties officeooo:rsid="001faef2"/>
    </style:style>
    <style:style style:name="T15" style:family="text">
      <style:text-properties officeooo:rsid="0020a4ae"/>
    </style:style>
    <style:style style:name="T16" style:family="text">
      <style:text-properties officeooo:rsid="0023f96e"/>
    </style:style>
    <style:style style:name="T17" style:family="text">
      <style:text-properties officeooo:rsid="0024bf70"/>
    </style:style>
    <style:style style:name="T18" style:family="text">
      <style:text-properties officeooo:rsid="0025e2f7"/>
    </style:style>
    <style:style style:name="T19" style:family="text">
      <style:text-properties officeooo:rsid="00284c53"/>
    </style:style>
    <style:style style:name="Sect1" style:family="section">
      <style:section-properties text:dont-balance-text-columns="false" style:editable="false">
        <style:columns fo:column-count="2" fo:column-gap="0.1402in">
          <style:column style:rel-width="32767*" fo:start-indent="0in" fo:end-indent="0.0701in"/>
          <style:column style:rel-width="32768*"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6" text:outline-level="1"><text:bookmark-start text:name="into-the-everything-rpg"/>Into </text:h>
        <text:h text:style-name="P56" text:outline-level="1">the </text:h>
        <text:h text:style-name="P56" text:outline-level="1">Everything<text:bookmark-end text:name="into-the-everything-rpg"/></text:h>
        <text:p text:style-name="P47"/>
        <text:p text:style-name="P105"/>
        <text:p text:style-name="P47">A setting neutral game inspired by Mark of the Odd and Mini Six. It uses the basic framework, perks, complications, and XP of Mini Six: Bare Knuckle Edition; uses Mark of the Odd’s d20 roll-under system and the general refinements offerd by Cairn; it uses the skills from Fate Core; it adds Advantage and Disadvantage to account for diffuculty; and it uses the magic system from Cairn &amp; Knave.</text:p>
        <text:p text:style-name="P105">Into the Everything RPG is by Senator Bix and licenced CC-BY-SA 4.0</text:p>
        <text:h text:style-name="P60" text:outline-level="2"><text:bookmark-start text:name="thanks-and-acknowledgments"/>Thanks and Acknowledgments<text:bookmark-end text:name="thanks-and-acknowledgments"/></text:h>
        <text:p text:style-name="P47">Rook uses content from the following:</text:p>
        <text:list xml:id="list1379009070" text:style-name="WWNum1001">
          <text:list-item>
            <text:p text:style-name="P1"><text:span text:style-name="T11">Into the Odd</text:span><text:span text:style-name="T10"> by Chris McDowall, licensed under the Mark of the Odd License v0.4. (www.bastionland.com)</text:span></text:p>
          </text:list-item>
          <text:list-item>
            <text:p text:style-name="P1"><text:span text:style-name="T11">Mini Six: Bare Knuckle Edition</text:span><text:span text:style-name="T10"> (c) 2023 by Ray Nolan is licensed under CC BY 4.0. <text:line-break/></text:span><text:span text:style-name="T13">(www.antipaladingames.com)</text:span></text:p>
          </text:list-item>
          <text:list-item>
            <text:p text:style-name="P21"><text:span text:style-name="T1">Cairn</text:span> and <text:span text:style-name="T1">Cairn Barebones Edition</text:span> by Yochai Gal, licensed under CC-BY-SA 4.0. (github.com/yochaigal/cairn)</text:p>
          </text:list-item>
          <text:list-item>
            <text:p text:style-name="P21"><text:span text:style-name="T1">Knave</text:span> by Ben Milton (Questing Beast), licensed under CC-BY 4.0 (questingblog.com/knave/)</text:p>
          </text:list-item>
          <text:list-item>
            <text:p text:style-name="P21"><text:span text:style-name="T1">Fate Core System SRD</text:span> by Evil Hat Productions (Leonard Balsera, Brian Engard, Jeremy Keller, Ryan Macklin, Mike Olson, Clark Valentine, Amanda Valentine, Fred Hicks, and Rob Donoghue), licensed under CC-BY 3.0. (fate-srd.com)</text:p>
          </text:list-item>
          <text:list-item>
            <text:p text:style-name="P21"><text:span text:style-name="T1">Stat Blocks for Cairn</text:span> by Seedling Games, licensed CC-BY-SA (seedlinggames.com/srd/ human_stats_cairn.html)</text:p>
          </text:list-item>
        </text:list>
        <text:h text:style-name="P57" text:outline-level="1"><text:bookmark-start text:name="core-rules"/>Core Rules<text:bookmark-end text:name="core-rules"/></text:h>
        <text:h text:style-name="P58" text:outline-level="1"><text:bookmark-start text:name="player-characters"/>Player Characters<text:bookmark-end text:name="player-characters"/></text:h>
        <text:h text:style-name="P60" text:outline-level="2"><text:bookmark-start text:name="how-to-make-a-character"/>How to Make a Character<text:bookmark-end text:name="how-to-make-a-character"/></text:h>
        <text:list xml:id="list1347952829" text:style-name="WWNum1002">
          <text:list-item text:start-value="1">
            <text:p text:style-name="P2"><text:span text:style-name="T10">Roll 3d6 for each of your character’s Attributes (Strength (STR), Dexterity (DEX), Intelligence (INT), and Charisma (CHA), in order. You may then swap any two results. Alternatively, you may distribute 40 points between your attributes, where no attribute may be less than 5 or more than 15.</text:span></text:p>
          </text:list-item>
          <text:list-item>
            <text:p text:style-name="P22">Roll 1d4+2 for your characters’ Hit Protection (HP).</text:p>
          </text:list-item>
          <text:list-item>
            <text:p text:style-name="P22">Select four skills your character is proficient in.</text:p>
          </text:list-item>
          <text:list-item>
            <text:p text:style-name="P22">Select your character’s Perks, if any.</text:p>
          </text:list-item>
          <text:list-item>
            <text:p text:style-name="P22">Select your character’s Complications, if any.</text:p>
          </text:list-item>
          <text:list-item>
            <text:p text:style-name="P22">Select your character’s equipment.</text:p>
            <text:p text:style-name="P22"/>
          </text:list-item>
        </text:list>
        <text:h text:style-name="P61" text:outline-level="2"><text:bookmark-start text:name="attributes"/>Attributes<text:bookmark-end text:name="attributes"/></text:h>
        <text:p text:style-name="P47">Player Characters (PCs) have four Attributes:</text:p>
        <text:list xml:id="list135625500517385" text:continue-list="list1379009070" text:style-name="WWNum1003">
          <text:list-item>
            <text:p text:style-name="P71"><text:span text:style-name="T1">Strength (STR):</text:span> Used for saves requiring physical power, like lifting gates, bending bars, resisting poison, etc.</text:p>
          </text:list-item>
          <text:list-item>
            <text:p text:style-name="P68"><text:span text:style-name="T11">Dexterity (DEX):</text:span><text:span text:style-name="T10"> Used for saves requiring poise, speed, reflexes, dodging, climbing, sneaking, balancing, etc.</text:span></text:p>
          </text:list-item>
          <text:list-item>
            <text:p text:style-name="P68"><text:span text:style-name="T11">Intelligence (INT)</text:span><text:span text:style-name="T10"> Used for saves regarding knowledge, mental creativity, wisdom, and memory.</text:span></text:p>
          </text:list-item>
          <text:list-item>
            <text:p text:style-name="P71"><text:span text:style-name="T1">Charisma (CHA)</text:span> Used for saves to persuade, deceive, interrogate, intimidate, charm, provoke, or lead others.</text:p>
          </text:list-item>
        </text:list>
        <text:p text:style-name="P47">Attributes are not universal descriptors. A character with a low STR is not necessarily hopelessly weak; they can still attempt to lift a heavy door or survive a deadly fight! Their risk is simply higher.</text:p>
        <text:h text:style-name="P60" text:outline-level="2"><text:bookmark-start text:name="skills"/><text:soft-page-break/>Skills<text:bookmark-end text:name="skills"/></text:h>
        <text:p text:style-name="P47">Player Characters may select from the following skills. Starting characters are proficient in 4 skills.</text:p>
        <text:list xml:id="list135625129109680" text:continue-list="list135625500517385" text:style-name="WWNum1004">
          <text:list-item>
            <text:p text:style-name="P72"><text:span text:style-name="T1">Athletics (STR):</text:span> Climbing, jumping, and swimming.</text:p>
          </text:list-item>
          <text:list-item>
            <text:p text:style-name="P72"><text:span text:style-name="T1">Fight (STR):</text:span> Attacking and defending in melee combat.</text:p>
          </text:list-item>
          <text:list-item>
            <text:p text:style-name="P72"><text:span text:style-name="T1">Physique (STR):</text:span> Raw strength and physical resilience.</text:p>
          </text:list-item>
          <text:list-item>
            <text:p text:style-name="P69"><text:span text:style-name="T11">Acrobatics (DEX):</text:span><text:span text:style-name="T10"> Dodging and and feats of gymnastics.</text:span></text:p>
          </text:list-item>
          <text:list-item>
            <text:p text:style-name="P72"><text:span text:style-name="T1">Burglary (DEX):</text:span> Breaking, entering, and casing locations.</text:p>
          </text:list-item>
          <text:list-item>
            <text:p text:style-name="P72"><text:span text:style-name="T1">Drive/Pilot (DEX):</text:span> Operating vehicles.</text:p>
          </text:list-item>
          <text:list-item>
            <text:p text:style-name="P72"><text:span text:style-name="T1">Finesse (DEX):</text:span> Perform delicate tasks or sleight of hand.</text:p>
          </text:list-item>
          <text:list-item>
            <text:p text:style-name="P72"><text:span text:style-name="T1">Shoot (DEX):</text:span> Ranged weapons and firearms.</text:p>
          </text:list-item>
          <text:list-item>
            <text:p text:style-name="P72"><text:span text:style-name="T1">Stealth (DEX):</text:span> Hiding and moving silently.</text:p>
          </text:list-item>
          <text:list-item>
            <text:p text:style-name="P72"><text:span text:style-name="T1">Arcana (INT):</text:span> Your knowledge of magical spells, items, and effects.</text:p>
          </text:list-item>
          <text:list-item>
            <text:p text:style-name="P72"><text:span text:style-name="T1">Craft (INT):</text:span> Repairing, creating, or modifying objects.</text:p>
          </text:list-item>
          <text:list-item>
            <text:p text:style-name="P72"><text:span text:style-name="T1">Investigate (INT):</text:span> Deductive reasoning and searching.</text:p>
          </text:list-item>
          <text:list-item>
            <text:p text:style-name="P72"><text:span text:style-name="T1">Lore (INT):</text:span> Book knowledge, history, and the supernatural.</text:p>
          </text:list-item>
          <text:list-item>
            <text:p text:style-name="P72"><text:span text:style-name="T1">Medicine (INT):</text:span> Aiding and diagnosing medical conditions.</text:p>
          </text:list-item>
          <text:list-item>
            <text:p text:style-name="P72"><text:span text:style-name="T1">Perception (INT):</text:span> General perception and situational awareness.</text:p>
          </text:list-item>
          <text:list-item>
            <text:p text:style-name="P72"><text:span text:style-name="T1">Survival (INT):</text:span> Tracking, hunting, and surviving in th wild.</text:p>
          </text:list-item>
          <text:list-item>
            <text:p text:style-name="P72"><text:span text:style-name="T1">Technical (INT):</text:span> Your knowledge of technology and science.</text:p>
          </text:list-item>
          <text:list-item>
            <text:p text:style-name="P72"><text:span text:style-name="T1">Contacts (CHA):</text:span> Gathering information and street networks.</text:p>
          </text:list-item>
          <text:list-item>
            <text:p text:style-name="P72"><text:span text:style-name="T1">Deceive (CHA):</text:span> Lying and creating bluffs.</text:p>
          </text:list-item>
          <text:list-item>
            <text:p text:style-name="P72"><text:span text:style-name="T1">Empathy (CHA):</text:span> Reading people and their emotions.</text:p>
          </text:list-item>
          <text:list-item>
            <text:p text:style-name="P72"><text:span text:style-name="T1">Intimidation (CHA):</text:span> Threatening or taunting others.</text:p>
          </text:list-item>
          <text:list-item>
            <text:p text:style-name="P72"><text:span text:style-name="T1">Persuasion (CHA):</text:span> Influencing someone through diplomacy or tact.</text:p>
          </text:list-item>
          <text:list-item>
            <text:p text:style-name="P72"><text:span text:style-name="T1">Willpower (CHA):</text:span> Mental fortitude and resisting manipulation.</text:p>
          </text:list-item>
        </text:list>
        <text:p text:style-name="P47">If you are proficient in a skill, then you have advantage on any saves that use that skill.</text:p>
        <text:h text:style-name="P60" text:outline-level="2"><text:bookmark-start text:name="perks"/>Perks<text:bookmark-end text:name="perks"/></text:h>
        <text:p text:style-name="P47">During character creation, unspent skill proficiency points may be spent to acquire Perks. The following perks are meant to serve as examples and inspiration. The costs are listed in parentheses.</text:p>
        <text:p text:style-name="P106">Racial Perks</text:p>
        <text:list xml:id="list135625013175135" text:continue-list="list135625129109680" text:style-name="WWNum1005">
          <text:list-item>
            <text:p text:style-name="P3"><text:span text:style-name="T11">Dwarf (2):</text:span><text:span text:style-name="T10"> You’re long lived, you can see in the dark, and you are proficient in the Craft skill. You have +1 to STR and -1 to DEX.</text:span></text:p>
          </text:list-item>
          <text:list-item>
            <text:p text:style-name="P23"><text:span text:style-name="T1">Elf (2):</text:span> You’re long lived, you can see in the dark, and you are proficient in the Shoot skill. You have +1 to DEX and -1 to STR.</text:p>
          </text:list-item>
          <text:list-item>
            <text:p text:style-name="P23"><text:span text:style-name="T1">Reptoid (1):</text:span> You’re green and scaly, this gives a +1 Armor Value.You also have claw-tipped fingers which grant you +1 damage on unarmed attacks.</text:p>
          </text:list-item>
          <text:list-item>
            <text:p text:style-name="P23"><text:span text:style-name="T1">Robot (2):</text:span> You don’t eat, breathe, or sleep. You can have your memory wiped. You don’t heal but you can be repaired. As long as your memory core survives you may be rebuilt if destroyed.</text:p>
          </text:list-item>
        </text:list>
        <text:p text:style-name="P48">General Perks</text:p>
        <text:list xml:id="list135624705439191" text:continue-list="list135625013175135" text:style-name="WWNum1006">
          <text:list-item>
            <text:p text:style-name="P24"><text:span text:style-name="T1">Attractive (1):</text:span> Once per session, the character can re-roll for any action related to their appearance. Examples include seduction, a subtle bluff or simply distracting guards.</text:p>
          </text:list-item>
          <text:list-item>
            <text:p text:style-name="P4"><text:span text:style-name="T11">Daredevil (1):</text:span><text:span text:style-name="T10"> Once per session you may throw caution to the wind taking extremely reckless action that may result in your own death, granting you a +3 to your STR or DEX for one action.</text:span></text:p>
          </text:list-item>
          <text:list-item>
            <text:p text:style-name="P24"><text:span text:style-name="T1">Destiny (1):</text:span> Characters with Destiny feel they are fated to some grand purpose. Once per game session a character may declare a failed roll is not part of their destiny and immediately reroll to get a different result.</text:p>
            <text:p text:style-name="P24"><text:span text:style-name="T1"/></text:p>
          </text:list-item>
          <text:list-item>
            <text:p text:style-name="P25"><text:soft-page-break/><text:span text:style-name="T1">Favors (1):</text:span>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24"><text:span text:style-name="T1">Lucky (1):</text:span> Once per session you can declare you are feeling lucky and my roll the next roll with advantage.</text:p>
          </text:list-item>
          <text:list-item>
            <text:p text:style-name="P24"><text:span text:style-name="T1">Perceptive (1):</text:span>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24"><text:span text:style-name="T1">Recall (1):</text:span> Any time the character chooses to recall anything he has experienced, the GM must tell him the truth in as much detail as the character would have been aware.</text:p>
          </text:list-item>
          <text:list-item>
            <text:p text:style-name="P24"><text:span text:style-name="T1">Sidekick (2):</text:span> You have a boon companion willing to join in your adventures. This character only gets 30 points to spend on attributes and 2 proficency points to spend on starting skills. They normally only receive 1 to 3 XP per session, but never as many as their fearless leader.</text:p>
          </text:list-item>
        </text:list>
        <text:p text:style-name="P48">Esoteric Perks</text:p>
        <text:list xml:id="list135625063936171" text:continue-list="list135624705439191" text:style-name="WWNum1007">
          <text:list-item>
            <text:p text:style-name="P26"><text:span text:style-name="T1">Energy Blast (3):</text:span> You can throw bolts of pure energy that do d10 blast damage.</text:p>
          </text:list-item>
          <text:list-item>
            <text:p text:style-name="P26"><text:span text:style-name="T1">ESP (2):</text:span> You can read minds. Targets resist using their Willpower (CHA).</text:p>
          </text:list-item>
          <text:list-item>
            <text:p text:style-name="P26"><text:span text:style-name="T1">Flying (3):</text:span> You can fly (at twice your movemet speed).</text:p>
          </text:list-item>
          <text:list-item>
            <text:p text:style-name="P26"><text:span text:style-name="T1">Regeneration (2):</text:span> You heal 1 attribute damage per hour.</text:p>
          </text:list-item>
          <text:list-item>
            <text:p text:style-name="P26"><text:span text:style-name="T1">Spellcaster (2):</text:span> You’re magically sensitive. Magic spells really work for you. Arcana is the skill check you make for spells.</text:p>
          </text:list-item>
          <text:list-item>
            <text:p text:style-name="P26"><text:span text:style-name="T1">Telekinesis (2):</text:span> You can move stuff with your mind. Make a Wits roll and treat it like the Lift skill. People resist using their Might.</text:p>
          </text:list-item>
          <text:list-item>
            <text:p text:style-name="P26"><text:span text:style-name="T1">X-Ray Vision (3):</text:span> you can see through 1 foot of material.</text:p>
          </text:list-item>
        </text:list>
        <text:h text:style-name="P60" text:outline-level="2"><text:bookmark-start text:name="complications"/>Complications<text:bookmark-end text:name="complications"/></text:h>
        <text:p text:style-name="P47">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35623752656895" text:continue-list="list135625063936171" text:style-name="WWNum1008">
          <text:list-item>
            <text:p text:style-name="P5"><text:span text:style-name="T11">Age:</text:span><text:span text:style-name="T10">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span></text:p>
          </text:list-item>
          <text:list-item>
            <text:p text:style-name="P27"><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27"><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27"><text:span text:style-name="T1">Gremlins:</text:span>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27"><text:soft-page-break/><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27"><text:span text:style-name="T1">Skeletons in the Closet:</text:span> You earn the bonus XP whenever your past comes back to haunt you.</text:p>
          </text:list-item>
          <text:list-item>
            <text:p text:style-name="P27"><text:span text:style-name="T1">Unlucky in Love:</text:span> Things just don’t work out for some folks. You earn bonus XP when your love life falls apart in a meaningful way.</text:p>
          </text:list-item>
          <text:list-item>
            <text:p text:style-name="P27"><text:span text:style-name="T1">Unlucky in Money:</text:span> You have a hard time <text:span text:style-name="T4">keeping </text:span>money. You earn the bonus XP when you lose a significant amount of cash through your own foolishness or bad luck and have nothing to show for it.</text:p>
          </text:list-item>
        </text:list>
        <text:h text:style-name="P60" text:outline-level="2"><text:bookmark-start text:name="inventory"/>Inventory<text:bookmark-end text:name="inventory"/></text:h>
        <text:p text:style-name="P47">Characters have a total of ten inventory slots but can only carry four or five items comfortably without the help of bags, backpacks, horses, carts, etc.</text:p>
        <text:list xml:id="list135625169973300" text:continue-list="list135623752656895" text:style-name="WWNum1009">
          <text:list-item>
            <text:p text:style-name="P28">Most items take up one slot unless otherwise indicated.</text:p>
          </text:list-item>
          <text:list-item>
            <text:p text:style-name="P6"><text:span text:style-name="T10">Petty items do not take up any slots.</text:span></text:p>
          </text:list-item>
          <text:list-item>
            <text:p text:style-name="P29">Bulky items take up two slots.</text:p>
          </text:list-item>
          <text:list-item>
            <text:p text:style-name="P29"><text:span text:style-name="T4">G</text:span>ain<text:span text:style-name="T4">ing</text:span> 1 fatigue, it takes up 1 inventory slot.</text:p>
          </text:list-item>
        </text:list>
        <text:p text:style-name="P47">Inventory is abstract, dependent only on the fiction as adjudicated by the GM. A character cannot have more ten inventory slots.</text:p>
        <text:h text:style-name="P60" text:outline-level="2"><text:bookmark-start text:name="gear"/>Gear<text:bookmark-end text:name="gear"/></text:h>
        <text:p text:style-name="P47">Some games may assume the character has the trappings of a middle-class lifestyle, while others may take place in a world of fantasy where only those items in your pack mean the difference between life and death.</text:p>
        <text:p text:style-name="P105">Characters might start with one piece of related gear for each skill they allocated dice to during character creation. For example a pistol for the Pistols skill, a medic bag for Medicine, etc. For anything else, beg the GM.</text:p>
        <text:p text:style-name="P110">Fantasy and Low Tech Weapons</text:p>
        <text:list xml:id="list135624872657457" text:continue-list="list135625169973300" text:style-name="WWNum1010">
          <text:list-item>
            <text:p text:style-name="P30">Unarmed Strike (d4)</text:p>
          </text:list-item>
          <text:list-item>
            <text:p text:style-name="P7"><text:span text:style-name="T10">Dagger, Cudgel, Sickle, Staff, etc. (d6 damage)</text:span></text:p>
          </text:list-item>
          <text:list-item>
            <text:p text:style-name="P30">Spear, Sword, Mace, Axe, Flail, etc. (d8 damage)</text:p>
          </text:list-item>
          <text:list-item>
            <text:p text:style-name="P30">Halberd, War Hammer, Long Sword, etc. (d10 damage, bulky)</text:p>
          </text:list-item>
          <text:list-item>
            <text:p text:style-name="P30">Sling (d6 damage)</text:p>
          </text:list-item>
          <text:list-item>
            <text:p text:style-name="P30">Bow (d6 damage, bulky)</text:p>
          </text:list-item>
          <text:list-item>
            <text:p text:style-name="P30">Crossbow (d8 damage, bulky)</text:p>
          </text:list-item>
        </text:list>
        <text:p text:style-name="P50">Modern Tech Weapons</text:p>
        <text:list xml:id="list135625056944554" text:continue-list="list135624872657457" text:style-name="WWNum1011">
          <text:list-item>
            <text:p text:style-name="P31">Light Pistol (d6)</text:p>
          </text:list-item>
          <text:list-item>
            <text:p text:style-name="P8"><text:span text:style-name="T10">Heavy Pistol (d8)</text:span></text:p>
          </text:list-item>
          <text:list-item>
            <text:p text:style-name="P31">Rifle (d10, bulky)</text:p>
          </text:list-item>
          <text:list-item>
            <text:p text:style-name="P31">Shotgun (d12, bulky)</text:p>
          </text:list-item>
          <text:list-item>
            <text:p text:style-name="P31">BFG (d12, bulky)</text:p>
          </text:list-item>
          <text:list-item>
            <text:p text:style-name="P31">Grenade: d12 to everyone within 3 paces.</text:p>
          </text:list-item>
        </text:list>
        <text:p text:style-name="P51">Sci-Fi Tech Weapons</text:p>
        <text:list xml:id="list135624967234085" text:continue-list="list135625056944554" text:style-name="WWNum1012">
          <text:list-item>
            <text:p text:style-name="P32">Plasma Pistol (d10)</text:p>
          </text:list-item>
          <text:list-item>
            <text:p text:style-name="P9"><text:span text:style-name="T10">Plasma Rifle: (d12, bulky)</text:span></text:p>
          </text:list-item>
          <text:list-item>
            <text:p text:style-name="P32">Plasma BFG: (d20, bulky)</text:p>
          </text:list-item>
          <text:list-item>
            <text:p text:style-name="P32">Plasma Sword: (d12)</text:p>
          </text:list-item>
          <text:list-item>
            <text:p text:style-name="P32">Plasma Grenade: d20 to everyone within 3 paces</text:p>
          </text:list-item>
        </text:list>
        <text:p text:style-name="P52">Weapon Ranges (Short/ Medium/ Long)</text:p>
        <text:p text:style-name="P107">Attacks against especially distant targets are Impaired.</text:p>
        <text:list xml:id="list135623495441118" text:continue-list="list135624967234085" text:style-name="WWNum1013">
          <text:list-item>
            <text:p text:style-name="P33">Bow: 10/30/100</text:p>
          </text:list-item>
          <text:list-item>
            <text:p text:style-name="P33">Crossbow: 15/45/150</text:p>
          </text:list-item>
          <text:list-item>
            <text:p text:style-name="P10"><text:span text:style-name="T10">All Pistols: 10/50/100</text:span></text:p>
          </text:list-item>
          <text:list-item>
            <text:p text:style-name="P33">All Rifles: 30/100/200</text:p>
          </text:list-item>
          <text:list-item>
            <text:p text:style-name="P33">Shotgun: 20/50/100</text:p>
          </text:list-item>
          <text:list-item>
            <text:p text:style-name="P33">All BFGs: 30/100/300</text:p>
          </text:list-item>
          <text:list-item>
            <text:p text:style-name="P33">All Grenades and Thrown Weapons: 5/10/15</text:p>
          </text:list-item>
        </text:list>
        <text:p text:style-name="P49"><text:soft-page-break/>Fantasy Armor Value</text:p>
        <text:list xml:id="list135624397161873" text:continue-list="list135623495441118" text:style-name="WWNum1014">
          <text:list-item>
            <text:p text:style-name="P11"><text:span text:style-name="T10">Shield (+1 Armor)</text:span></text:p>
          </text:list-item>
          <text:list-item>
            <text:p text:style-name="P34">Helmet (+1 Armor)</text:p>
          </text:list-item>
          <text:list-item>
            <text:p text:style-name="P34">Gambeson (+1 Armor)</text:p>
          </text:list-item>
          <text:list-item>
            <text:p text:style-name="P34">Chainmail (2 Armor, bulky)</text:p>
          </text:list-item>
          <text:list-item>
            <text:p text:style-name="P34">Plate (3 Armor, bulky)</text:p>
          </text:list-item>
        </text:list>
        <text:p text:style-name="P49">Modern Armor Value</text:p>
        <text:list xml:id="list135623859105821" text:continue-list="list135624397161873" text:style-name="WWNum1015">
          <text:list-item>
            <text:p text:style-name="P35">Armor Vest (2 Armor)</text:p>
          </text:list-item>
          <text:list-item>
            <text:p text:style-name="P12"><text:span text:style-name="T10">Armor Jacket (3 Armor)</text:span></text:p>
          </text:list-item>
        </text:list>
        <text:h text:style-name="P58" text:outline-level="1"><text:bookmark-start text:name="the-game-mechanics"/>The Game Mechanics<text:bookmark-end text:name="the-game-mechanics"/></text:h>
        <text:h text:style-name="P60" text:outline-level="2"><text:bookmark-start text:name="scenes-and-rounds"/>Scenes and Rounds<text:bookmark-end text:name="scenes-and-rounds"/></text:h>
        <text:p text:style-name="P47">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105">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60" text:outline-level="2"><text:bookmark-start text:name="saves"/>Saves<text:bookmark-end text:name="saves"/></text:h>
        <text:p text:style-name="P47">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P105">If it is unclear which character should save in a situation, whomever is in more danger should make the save.</text:p>
        <text:p text:style-name="P105"><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h text:style-name="P60" text:outline-level="2"><text:bookmark-start text:name="advantage-disadvantage"/>Advantage &amp; Disadvantage<text:bookmark-end text:name="advantage-disadvantage"/></text:h>
        <text:p text:style-name="P47">A GM has the option of modifying the difficulty of saves using <text:span text:style-name="T1">Advantage</text:span> (where a character rolls two d20 and uses the higher roll) or <text:span text:style-name="T1">Disadvantage</text:span> (where a character rolls two d20 and uses the lower roll). When a character has both advantage and disadvantage, they cancel each other out.</text:p>
        <text:p text:style-name="P108">Optionally, if you don’t want to roll multiple dice, characters can add +3 to the players attribute for Advantage or -3 to the players attribute for Disadvantage.</text:p>
        <text:h text:style-name="P64" text:outline-level="2"><text:span text:style-name="T16">Opposed Saves</text:span></text:h>
        <text:p text:style-name="P53">If two characters are in direct opposition, <text:span text:style-name="T17">b</text:span>oth players <text:span text:style-name="T17">attempt</text:span> <text:span text:style-name="T17">a </text:span>save. If only one player succeeds, they win the opposed save. <text:span text:style-name="T17">Otherwise, </text:span>whomever rolled the higher number wins the opposed save.</text:p>
        <text:h text:style-name="P58" text:outline-level="1"><text:bookmark-start text:name="combat"/>Combat<text:bookmark-end text:name="combat"/></text:h>
        <text:h text:style-name="P60" text:outline-level="2"><text:bookmark-start text:name="rounds"/>Rounds<text:bookmark-end text:name="rounds"/></text:h>
        <text:p text:style-name="P47">A Round is roughly ten seconds of in-game in which all the characters can move and take an action.</text:p>
        <text:p text:style-name="P105">During the first round of combat, each PC must make a DEX save in order to act. Special circumstances, abilities, items, or skills may negate this requirement. PCs that fail their save lose their turn for this round.</text:p>
        <text:p text:style-name="P105">Their opponents then take their turn, and the first round ends. The next round begins with all the PCs taking their turn, followed by their opponents, and so on until combat has ended with one side defeated or fled.</text:p>
        <text:h text:style-name="P62" text:outline-level="2"><text:bookmark-start text:name="actions-1"/><text:soft-page-break/>Actions<text:bookmark-end text:name="actions-1"/></text:h>
        <text:p text:style-name="P47">On their turn, a character may move up to 40ft and take up to one action. This may be casting a spell, attacking, moving for a second time, or some other reasonable action. Each round, the PCs declare what they are doing before dice are rolled. If a character attempts something risky, the GM calls for a save for appropriate players or NPCs.</text:p>
        <text:h text:style-name="P60" text:outline-level="2"><text:bookmark-start text:name="attacking-damage"/>Attacking &amp; Damage<text:bookmark-end text:name="attacking-damage"/></text:h>
        <text:p text:style-name="P47">The attacker rolls their weapon die and subtracts the target’s armor, then deals the remaining total to their opponent’s HP. Attacks in combat automatically hit.</text:p>
        <text:p text:style-name="P107">Mark of the Odd style games usually have attacks automatically hit, but it’s your game. If you want, make players pass a skill check in order to hit, let the target make a skill check in order to evade the attack, or both.</text:p>
        <text:h text:style-name="P60" text:outline-level="2"><text:bookmark-start text:name="hit-protection"/>Hit Protection<text:bookmark-end text:name="hit-protection"/></text:h>
        <text:p text:style-name="P47">Hit Protection (HP) reflects a character’s ability to avoid damage in combat.</text:p>
        <text:p text:style-name="P105">This measurement does not indicate a character’s health or fortitude, nor do they lose it for very long.</text:p>
        <text:h text:style-name="P63" text:outline-level="2"><text:bookmark-start text:name="attack-modifiers"/>Attack Modifiers<text:bookmark-end text:name="attack-modifiers"/></text:h>
        <text:p text:style-name="P47">If fighting from a position of weakness (such as through cover or with bound hands), the attack is <text:span text:style-name="T1">Impaired</text:span>, and the attacker must roll 1d4 damage regardless of the attack’s damage die. Unarmed attacks always do d4 damage.</text:p>
        <text:p text:style-name="P105">If fighting from a position of advantage (such as against a helpless foe or through a daring maneuver), the attack is <text:span text:style-name="T1">Enhanced</text:span>, allowing the attacker to roll 1d12 damage instead of their normal die.</text:p>
        <text:p text:style-name="P105">Attacks with the <text:span text:style-name="T1">Blast</text:span> quality affect all targets in the noted area, rolling separately for each affected character. This can be anything from explosions to a dragon’s breath or the impact of a meteorite. If unsure how many targets can be affected, roll the related damage die for a result.</text:p>
        <text:p text:style-name="P117">If attacking with two weapons at the same time, roll both damage dice and keep the single highest result (denoted with a plus symbol, e.g. d8+d8).</text:p>
        <text:h text:style-name="P60" text:outline-level="2"><text:bookmark-start text:name="detachments"/>Detachments<text:bookmark-end text:name="detachments"/></text:h>
        <text:p text:style-name="P47">Large groups of similar combatants fighting together are treated as a single <text:span text:style-name="T1">Detachment</text:span>. When a Detachment takes critical damage, it is routed or significantly weakened. When it reaches 0 STR, it is destroyed.</text:p>
        <text:p text:style-name="P105">Attacks against Detachments by individuals are impaired (excluding blast damage).</text:p>
        <text:p text:style-name="P105">Attacks against individuals by Detachments are enhanced and deal blast damage.</text:p>
        <text:h text:style-name="P60" text:outline-level="2"><text:bookmark-start text:name="armor"/>Armor<text:bookmark-end text:name="armor"/></text:h>
        <text:p text:style-name="P47">Before calculating damage to HP, subtract the target’s Armor value from the result of damage rolls.</text:p>
        <text:p text:style-name="P105">Shields and similar armor provide a bonus defense (e.g. +1 Armor), but only while the item is held or worn. Some may also provide additional benefits, depending on the fiction.</text:p>
        <text:p text:style-name="P105">A PC, NPC, or monster cannot have more than 3 Armor.</text:p>
        <text:h text:style-name="P60" text:outline-level="2"><text:bookmark-start text:name="critical-damage"/>Critical Damage<text:bookmark-end text:name="critical-damage"/></text:h>
        <text:p text:style-name="P47">Damage that reduces a target’s HP below zero is subtracted from their STR by the amount of damage remaining. The target must then immediately make a STR save to avoid taking <text:span text:style-name="T1">Critical Damage</text:span>, using their new STR score. On a success, the target is still in the fight (albeit with a lower STR score) and must continue to make critical damage saves when incurring damage.</text:p>
        <text:p text:style-name="P105"><text:soft-page-break/>Any PC that suffers Critical Damage cannot do anything but crawl weakly, grasping for life. If given aid (such as bandages), they will stabilize. If left untreated, they die within the hour.</text:p>
        <text:p text:style-name="P105">NPCs and monsters that fail a Critical Damage save are considered dead, per the GM’s discretion. Additionally, some enemies will have special abilities or effects that are triggered when their target fails a critical damage save.</text:p>
        <text:h text:style-name="P60" text:outline-level="2"><text:bookmark-start text:name="attribute-loss"/>Attribute Loss<text:bookmark-end text:name="attribute-loss"/></text:h>
        <text:p text:style-name="P47">If a PC takes damage outside of combat, they should instead receive damage to an Attribute, typically STR.</text:p>
        <text:p text:style-name="P105">If a PC’s STR is reduced to 0, they die. If their DEX is reduced to 0, they are paralyzed. If their INT or CHA is reduced to 0, they are delirious.</text:p>
        <text:h text:style-name="P60" text:outline-level="2"><text:bookmark-start text:name="deprivation-fatigue"/>Deprivation &amp; Fatigue<text:bookmark-end text:name="deprivation-fatigue"/></text:h>
        <text:p text:style-name="P47">A PC that lacks a crucial need (such as food or rest) is Deprived. Anyone Deprived for more than a day adds Fatigue to their inventory, one for each day. A Deprived PC cannot recover HP, Attributes, or item slots from Fatigue.</text:p>
        <text:p text:style-name="P105">A PC may also be forced to add Fatigue after casting spells or due to events occurring in the fiction. Each Fatigue occupies one slot and lasts until the PC is able to recuperate (such as with a full night’s rest in a safe spot).</text:p>
        <text:p text:style-name="P105">If a character is forced to add Fatigue to their inventory but they have no free slots, they must drop an item from their inventory.</text:p>
        <text:h text:style-name="P60" text:outline-level="2"><text:bookmark-start text:name="healing-recovery"/>Healing &amp; Recovery<text:bookmark-end text:name="healing-recovery"/></text:h>
        <text:p text:style-name="P47">Resting for a few moments and having a drink of water restores lost HP but may leave the party exposed. Bandages can stabilize a character that has taken critical damage.</text:p>
        <text:p text:style-name="P105">Attribute loss can usually be restored with a week’s rest, facilitated by a healer or other appropriate source of expertise.</text:p>
        <text:p text:style-name="P105">Some healing services are free, while magical or more expedient means of recovery may come at a cost.</text:p>
        <text:h text:style-name="P58" text:outline-level="1"><text:bookmark-start text:name="experience"/>Experience<text:bookmark-end text:name="experience"/></text:h>
        <text:p text:style-name="P47">At the end of each session the GM awards each character a number of experience points. The number of points given per session typically varies from 3 to 7 depending on drama, danger, success, and fun!</text:p>
        <text:h text:style-name="P60" text:outline-level="2"><text:bookmark-start text:name="spending-experience-points-xp"/>Spending experience points (XP)<text:bookmark-end text:name="spending-experience-points-xp"/></text:h>
        <text:list xml:id="list135625556373957" text:continue-list="list135623859105821" text:style-name="WWNum1016">
          <text:list-item>
            <text:p text:style-name="P13"><text:span text:style-name="T10">Any skill may be made proficient at the cost of 20 XP.</text:span></text:p>
          </text:list-item>
          <text:list-item>
            <text:p text:style-name="P36">Any attribute may be used to increased by 1 at the cost of 20 + your current asttribute.</text:p>
          </text:list-item>
          <text:list-item>
            <text:p text:style-name="P36">At the GMs discretion, players may gain perks at the cost of 15 XP per point the perk normally costs.</text:p>
          </text:list-item>
        </text:list>
        <text:h text:style-name="P59" text:outline-level="1"><text:bookmark-start text:name="vehicles"/>Vehicles<text:bookmark-end text:name="vehicles"/></text:h>
        <text:p text:style-name="P47">All vehicles from ancient chariots to futuristic starships are defined by a common set of statistics. The following stats help the GM and players quickly resolve all actions related to vehicles.</text:p>
        <text:list xml:id="list135624647390640" text:continue-list="list135625556373957" text:style-name="WWNum1017">
          <text:list-item>
            <text:p text:style-name="P37"><text:span text:style-name="T1">Scale:</text:span> The size of the vehicle.</text:p>
          </text:list-item>
          <text:list-item>
            <text:p text:style-name="P37"><text:span text:style-name="T1">Body:</text:span> This is the save the vehicle uses to resist damage.</text:p>
          </text:list-item>
          <text:list-item>
            <text:p text:style-name="P14"><text:span text:style-name="T11">HP:</text:span><text:span text:style-name="T10"> How damage is tracked. When it reaches 0, a Body save is made.</text:span></text:p>
          </text:list-item>
          <text:list-item>
            <text:p text:style-name="P37"><text:span text:style-name="T1">Maneuverability:</text:span> How easy the vehicle is to handle. This tells if the Drive/Pilot skill save is made with Advantage or Disadvantage.</text:p>
          </text:list-item>
          <text:list-item>
            <text:p text:style-name="P37"><text:span text:style-name="T1">Speed:</text:span> How fast it can travel, relative to vehicles of similar types.</text:p>
          </text:list-item>
          <text:list-item>
            <text:p text:style-name="P37"><text:span text:style-name="T1">Crew:</text:span> The number needed to successfully operate the vehicle.</text:p>
          </text:list-item>
          <text:list-item>
            <text:p text:style-name="P37"><text:soft-page-break/><text:span text:style-name="T1">Passengers (Psg):</text:span> Non-crew capacity.</text:p>
          </text:list-item>
          <text:list-item>
            <text:p text:style-name="P37"><text:span text:style-name="T1">Weapons:</text:span> Any armaments mounted on the vehicle.</text:p>
          </text:list-item>
          <text:list-item>
            <text:p text:style-name="P37"><text:span text:style-name="T1">Cargo:</text:span> How much stuff it can carry.</text:p>
          </text:list-item>
        </text:list>
        <text:h text:style-name="P60" text:outline-level="2"><text:bookmark-start text:name="vehicle-combat"/>Vehicle Combat<text:bookmark-end text:name="vehicle-combat"/></text:h>
        <text:p text:style-name="P47">Some vehicles have weapons. Unless specified in their descriptions they are considered to be the same scale as the vehicle. Attacks are resolved in the similar manner as character vs.character combat with the only difference being the character uses their Drive/Pilot (DEX) skill to defend.</text:p>
        <text:h text:style-name="P60" text:outline-level="2"><text:bookmark-start text:name="scale-factor"/>Scale Factor<text:bookmark-end text:name="scale-factor"/></text:h>
        <text:p text:style-name="P47">Not all objects are on the same scale. Humans and horses may be close enough to be equals, but humans and dragons aren’t. When things that are different scales engage in combat, compare their scale factor.</text:p>
        <text:p text:style-name="P105"><text:span text:style-name="T1">When a bigger thing attacks a smaller thing:</text:span> The attack is at least Enhanced, but the defender may save to avoid the attack, perhaps with Advantge. <text:span text:style-name="T3">Optionally, when a bigger thing attacks a smaller thing, you may igonre the defenter’s armor.</text:span></text:p>
        <text:p text:style-name="P105"><text:span text:style-name="T1">When a smaller thing attacks a larger thing:</text:span> If it’s even possible to damage the target, the attack is Impared.</text:p>
        <text:h text:style-name="P60" text:outline-level="2"><text:bookmark-start text:name="damage-effect"/>Damage Effect<text:bookmark-end text:name="damage-effect"/></text:h>
        <text:p text:style-name="P47">All vehicles have 3 armor.</text:p>
        <text:p text:style-name="P105">When they take damage, the vehicle must make a Body check to see if its systems are affected. If the save is failed, one of the following will happen, based on t<text:span text:style-name="T18">he</text:span> severity of the damage.</text:p>
        <text:list xml:id="list135623841258546" text:continue-list="list1347952829" text:style-name="WWNum1018">
          <text:list-item text:start-value="1">
            <text:p text:style-name="P38"><text:span text:style-name="T2">Overloaded System:</text:span> Temporary effect for one round.</text:p>
          </text:list-item>
          <text:list-item>
            <text:p text:style-name="P38"><text:span text:style-name="T2">Damaged System:</text:span> Permanent effect until repaired.</text:p>
          </text:list-item>
          <text:list-item>
            <text:p text:style-name="P15"><text:span text:style-name="T12">Destroyed System:</text:span><text:span text:style-name="T10"> Permanent effect until parts replaced.</text:span></text:p>
          </text:list-item>
        </text:list>
        <text:p text:style-name="P47">Then the GM may roll randomly on the the following chart or use common sense to determine which part is damaged.</text:p>
        <text:p text:style-name="P109">Roll 1d6: Effect</text:p>
        <text:list xml:id="list135625261643929" text:continue-list="list135624647390640" text:style-name="WWNum1019">
          <text:list-item>
            <text:p text:style-name="P39">1: Disadvantage on Maneuverability</text:p>
          </text:list-item>
          <text:list-item>
            <text:p text:style-name="P16"><text:span text:style-name="T10">2 to 3: Random System Damaged</text:span></text:p>
          </text:list-item>
          <text:list-item>
            <text:p text:style-name="P39">4 to 6: Structural Damage</text:p>
          </text:list-item>
        </text:list>
        <text:p text:style-name="P49">Effects of Damage</text:p>
        <text:list xml:id="list135624519969622" text:continue-list="list135625261643929" text:style-name="WWNum1020">
          <text:list-item>
            <text:p text:style-name="P40">Maneuverability: When maneuverability becomes damaged, the vehicle has Disadvantage on Drive/Pilot saves.</text:p>
          </text:list-item>
          <text:list-item>
            <text:p text:style-name="P17"><text:span text:style-name="T10">System Damaged: Randomly select a vehicle’s system and it either becomes broken or loses 1d6 from its rating (if applicable). Examples include communications/radio, sensors, shielding, sail, rigging, armor, etc.</text:span></text:p>
          </text:list-item>
          <text:list-item>
            <text:p text:style-name="P40">Structural Damage: The vehicle receives one wound level. Treat these like character wound levels. Mortally wounded vehicles stop functioning and “dead” vehicles are considered destroyed.</text:p>
          </text:list-item>
        </text:list>
        <text:h text:style-name="P60" text:outline-level="2"><text:bookmark-start text:name="ramming"/>Ramming<text:bookmark-end text:name="ramming"/></text:h>
        <text:p text:style-name="P47">When vehicles are at short range, a pursuer may try to ram. The attacker and the defender make <text:span text:style-name="T18">opposed </text:span>Drive/Pilot saves, and <text:span text:style-name="T18">the vehicle that </text:span>fails takes d8 damage.</text:p>
        <text:h text:style-name="P60" text:outline-level="2"><text:bookmark-start text:name="weapon-ranges-in-space"/>Weapon Ranges in Space<text:bookmark-end text:name="weapon-ranges-in-space"/></text:h>
        <text:p text:style-name="P47">Space is big and empty. Guns shoot great distances and ships are extremely fast. The ranges given are abstract units that are defined by the needs of the individual game.</text:p>
        <text:h text:style-name="P60" text:outline-level="2"><text:bookmark-start text:name="chases"/>Chases<text:bookmark-end text:name="chases"/></text:h>
        <text:p text:style-name="P47">When attempting to overtake or outrun an opponent the GM determines what range you are at (Short/Medium/Long). Each turn each vehicle makes a Dri<text:span text:style-name="T14">v</text:span>e/Pilot save check, with the faster vehicle gainin<text:span text:style-name="T14">g</text:span> Advantage on the check. If both parties save or fail, there is no change. If only one <text:soft-page-break/>party succeeds, then they can decide to increase or decrease the distance between the two vehicles.</text:p>
        <text:h text:style-name="P60" text:outline-level="2"><text:bookmark-start text:name="repairing-vehicles"/>Repairing Vehicles<text:bookmark-end text:name="repairing-vehicles"/></text:h>
        <text:p text:style-name="P47">Characters may repair vehicles using their skills. The difficulty and cost is determined on the following chart. The cost is based on the price of a new vehicle.</text:p>
        <text:list xml:id="list135624013381792" text:continue-list="list135624519969622" text:style-name="WWNum1021">
          <text:list-item>
            <text:p text:style-name="P41"><text:span text:style-name="T2">Light damage</text:span>: Advantge to fix. Takes 1 Hour + costs.</text:p>
          </text:list-item>
          <text:list-item>
            <text:p text:style-name="P18"><text:span text:style-name="T12">Medium damage:</text:span><text:span text:style-name="T10"> Standard roll to fix. Takes 4 Hours + costs.</text:span></text:p>
          </text:list-item>
          <text:list-item>
            <text:p text:style-name="P41"><text:span text:style-name="T2">Heavy damage:</text:span> Disadvantage to fix. Takes 1 Day + costs.</text:p>
          </text:list-item>
        </text:list>
        <text:h text:style-name="P60" text:outline-level="2"><text:bookmark-start text:name="sample-fantasy-vehicles"/>Sample Fantasy Vehicles<text:bookmark-end text:name="sample-fantasy-vehicles"/></text:h>
        <text:p text:style-name="P47"><text:span text:style-name="T1">Air Ship:</text:span>: Cost: Only the richest individuals, most governments. Scale: Large, Maneuverability: Disadvantage, Body/HP: 7, Speed: Very Slow, Crew: 4, Psg: 12, Cargo: 2 tons.</text:p>
        <text:p text:style-name="P105"><text:span text:style-name="T1">Automaton</text:span>: Cost: Only the richest individuals, most governments. Scale: Medium, Maneuverability: Disadvantage, Body/HP: 14, Speed: Very Slow, Crew: 1, Psg: 0, Cargo: None, Weapon: Mace (d6), range: melee.</text:p>
        <text:p text:style-name="P105"><text:span text:style-name="T1">Galleon:</text:span> Cost: Affordable to the very wealthy, governments, and corps. Scale: Large, Maneuverability: Disadvantage, Body/HP: 14, Speed: Moderate, Crew: 70, Psg: 30, Cargo: 15 tons, Weapons: 16 cannons (d12/ea), 8 small cannons (d10/ea), range: 10/30/50., Note: May only fire 50% of guns at one target once every three turns.</text:p>
        <text:p text:style-name="P105"><text:span text:style-name="T1">Small Ship:</text:span> Cost: Affordable to most., Scale: Large, Maneuverability: Standard, Body/HP: 10, Speed: Moderate, Crew: 12, Psg: 8, Cargo: 5 tons, Weapons: 6 cannons (d12/ea), range: 10/30/50., Note: May only fire 50% of guns at one target once every three turns.</text:p>
        <text:h text:style-name="P60" text:outline-level="2"><text:bookmark-start text:name="sample-modern-vehicles"/>Sample Modern Vehicles<text:bookmark-end text:name="sample-modern-vehicles"/></text:h>
        <text:p text:style-name="P47"><text:span text:style-name="T1">Car:</text:span> Cost: Affordable to most. Scale: Medium, Maneuverability: Standard, Body/HP: 8, Speed: Moderate, Crew: 1, Psg: 4, Cargo: 500 lbs.</text:p>
        <text:p text:style-name="P105"><text:span text:style-name="T1">Fighter Jet:</text:span> Cost: Only large governments and megacorps can purchase., Scale: Very Large, Maneuverability: Advantage, Body/HP: 10, Speed: Fast, Crew: 1 or 2, Psg: 0, Cargo: None, Weapons: Guns (d10), range: 30/50/100; 4 missiles (d12/ea), range: 0.5 mile / 2 miles / 5 miles.</text:p>
        <text:p text:style-name="P105"><text:span text:style-name="T1">Motorcycle:</text:span> Cost: Trivial cost., Scale: Medium, Maneuverability: Advantage, Body/HP: 7, Speed: Moderate, Crew: 1, Psg: 1, Cargo: None</text:p>
        <text:p text:style-name="P105"><text:span text:style-name="T1">Sports Car:</text:span> Cost: Affordable to the very wealthy, governments, and corps., Scale: Medium, Maneuverability: Advantage, Body/HP: 8, Speed: Fast, Crew: 1, Psg: 1, Cargo: 200 lbs</text:p>
        <text:p text:style-name="P105"><text:span text:style-name="T1">Tank:</text:span> Cost: Only the richest individuals, most governments., Scale: Medium, Maneuverability: Standard, Body/HP: 16, Speed: Moderate, Crew: 3, Psg: 1, Cargo: 500 lbs, Weapons: BFG (character scale, see gear), Main Gun (6d6), range: 1/2 mile / 1 mile / 2 miles.</text:p>
        <text:h text:style-name="P60" text:outline-level="2"><text:bookmark-start text:name="sample-sci-fi-vehicles"/>Sample Sci-Fi Vehicles<text:bookmark-end text:name="sample-sci-fi-vehicles"/></text:h>
        <text:p text:style-name="P47"><text:span text:style-name="T1">Air Cycle:</text:span> Cost: Trivial cost., Scale: Medium, Maneuverability: Advantage, Body/HP: 8, Speed: Fast, Crew: 1, Psg: 1, Cargo: None</text:p>
        <text:p text:style-name="P105"><text:span text:style-name="T1">Capital Ship:</text:span> <text:span text:style-name="T3">Galaxy Class Destroyer.</text:span> Cost: World governments and star empires only., Scale: Immense, Skill: Command, Maneuverability: Disadvantage, Body/HP: 19, Speed: Very Slow, Crew: 5,000, Psg: 500, Cargo: 100 kilotons 30 starfighters., Weapons: 100 AA Guns (d12, Fighter scale), range 1/3 /5; 32 Plasma Cannons (d12), range 5/10/15; 6 100 Megaton Warheads (d20+d20), range 15. </text:p>
        <text:p text:style-name="P105"><text:soft-page-break/><text:span text:style-name="T1">Mecha:</text:span> Cost: Only the richest individuals, most governments., Scale: Large, Skill: Mecha, Maneuverability: Standard, Body/HP: 16, Speed: Moderate, Crew: 1, Psg: 0, Cargo: None, Weapons: Punch (d10, melee); Arm Gun (d12), range: 400 yards / 1/2 mile / 1 mile.</text:p>
        <text:p text:style-name="P105"><text:span text:style-name="T1">Star Fighter:</text:span> Cost: Affordable to the very wealthy, governments, and corps., Scale: Very Large, Maneuverability: Advantage, Body/HP: 11, Speed: Very Fast, Crew: 1 + 1 Robot, Psg: 0, Cargo: None, Weapons: Twin Guns (d12), range: 1/3/5.</text:p>
        <text:p text:style-name="P105"><text:span text:style-name="T1">Star Yacht:</text:span> <text:span text:style-name="T3">The choice of beginner smugglers.</text:span> , Cost: Only the richest individuals, most governments., Scale: Very Large, Maneuverability: Standard, Body/HP: 14, Speed: Fast, Crew: 2, Psg: 8, Cargo: 50 tons</text:p>
        <text:h text:style-name="P58" text:outline-level="1"><text:bookmark-start text:name="sample-characters-by-genre"/>Sample Characters by Genre<text:bookmark-end text:name="sample-characters-by-genre"/></text:h>
        <text:h text:style-name="P60" text:outline-level="2"><text:bookmark-start text:name="elite-enemies-challenge-rating"/>Elite Enemies &amp; Challenge Rating<text:bookmark-end text:name="elite-enemies-challenge-rating"/></text:h>
        <text:p text:style-name="P47">To create a more powerful version of an enemy, give them more HP and allow them to take multiple actions, effectively treating the one enemy as though it were several, the specific number of which is called the <text:span text:style-name="T1">Challenge Rating</text:span> (CR) of the enemy. <text:span text:style-name="T3">For example, a CR 2 Elite Zombie would have 12 HP and could attack twice per turn or attack once with d6+d6</text:span></text:p>
        <text:h text:style-name="P60" text:outline-level="2"><text:bookmark-start text:name="all-genres-characters"/>All Genres Characters<text:bookmark-end text:name="all-genres-characters"/></text:h>
        <text:p text:style-name="P47"><text:span text:style-name="T1">Average Human:</text:span> 3 HP, 7 STR, 7 DEX, 7 INT, 7 CHA. Skills: Proficient in two skills. Combat: Hand-to-hand d4. Gear: As needed by profession. <text:span text:style-name="T3">Your basic everyman.</text:span></text:p>
        <text:h text:style-name="P66" text:outline-level="2"/>
        <text:h text:style-name="P67" text:outline-level="2"><text:bookmark-start text:name="all-genres-creatures"/>All Genres Creatures<text:bookmark-end text:name="all-genres-creatures"/></text:h>
        <text:p text:style-name="P47"><text:span text:style-name="T1">Bear:</text:span> 6 HP, 15 STR, 13 DEX, 2 INT, 5 CHA (proficent in Willpower). Combat: Claws (d8+d8), bite (d10). Aggressive, 9’ tall reddish-brown bears found in mountains, woodlands, and prairies. They prefer to eat fish and meat, and are not opposed to attacking the rare unfortunate to cross their path.</text:p>
        <text:p text:style-name="P105"><text:span text:style-name="T1">Boar:</text:span> 3 HP, 12 STR, 10 DEX, 2 INT, 5 CHA (proficent in Willpower). Combat: Tusks (d6). Omnivorous wild boars that dwell primarily in forests. Not naturally aggressive, but dangerous if disturbed. Critical Damage: Gores its victims, causing great loss of blood.</text:p>
        <text:p text:style-name="P105"><text:span text:style-name="T1">Dog:</text:span> 3 HP, 10 STR, 12 DEX, 2 INT, 7 CHA (proficent in Willpower). Combat: Bite (d6). Bulky, domestic breeds with a ferocious nature. Track by scent. Once started, very difficult to put off the trail. Only attack at their owner’s command.</text:p>
        <text:p text:style-name="P105"><text:span text:style-name="T1">Elk:</text:span> 3 HP, 3 HP, 13 STR, 11 DEX, 2 INT, 5 CHA (proficent in Willpower). Combat: Antlers (d10), kick (d8). <text:span text:style-name="T3">Any large herbivore.</text:span></text:p>
        <text:p text:style-name="P105"><text:span text:style-name="T1">Elephant:</text:span> 9 HP, 16 STR, 6 DEX, 2 INT, 5 CHA (proficent in Willpower). Combat: Tusks (d10). Large tusked animals that dwell near hot forests. Found both alone and in herds. With enough open ground for a clear run, it will charge its victims, enhancing damage. Its tusks can be sold for high amounts of gold if removed whole.</text:p>
        <text:p text:style-name="P105"><text:span text:style-name="T1">Gorilla:</text:span> 6 HP, 14 STR, 10 DEX, 3 INT, 7 CHA (proficent in Willpower). Combat: Fists (d6+d6). Large, muscular apes that dwell in hot jungles. Mostly peaceful until provoked, but will impose itself on the presence of its young. Critical Damage: Rends the victim for 1d4 extra STR damage.</text:p>
        <text:p text:style-name="P105"><text:span text:style-name="T1">Horse:</text:span> 4 HP, 14 STR, 10 DEX, 2 INT, 6 CHA (proficent in Willpower). Combat: Kick d8. Can pull a cart or waggon. <text:line-break/><text:span text:style-name="T3">Saddle up.</text:span></text:p>
        <text:p text:style-name="P118"><text:soft-page-break/><text:span text:style-name="T1">Horse, War:</text:span> 6 HP, 1 ARMOR, 14 STR, 10 DEX, 2 INT, 5 CHA (proficent in Willpower). Combat: Trample (d8). Not scared by noise or battle. Can be ridden in battle. Costs 200 gp to buy. Can carry up to 4 slots of items, if not mounted, but are usually ridden.</text:p>
        <text:p text:style-name="P105"><text:span text:style-name="T1">Snake, Pit Viper:</text:span> 3 HP, 12 DEX, 2 INT, 3 CHA (proficent in Willpower). Combat: Bite (d6). 5’ long snakes with grayish scales, found in caves and other dark places. Does not rely on vision, instead, senses its victims by their body heat. Critical Damage: The poison kills the target in a day if a antidote isn’t applied.</text:p>
        <text:p text:style-name="P105"><text:span text:style-name="T1">Snake, Spitting Cobra:</text:span> 3 HP, 14 DEX, 2 INT, 3 CHA (proficent in Willpower). Combat: Acid spit (d6). 3’ long snake with grey and white scales. Notably shy, live in places where they can blend in. Attack from distance with their acidic spit, always aiming for the head of the target. Critical Damage: The acid corrodes the target’s face, permanently damaging its visage and senses.</text:p>
        <text:p text:style-name="P105"><text:span text:style-name="T1">Tiger:</text:span> 6 HP, 14 STR, 14 DEX, 2 INT, 5 CHA (proficent in Willpower). Combat: Bite (d8), claws (d6+d6). Striped, solitary felines. Lives in woodlands and in colder regions. Uses camouflage and stealth to hunt and surprise their victims.</text:p>
        <text:p text:style-name="P105"><text:span text:style-name="T1">Wolf:</text:span> 6 HP, 12 STR, 14 DEX, 2 INT, 5 CHA (proficent in Willpower). Combat: Bite (d8). Large canines that dwell primarily in wildlands, but occasionally lair in caves. Can be trained like dogs if captured young. Often found in packs of at least 4.</text:p>
        <text:p text:style-name="P105"><text:span text:style-name="T1">Wolf, Dire:</text:span> 8 HP, 14 STR, 12 DEX, 2 INT, 5 CHA (proficent in Willpower). Combat: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h text:style-name="P60" text:outline-level="2"><text:bookmark-start text:name="modern-stock-characters"/>Modern Stock Characters<text:bookmark-end text:name="modern-stock-characters"/></text:h>
        <text:p text:style-name="P47"><text:span text:style-name="T1">Confidence Man:</text:span> 4 HP, 8 STR, 9 DEX, 12 INT, 12 CHA. Combat: Hand-to-hand (d4). Skills: Proficient in Contacts (CHA), Deceive (CHA), Empathy (CHA). Gear: Counterfeit money, fake ID, stolen credit card. <text:span text:style-name="T3">“Have I got a deal for you. . .”</text:span></text:p>
        <text:p text:style-name="P105"><text:span text:style-name="T1">Criminal:</text:span> 4 HP, 10 STR, 9 DEX, 7 INT, 7 CHA. Combat: Crowbar (d6), heavy pistol (d8). Skills: Proficient in Fight (STR), Burglary (DEX), Stealth (DEX). Gear: Crowbar, heavy pistol, ski mask. <text:span text:style-name="T3">Mooks!</text:span></text:p>
        <text:p text:style-name="P105"><text:span text:style-name="T1">Ninja:</text:span> 5 HP, 12 STR, 14 DEX, 10 INT, 10 CHA. Combat: Sword (d10). Skills: Proficient in Athletics (STR), Fight (STR), Acrobatics (DEX), Stealth (DEX), Gear: Sword. <text:span text:style-name="T3">Agent of the shadows.</text:span></text:p>
        <text:p text:style-name="P105"><text:span text:style-name="T1">Policeman</text:span> 3 HP, 2 Armor, 11 STR, 10 DEX, 10 INT, 10 CHA. Combat: Pistol (d8). Skills: Proficient in Shoot (DEX), Investigate (INT), Perception (INT). Gear: Armor vest, handcuffs, heavy pistol. <text:span text:style-name="T3">To serve and protect.</text:span></text:p>
        <text:p text:style-name="P105"><text:span text:style-name="T1">Soldier:</text:span> 3 HP, 12 STR, 12 DEX, 10 INT, 10 CHA. Combat: Rifle (d10). Skills: Proficient in Athletics (STR), Fight (STR), Shoot (DEX). Gear: Armor jacket, rifle (bulky). <text:span text:style-name="T3">The few, the proud.</text:span></text:p>
        <text:p text:style-name="P105"><text:span text:style-name="T1">Spy:</text:span> 4 HP, 10 STR, 12 DEX, 12 INT, 12 CHA. Combat: Light Pistol (d6). Skills: Proficient in Shoot (DEX), Stealth (DEX), Deceive (CHA), Empathy (CHA). Gear: Camera, passport, light pistol, secret phone, sports car, suicide pill. <text:span text:style-name="T3">Licensed to kill.</text:span></text:p>
        <text:h text:style-name="P60" text:outline-level="2"><text:bookmark-start text:name="sci-fi-stock-characters"/>Sci-Fi Stock Characters<text:bookmark-end text:name="sci-fi-stock-characters"/></text:h>
        <text:p text:style-name="P47"><text:span text:style-name="T1">Apprentice-Mystic:</text:span> 4 HP, 11 STR, 13 DEX, 11 INT, 10 CHA. Combat: Plasma sword (d12). Skills: Proficient in Fight (STR), Acrobatics (DEX), Arcana (INT), Perception (INT). Gear: Plasma sword. Perks: Spellcaster (Telekinesis). <text:span text:style-name="T3">Devoted pupil.</text:span></text:p>
        <text:p text:style-name="P105"><text:soft-page-break/><text:span text:style-name="T1">Cybercop:</text:span> 7 HP, 3 ARMOR, 15 STR, 12 DEX, 9 INT, 9 CHA. Combat: Pistol (d10). Skills: Proficient in Physique (STR), Shoot (DEX), Intimidation (CHA). Gear: Armor jacket, special heavy pistol. Perks: Cybernetics (dermal armor +3, built-in holster in leg) <text:span text:style-name="T3">“Stand down, citizen.”</text:span></text:p>
        <text:p text:style-name="P105"><text:span text:style-name="T1">Kid Genius:</text:span> 3 HP, 7 STR, 11 DEX, 13 INT, 8 CHA. Combat: Hand-to-hand (d4). Skills: Proficient in Craft (INT), Investigate (INT), Lore (INT), Technical (INT). Gear: Baseball, pocket knife, galaxy guide. <text:span text:style-name="T3">“You didn’t know that?! Hah!”</text:span></text:p>
        <text:p text:style-name="P105"><text:span text:style-name="T1">Knight-Mystic:</text:span> 6 HP, 11 STR, 13 DEX, 11 INT, 9 CHA. Combat: Plasma sword (d12). Skills: Proficient in Fight (STR), Acrobatics (DEX), Arcana (INT), Investigate (INT), Empathy (CHA). Gear: Plasma sword. Perks: Spellcaster (Telekinesis, Telepathy) <text:span text:style-name="T3">Monastic warriors of truth.</text:span></text:p>
        <text:p text:style-name="P105"><text:span text:style-name="T1">Reptoid Pilot:</text:span> 3 HP, 1 ARMOR, 14 STR, 12 DEX, 9 INT, 9 CHA. Combat: Claws (d4+1), plasma pistol (d10). Skills: Proficient in Drive/Pilot (DEX), Shoot (DEX), Stealth (DEX). Gear: Plasma pistol, star yacht. Perks: Reptoid. <text:span text:style-name="T3">Smuggler with two hearts of gold.</text:span></text:p>
        <text:p text:style-name="P105"><text:span text:style-name="T1">Robot Mechanic:</text:span> 5 HP, 11 STR, 7 DEX, 14 INT, 6 CHA. Combat: Tools (d4). Skills: Proficient in Craft (INT), Perception (INT), Technical (INT). Perks: Robot (Built in tools: drill, extinguisher, oiler, saw, spanner, spot welder, magnetic feet). <text:span text:style-name="T3">“Beep.”</text:span></text:p>
        <text:h text:style-name="P60" text:outline-level="2"><text:bookmark-start text:name="pulp-stock-characters"/>Pulp Stock Characters<text:bookmark-end text:name="pulp-stock-characters"/></text:h>
        <text:p text:style-name="P47"><text:span text:style-name="T1">Cultist:</text:span> 4 HP, 8 STR, 8 DEX, 9 INT, 7 CHA. Combat: Knife (d6). Skills: Proficient in Fight (STR), Stealth (DEX), Arcana (INT). Gear: Robes, knife. <text:span text:style-name="T3">“We’re not worthy.”</text:span></text:p>
        <text:p text:style-name="P105"><text:span text:style-name="T1">Dame in Distress:</text:span> 4 HP, 7 STR, 8 DEX, 9 INT, 11 CHA. Skills: Proficient in Fight (STR), Acrobatics (DEX), Perception (INT), Empathy (CHA), Persuasion (CHA). Willpower (CHA). Combat: Hand-to-hand d4. Gear: Compact mirror, hair pin, lipstick. <text:span text:style-name="T3">“Anything goes.”</text:span></text:p>
        <text:p text:style-name="P105"><text:span text:style-name="T1">Elder God:</text:span> 14 HP, 2 ARMOR, DETACHMENT, 17 STR, 13 DEX, 20 INT, 20 CHA. Skills: Proficient in Arcana (INT), Lore (INT), Perception (INT), Deceive (CHA), Empathy (CHA), Intimidation (CHA), Persuasion (CHA), Willpower (CHA). Combat: Crushing strike (d12+d12) Perks: Maddening Visage (All characters that witness the Elder God must succeed on a CHA save with Disadvantage or gain the Crazy complication); Dimensional Shift (The Elder God can return to it’s home dimension after it’s Cosmic Appetite is sated), Spellcaster (all spells). Complications: Summoning Ritual (The Elder God will appear when summoned. Summoning requires a Heroic Magic roll if its secret name is known to the summoner.) Cosmic Appetite (It must eat 1d6 characters before it may activate Dimensional Shift.) <text:span text:style-name="T3">“Klaatu barada nikto.”</text:span></text:p>
        <text:p text:style-name="P105"><text:span text:style-name="T1">Mad Scientist:</text:span> 4 HP, 8 STR, 8 DEX, 14 INT, 8 CHA. Combat: Hand-to-hand (d4). Skills: Proficient in Craft (INT), Investigate (INT), Technical (INT), Contacts (CHA). <text:span text:style-name="T3">“1.21 jigawatts should do it!”</text:span></text:p>
        <text:h text:style-name="P60" text:outline-level="2"><text:bookmark-start text:name="pulp-creatures"/>Pulp Creatures<text:bookmark-end text:name="pulp-creatures"/></text:h>
        <text:p text:style-name="P120"><text:span text:style-name="T1">Cat, Sabre-Toothed Tiger:</text:span> 8 HP, 15 STR, 14 DEX, 2 INT, 5 CHA<text:line-break/>(proficent in Willpower). Combat: Bite (d12), claws (d6+d6). Huge, primeval cats with enormous fangs. Extremely rare, generally found in regions untouched by civilization.</text:p>
        <text:p text:style-name="P47"><text:span text:style-name="T1">Deep One:</text:span> 6 HP, 10 STR, 10 DEX, 10 INT, 10 CHA. Skills: Proficient in Athletics (STR), Arcna (INT), Willpower (CHA). Combat: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105"><text:soft-page-break/><text:span text:style-name="T1">Snake Person:</text:span> 6 HP, 1 Armor, 10 STR, 12 DEX, 12 INT, 10 CHA. Combat: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105"><text:span text:style-name="T1">Tyrannosaurus:</text:span> 18 HP, 1 Armor, DETACHMENT, 18 STR, 12 DEX, 4 INT, 6 CHA (proficent in Willpower). Combat: Bite (d10+d10), Detachment. Massive, two-legged, predatory reptiles with huge jaws. Extremely rare, can only be found in large regions of untouched wilderness. Only hunt large and dangerous prey, always attacking the most threatening foe first.</text:p>
        <text:h text:style-name="P60" text:outline-level="2"><text:bookmark-start text:name="fantasy-stock-characters"/>Fantasy Stock Characters<text:bookmark-end text:name="fantasy-stock-characters"/></text:h>
        <text:p text:style-name="P47"><text:span text:style-name="T1">Acolyte:</text:span> 4 HP, 1 Armor, 10 STR, 10 DEX, 12 INT, 10 CHA. Combat: Mace (d8) or ceremonial dagger (d6). Skills: Proficient in Arcana (INT), Lore (INT), Willpower (CHA). Gear: Holy Symbol (Ward once per day). Holy men and women bound to a particular deity. Normally travel in groups of 4+.</text:p>
        <text:p text:style-name="P105"><text:span text:style-name="T1">Berserker:</text:span> 10 HP, 1 Armor, 14 STR, 13 DEX, 10 INT, 10 CHA. Combat: Twin axes (d8+d8). Skills: Proficient in Fight (STR), Physique (STR), Survival (INT), Intimidation (CHA). Ruthless warriors that derive their power from the skins they wear: bears, wolves, boards, etc. Rage: The Berserker enters a state of pure fury, their attacks gaining the Enhanced and Blast quality until they take STR damage.</text:p>
        <text:p text:style-name="P105"><text:span text:style-name="T1">Dwarf Warrior:</text:span> 4 HP, 2 Armor, 14 STR, 10 DEX, 10 INT, 10 CHA. Combat: Hammer (d8). Skills: Proficient in Fight (STR), Craft (INT), Technical (INT), Willpower (CHA). Short, bulky, humanoids with tough skin like earth and stone. Dwell in mountains and underground. Do not rely on light, being able to see shapes and heat patterns in darkness. Highly resistant to poison and disease.</text:p>
        <text:p text:style-name="P105"><text:span text:style-name="T1">Elf Bowman:</text:span> 4 HP, 1 Armor, 8 STR, 14 DEX, 12 INT, 12 CHA. Combat: Shortswords (d6+d6) or longbow (d8). Skills: Proficient in Fight (STR), Acrobatics (DEX), Shoot (DEX), Lore (INT). Gear: a Spellbook (choose one: Charm or Detect Magic). Slender, long-lived, fey humanoids with pointed ears. Live in harmony with nature, adapting to it instead of conquering. Highly resistant to charming and mind-controlling effects.</text:p>
        <text:p text:style-name="P105"><text:span text:style-name="T1">Hunter:</text:span> 5 HP, 11 STR, 11 DEX, 10 INT, 10 CHA. Combat: Bow (d6), dagger (d6). Skills: Proficient in Athletics (STR), Shoot (DEX), Stealth (DEX), Survival (INT). Gear: Bow, dagger, tent. Don’t usually fight people, but a bit more adept at dealing with danger. May also have some traps on them.</text:p>
        <text:p text:style-name="P105"><text:span text:style-name="T1">Knight:</text:span> 10 HP, 3 ARMOR, 12 STR, 12 DEX, 10 INT, 12 CHA. Combat: Longsword (d10). Skills: Proficient in Fight (STR), Physique (STR), Perception (INT), Intimidation (CHA), Willpower (CHA). Gear: Armor, horse, longsword. Sworn to a particular noble and will fight as long as they are alive. If they flee, they become outlaws.</text:p>
        <text:p text:style-name="P105"><text:span text:style-name="T1">Merchant:</text:span> 4 HP, 1 ARMOR, 8 STR, 10 DEX, 10 INT, 12 CHA. Skills: Proficient in Finesse (DEX), Craft (INT), Empathy (CHA), Persuasion (CHA). Combat: Dagger d6. Gear: Dgger. Carry valuable items for sale according to ther trade.</text:p>
        <text:p text:style-name="P105"><text:span text:style-name="T1">Militia:</text:span> 5 HP, 11 STR, 11 DEX, 10 INT, 10 CHA. Skills: Proficient in Fight (STR), Shoot (DEX). Combat: Various weapons d8 to d10. Gear: Gear: Pick from (<text:span text:style-name="T1">a</text:span>) 1 armor and halberd, or (<text:span text:style-name="T1">b</text:span>) 2 armor and spear, or (<text:span text:style-name="T1">c</text:span>) 1 armor and crossbow. Generally farmers who have been conscripted by nobles and given some training.</text:p>
        <text:p text:style-name="P118"><text:span text:style-name="T1"/></text:p>
        <text:p text:style-name="P119"><text:soft-page-break/><text:span text:style-name="T1">Noble:</text:span> 4 HP, 3 ARMOR, 10 STR, 10 DEX, 10 INT, 10 CHA. Skills: Proficient in Fight (STR), Lore (INT), Intimidation (CHA), Persuasion (CHA). Combat: Longsword (d10). Gear: Access to the best armour and weapons. 1 in 4 chance of gaving a random spell scroll. Trained to fight from a young age. Almost always have followers of some sort. Often have a good war horse.</text:p>
        <text:p text:style-name="P105"><text:span text:style-name="T1">Traveling Guards:</text:span> 5 HP, 2 ARMOR, 12 STR, 10 DEX, 10 INT, 10 CHA. Skills: Proficient in Fight (STR), Perception (INT), Survival (INT). Combat: Sword d8. Gear: Sword, armor. A slightly more respectable type of mercenary, typically hired by merchants and other travelers as protection on a journey. Could be good work for an adventuring party as well. Commonly experts in a particular route and its dangers, with a preference for avoiding danger where possible. Cost twice as much as typical hirelings, but will only be willing to provide protection and guidance on a particular route according to a pre-determined agreement.</text:p>
        <text:p text:style-name="P105"><text:span text:style-name="T1">Villager:</text:span> 4 HP, 10 STR, 10 DEX, 10 INT, 10 CHA. Skills: Proficient in Craft (INT), Empathy (CHA). Combat: Farm implement (d6). Will not fight unless there is absolutely no other option.</text:p>
        <text:p text:style-name="P105"><text:span text:style-name="T1">Brigand:</text:span> 4 HP, 1 Armor, 12 STR, 12 DEX, 9 INT, 9 CHA. Combat: Shortsword (d6) or short bow (d6). Skills: Proficient in Fight (STR) or Shoot (DEX), Stealth (DEX), Survival (INT). Outlaws and mercenaries who raid settlements and ambush travelers. Travel in large groups. A brigand eader wearing chainmail or similar (2 Armor) and a longsword (d8) or crossbow (d8). If the leader dies, the Brigands will flee.</text:p>
        <text:p text:style-name="P118"><text:span text:style-name="T1">Buccaneer:</text:span> 4 HP, 11 STR, 14 DEX, 10 INT, 11 CHA. Combat: scimitar (d6). Skills: Proficient in Fight (STR), Acrobatics (DEX), Drive/Pilot (DEX). Outlaw sailors who raid coastal settlements, as well as other ships. Travel in large ship crews, only fighting in clear advantage (generally numerical).</text:p>
        <text:p text:style-name="P105"><text:span text:style-name="T1">Bandit:</text:span> 4 HP, 11 STR, 14 DEX, 10 INT, 11 CHA. Combat: Dagger (d6). Skills: Proficient in Burglary (DEX), Finesse (DEX), Stealth (DEX), Perception (INT). Thieves who value wealth over all else. Use disguises, stealth, and trickery to surprise victims.</text:p>
        <text:p text:style-name="P105"><text:span text:style-name="T1">Gnome:</text:span> 4 HP, 8 STR, 12 DEX, 12 INT, 10 CHA. Combat: Crossbow (d8, bulky). Skills: Proficient in Finesse (DEX), Arcana (INT), Craft (INT).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105"><text:span text:style-name="T1">Halfling:</text:span> 4 HP, 8 STR, 14 DEX, 14 INT, 14 CHA. Combat: Shortswords (d6+d6). Skills: Proficient in Shoot (DEX), Stealth (DEX), Willpower (CHA). Small humanoids with hairy feet live in small settlements called shires. Highly resistant to fear effects.</text:p>
        <text:p text:style-name="P105"><text:span text:style-name="T1">Dark Forest Sorcerer:</text:span> 5 HP, 9 STR, 11 DEX, 10 INT, 12 CHA. Combat: Leystaff (d8), a Spellbook (Choose one: Charm, Hypnotize, Push/Pull, Shield). Skills: Proficient in Stealth (DEX), Arcana (INT), Deceive (CHA). The Watchers of the Wood; a cult that derive their power from leylines, rune stones, and the like. Critical Damage: leech a part of the victim’s soul (1d4 STR damage).</text:p>
        <text:h text:style-name="P60" text:outline-level="2"><text:bookmark-start text:name="fantasy-bestiary"/>Fantasy Bestiary<text:bookmark-end text:name="fantasy-bestiary"/></text:h>
        <text:p text:style-name="P47"><text:span text:style-name="T1">Blink Dog:</text:span> 5 HP, 11 STR, 14 DEX, 5 INT, 5 CHA (proficent in Willpower). Combat: bite (d6). Intelligent, wild dogs that travel in packs. After each attack, they may teleport a safe distance away.</text:p>
        <text:p text:style-name="P105"><text:span text:style-name="T1"/></text:p>
        <text:p text:style-name="P113"><text:soft-page-break/><text:span text:style-name="T1">Centaur:</text:span> 6 HP, 1 Armor, 14 STR, 12 DEX, 10 INT, 8 CHA. Combat: Spear (d8) or short bow (d6). Skills: Proficient in Athletics (STR), Fight (STR), Shoot (DEX). Creatures with the lower body and legs of a horse and the upper body, arms and head of a humanoid. Uses their great speed to hunt for food in the forest and plains.</text:p>
        <text:p text:style-name="P105"><text:span text:style-name="T1">Demonic Knight:</text:span> 12 HP, 3 Armor, 16 STR, 8 DEX, 12 INT, 12 CHA. Combat: Longsword (d10). Skills: Proficient in Fight (STR), Physique (STR), Intimidation (CHA), Persuasion (CHA), Willpower (CHA).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filled with bloodthirsty hatred.</text:p>
        <text:p text:style-name="P105"><text:span text:style-name="T1">Dragon, Black:</text:span> 16 HP, 1 Armor, 13 STR, 18 DEX, 14 INT, 14 CHA. Combat: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117"><text:span text:style-name="T1">Dragon, Blue:</text:span> 14 HP, 2 Armor, 14 STR, 16 DEX, 15 INT, 15 CHA. Combat: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117"><text:span text:style-name="T1">Dragon, Green:</text:span> 12 HP, 2 Armor, 14 STR, 15 DEX, 18 INT, 18 CHA. Combat: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105"><text:span text:style-name="T1">Dragon, Red:</text:span> 18 HP, 3 Armor, 18 STR, 12 DEX, 16 INT, 16 CHA. Combat: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105"><text:span text:style-name="T1">Dragon, White:</text:span> 16 HP, 1 Armor, 16 STR, 16 DEX, 12 INT, 12 CHA. Combat: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105"><text:span text:style-name="T1"/></text:p>
        <text:p text:style-name="P113"><text:soft-page-break/><text:span text:style-name="T1">Dryad:</text:span> 4 HP, 14 INT, 14 CHA. Combat: U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105"><text:span text:style-name="T1">Elemental, Air:</text:span> 16 HP, 11 STR, 15 DEX, 8 INT, 8 CHA. Combat: wind blow (d10). Huge, living vortexes of whirling air. Lighter creatures are swept away by its presence. It’s attacks ignore any worn armor.</text:p>
        <text:p text:style-name="P105"><text:span text:style-name="T1">Elemental, Earth:</text:span> 12 HP, 3 Armor, 16 STR, 6 DEX, 10 INT, 10 CHA. Combat: Fists (d12). Huge humanoid beings made of earth and stone. Create constant earth tremors with their presence. Can meld into the earth and move through it as if swimming.</text:p>
        <text:p text:style-name="P105"><text:span text:style-name="T1">Elemental, Fire:</text:span> 16 HP, 12 DEX, 10 INT, 10 CHA. Combat: Flare (d10, Blast). Living columns of pure flame that burn everything in their path. Highly vulnerable to being touched by water or rain. Can scatter their flames, freely changing its form.</text:p>
        <text:p text:style-name="P105"><text:span text:style-name="T1">Elemental, Water:</text:span> 12 HP, 2 Armor, 15 STR, 10 DEX, 10 INT, 10 CHA, Combat: Hydrolic blow (d8). Huge waves of flowing water. Must stay near a body of water. Envelop victims inside their forms to drown then.</text:p>
        <text:p text:style-name="P105"><text:span text:style-name="T1">Pixie:</text:span> 6 HP, 3 STR, 18 DEX, 10 INT, 13 CHA. Combat: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105"><text:span text:style-name="T1">Gargoyle:</text:span> 8 HP, 3 Armor, 14 STR, 6 DEX, 12 INT, 8 CHA. Combat: Claws (d8+d6). Magical creatures that look like monstrous, horned, winged statues. Guard places by standing still to pass like inanimate statues and attacking what comes near. Cannot be charmed and put to sleep.</text:p>
        <text:p text:style-name="P105"><text:span text:style-name="T1">Ghost:</text:span> 8 HP, 10 STR, 10 DEX, 10 INT, 15 CHA. Combat: Cold touch (d4). Incorporeal spirits of the restless dead. Avoids direct confrontation, instead it quietly posesses a target and acts through them when possible. Immune to most forms of damage, only susceptible to magic and holy water. Possession: One target must save CHA or be possessed, being controlled by the ghost until it’s somehow n off.hear the wail must succeed at a Moderate (15) Charm check or flee.)</text:p>
        <text:p text:style-name="P105"><text:span text:style-name="T1">Giant, Fire:</text:span> 13 HP, 3 Armor, 17 STR, 8 DEX, 10 INT, 10 CHA. Combat: Greatsword (d12+d10). 16’ tall humanoids with red hair and charcoal skin. Wear heavy armor made of brass, bronze or copper. Lair in fortresses built near volcanoes. Masters of craft and war, know how to forge the finest weaponry. Immune to fire and heat.</text:p>
        <text:p text:style-name="P105"><text:span text:style-name="T1">Giant, Frost:</text:span> 14 HP, 2 Armor, 18 STR, 10 DEX, 12 INT, 12 CHA. Combat: Greataxe (d12+d10) or longbow (d12). 18’ tall humanoids with blue-ish skin and pale hair. Wear furs and iron Armor. Unharmed by cold and ice. Excellent trackers, hunt accompanied by dire wolves.</text:p>
        <text:p text:style-name="P105"><text:span text:style-name="T1">Gnoll:</text:span> 6 HP, 1 Armor, 12 STR, 10 DEX, 8 INT, 8 CHA. Combat: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105"><text:span text:style-name="T1">Goblin:</text:span> 4 HP, 8 STR, 12 DEX, 8 INT, 8 CHA. Combat: Dagger (d6) or sling (d4). Small, grotesque humanoids with skin in earthly tones of green, brown, and grey. Avoid combat, only attacking when in advantage, using hit-and-run tactics. <text:soft-page-break/>Sometimes are found using dire wolves as mounts.</text:p>
        <text:p text:style-name="P105"><text:span text:style-name="T1">Golem:</text:span> 16 HP, 2 Armor, 15 STR, 6 DEX, 5 INT, 3 CHA. Combat: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105"><text:span text:style-name="T1">Griffon:</text:span> 7 HP, 14 STR, 15 DEX, 12 INT, 12 CHA. Combat: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105"><text:span text:style-name="T1">Harpy:</text:span> 8 HP, 10 SRR, 12 DEX, 12 INT, 14 CHA. Combat: Claws (d6+d6) or song (save). Hideous monstrosities with the body of a giant eagle and a humanoid head. Its movements and flight are clumsy due to its unproportional size. Rely on charmed victims to do anything of note. Charming Song: Anyone who hears the song of a harpy must save Willpower (CHA) or be charmed, following the harpy and defending it from any threat. The charm is broken when the victim leaves the harpy’s presence.</text:p>
        <text:p text:style-name="P105"><text:span text:style-name="T1">Hellhound:</text:span> 8 HP, 12 STR, 15 DEX, 4 INT, 5 CHA (proficent in Willpower). Combat: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105"><text:span text:style-name="T1">Hydra:</text:span> 18 HP, 2 Armor, 15 STR, 12 INT, 12 CHA. Combat: Bite (d12, Blast). A l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105"><text:span text:style-name="T1">Kobold:</text:span> 3 HP, 8 STR, 10 DEX, 10 INT, 10 CHA. Combat: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105"><text:span text:style-name="T1">Lich:</text:span> 18 HP, 1 Armor, 10 STR, 10 DEX, 16 INT, 16 CHA. Combat: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105"><text:span text:style-name="T1">Lizard Man:</text:span> 5 HP, 1 Armor, 14 STR, 12 DEX, 10 INT, 10 CHA. Combat: Bone spear (d8). Tribal amphibian humanoids with reptilian heads and tails. Dwell in jungles nearby large bodies of water. Craft their armor and weapons from the bones of their prey. Carnivorous, eat even the flesh of other humanoids as a display of power.</text:p>
        <text:p text:style-name="P105"><text:span text:style-name="T1">Medusa:</text:span> 10 HP, 8 STR, 12 DEX, 14 INT, 16 CHA. Combat: Snake bites (d6+d4) or gaze (save). Magical creatures that look like women with snakes in place of hair. Clever and proud, but reasonable. Will let adventurers go free if they somehow please its ego. Gaze: Anyone who looks directly at the medusa’s face must save Willpower (CHA)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105"><text:soft-page-break/><text:span text:style-name="T1">Minotaur:</text:span> 12 HP, 1 Armor, 16 STR, 10 DEX, 8 INT, 8 CHA. Combat: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n into a bloodthirsty state, enhancing all its attacks and impairing all attacks against it. Only stops when killed or if it no longer sees any foe.</text:p>
        <text:p text:style-name="P105"><text:span text:style-name="T1">Ogre:</text:span> 6 HP, 1 Armor, 16 STR, 8 DEX, 8 INT, 7 CHA. Combat: Club (d10). 10’ tall brute humanoids dressed in animal hides. Mostly live in caves. Mostly antisocial, away any other beings from nearby its lair. Easily impressed by shiny materials, carry sacks full of coins with them.</text:p>
        <text:p text:style-name="P105"><text:span text:style-name="T1">Orc:</text:span> 6 HP, 2 Armor, 14 STR, 8 DEX, 10 INT, 10 CHA. Combat: Mace (d8). Large and burly relatives of goblins. Dwell in underground fortresses, but frequently march in aboveground campaigns. Strongly lawful and militarized culture, follow orders without question. Trained to fight together, damage dealt is Enhanced if an ally is also engaged with the same enemy.</text:p>
        <text:p text:style-name="P105"><text:span text:style-name="T1">Owl Bear:</text:span> 9 HP, 16 STR, 10 DEX, 10 INT, 10 CHA. Combat: Beak (d10) or claws (d8+d6). Huge, carnivorous bear-like creatures with the face of an owl. Found in dense forests. Excellent trackers, can detect even the slightest signs of prey. Highly territorial, attack anything that comes too close. Critical Damage: Maul the target, crushing armor and tearing a limb apart.</text:p>
        <text:p text:style-name="P105"><text:span text:style-name="T1">Pegasus:</text:span> 6 HP, 12 STR, 15 DEX, 10 INT, 15 CHA. Combat: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P105"><text:span text:style-name="T1">Phoenix:</text:span> 18 HP, 12 STR, 18 DEX, 17 INT, 17 CHA. Combat: Talons (d12+d10). Giant eagle-like birds made of pure flame, found in isolated regions and only attack in self-defense. Posesses simple intelligence and watches trave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105"><text:span text:style-name="T1">Giant Crab:</text:span> 6 HP, 3 Armor, 14 STR, 3 DEX, 8 INT, 8 CHA. Combat:<text:line-break/>Pincers (d12). Huge crustaceans that live in coastal areas and mindlessly attack anything that comes near. Their pincers crush with enough strength to ignore any armor lesser than plate. Their heavy carapace makes them notably hardy but equally slow.</text:p>
        <text:p text:style-name="P105"><text:span text:style-name="T1">Skeleton:</text:span> 5 HP, 1 Armor, 10 STR, 13 DEX, 10 INT, 10 CHA. Combat: Rusty sword (d6). If a skeleton is killed and its bones are not scattered, it reforms.</text:p>
        <text:p text:style-name="P105"><text:span text:style-name="T1">Troll:</text:span> 6 HP, 1 Armor, 14 STR, 12 DEX, 7 INT, 10 CHA. Combat: Talons and bite (d10+d6). Wicked, 8’ tall humanoids with rubbery bodies. Consume the flesh of other humanoids. Dwell underground, in the barren wilderness, and in the ruined homes of former victims. Fire and acid damage received is Enhanced, and stops a troll’s regeneration. Regains 3 HP per round, and even severed limbs are reattached. If killed, will regenerate and fight again in an hour.</text:p>
        <text:p text:style-name="P105"><text:span text:style-name="T1">Vampire:</text:span> 12 HP, 1 Armor, 14 STR, 12 DEX, 15 INT, 16 CHA. Combat: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text:soft-page-break/>sunlight or if the coffin is destroyed. Critical Damage: The vampire drains the targets’s essence, dealing d12 damage to STR. If the target reaches 0 WIL this way, it dies and is raised as a thrall of the vampire.</text:p>
        <text:p text:style-name="P105"><text:span text:style-name="T1">Werewolf:</text:span> 8 HP, 15 STR, 14 DEX, 7 INT, 7 CHA. Combat: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105"><text:span text:style-name="T1">Zombie:</text:span> 6 HP, 10 STR, 6 DEX, 3 INT, 3 CHA. Combat: Rusted weapon (d6). Slow, mindless re-animated corpses. Created by wicked wizards to serve as guardians in hordes. Simply attacks anything that comes nearby. Cannot be affected by anything that targets the mind.</text:p>
        <text:h text:style-name="P58" text:outline-level="1"><text:bookmark-start text:name="magic"/>Magic<text:bookmark-end text:name="magic"/></text:h>
        <text:p text:style-name="P47">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105">In many settings, the use of spells will require that the caster has a perk, such as Spellcaster. In addition, the caster will need a particular skill. The default skill for this is Arcane (INT), but the spellcasting skill might be a CHA if magic depends on the caster’s force of will.</text:p>
        <text:p text:style-name="P111"/>
        <text:p text:style-name="P112">The Limitations of Magic in a Setting</text:p>
        <text:list xml:id="list135623770514743" text:continue-list="list135624013381792" text:style-name="WWNum1022">
          <text:list-item>
            <text:p text:style-name="P42">Does magic reqaure the Spellcaster perk, or can anyone do it?</text:p>
          </text:list-item>
          <text:list-item>
            <text:p text:style-name="P42">Can magic bring someone back from the dead?</text:p>
          </text:list-item>
          <text:list-item>
            <text:p text:style-name="P42">Can magic be used to change the past or travel through time?</text:p>
          </text:list-item>
          <text:list-item>
            <text:p text:style-name="P42">Can magic perform permanent transformations?</text:p>
          </text:list-item>
          <text:list-item>
            <text:p text:style-name="P42">Does magic require some special material component to work?</text:p>
          </text:list-item>
          <text:list-item>
            <text:p text:style-name="P42">Is spellcasting obvious?</text:p>
          </text:list-item>
          <text:list-item>
            <text:p text:style-name="P42">Is magic always obvious?</text:p>
          </text:list-item>
          <text:list-item>
            <text:p text:style-name="P42">Do some spells or types of magic require special training beyond basic sorcery?</text:p>
          </text:list-item>
          <text:list-item>
            <text:p text:style-name="P42">How often can you use magic. Does it take Fatigue? Can you cast a spell until you fail at casting it, where you can’t cast it again until you rest? Can you cast as many spells per day as half your Arcne (INT) score, rounded up?</text:p>
          </text:list-item>
          <text:list-item>
            <text:p text:style-name="P42">Most settings that include magic will have at least some limitations on magic.</text:p>
          </text:list-item>
        </text:list>
        <text:h text:style-name="P58" text:outline-level="1"><text:bookmark-start text:name="cairn-style-magic"/>Cairn Style Magic<text:bookmark-end text:name="cairn-style-magic"/></text:h>
        <text:p text:style-name="P54">The following are the rules Cairn uses for magic. It’s your world; can use as much or as little of it as you like.</text:p>
        <text:p text:style-name="P121">In Cairn characters do not need the Spellcaster perk to b able to use magic.</text:p>
        <text:h text:style-name="P65" text:outline-level="2"><text:bookmark-start text:name="spellbooks"/>Spellbooks<text:bookmark-end text:name="spellbooks"/></text:h>
        <text:list xml:id="list135624110446223" text:continue-list="list135623770514743" text:style-name="WWNum1023">
          <text:list-item>
            <text:p text:style-name="P73">Spellbooks contain a single spell and take up one slot. They cannot be easily transcribed or created; instead they are recovered from places like tombs, dungeons, and manors.</text:p>
          </text:list-item>
          <text:list-item>
            <text:p text:style-name="P70"><text:span text:style-name="T10">Spellbooks sometimes display unusual properties or limitations, such as producing a foul or unearthly smell when opened, possessing an innate intelligence, or being legible only when held in moonlight.</text:span></text:p>
          </text:list-item>
          <text:list-item>
            <text:p text:style-name="P74"><text:soft-page-break/>Spellbooks will attract the attention of those who seek the arcane power within, and it is considered dangerous to display them openly.</text:p>
          </text:list-item>
        </text:list>
        <text:h text:style-name="P60" text:outline-level="2"><text:bookmark-start text:name="casting-spells"/>Casting Spells<text:bookmark-end text:name="casting-spells"/></text:h>
        <text:list xml:id="list135624294024815" text:continue-list="list135624110446223" text:style-name="WWNum1024">
          <text:list-item>
            <text:p text:style-name="P75">Anyone can cast a spell by holding a Spellbook in both hands and reading its contents aloud. They must then add a Fatigue to inventory.</text:p>
          </text:list-item>
          <text:list-item>
            <text:p text:style-name="P75">Given time and safety, PCs can enhance a spell’s impact (e.g., affecting multiple targets, increasing its power, etc.) without any additional cost.</text:p>
          </text:list-item>
          <text:list-item>
            <text:p text:style-name="P75">If the PC is deprived or in danger (such as during combat), the GM may require a PC to make a Arcna (INT) save to avoid any ill-effects from casting the spell. Consequences of failure are on par with the intended effect and may result in added Fatigue, the destruction of the Spellbook, injury, and even death.</text:p>
          </text:list-item>
        </text:list>
        <text:h text:style-name="P60" text:outline-level="2"><text:bookmark-start text:name="scrolls"/>Scrolls<text:bookmark-end text:name="scrolls"/></text:h>
        <text:p text:style-name="P47">Scrolls are similar to Spellbooks, however:</text:p>
        <text:list xml:id="list135625024990018" text:continue-list="list135624294024815" text:style-name="WWNum1025">
          <text:list-item>
            <text:p text:style-name="P19"><text:span text:style-name="T10">They are petty.</text:span></text:p>
          </text:list-item>
          <text:list-item>
            <text:p text:style-name="P43">They do not cause Fatigue.</text:p>
          </text:list-item>
          <text:list-item>
            <text:p text:style-name="P43">They disappear after one use.</text:p>
          </text:list-item>
        </text:list>
        <text:h text:style-name="P60" text:outline-level="2"><text:bookmark-start text:name="relics"/>Relics<text:bookmark-end text:name="relics"/></text:h>
        <text:p text:style-name="P47">Relics are items imbued with a magical spell or power. They do not cause Fatigue. Relics usually have limited use, as well as a Recharge condition.</text:p>
        <text:p text:style-name="P109">Relics</text:p>
        <text:p text:style-name="P105"><text:span text:style-name="T1">Relics</text:span> are items imbued with a magical spell or power. They do not cause Fatigue. Relics usually have a limited use, as well as a recharge condition. A few examples:</text:p>
        <text:p text:style-name="P105"><text:span text:style-name="T1">Honeyclasp</text:span> , 3 charges. A rusted ring that shrinks the bearer to 6" tall. Recharge: place in a thimble-sized cup of royal jelly.</text:p>
        <text:p text:style-name="P105"><text:span text:style-name="T1">Falconer’s Friend</text:span> , 1 charge. A bolt-shaped wand carrying the Haste spell. Recharge: fire from a crossbow and recover.</text:p>
        <text:p text:style-name="P105"><text:span text:style-name="T1">Staff of Silence</text:span> , 1 charge. This blackened rod temporarily disables all magic within 50ft. Recharge: bathe in the light of a full moon.</text:p>
        <text:p text:style-name="P105"><text:span text:style-name="T1">Leycap</text:span> , 1 use. Anyone ingesting this green-flecked mushroom loses a Fatigue, but is then required to make a Willpower (CHA) save to avoid its addictive properties. A fail leaves the PC deprived and unable to focus until they can eat another leycap, providing only a brief reprieve from the addiction.</text:p>
        <text:h text:style-name="P60" text:outline-level="2"><text:bookmark-start text:name="spells"/>100 Spells<text:bookmark-end text:name="spells"/></text:h>
        <text:list xml:id="list135625157430916" text:continue-list="list135623841258546" text:style-name="WWNum1026">
          <text:list-item text:start-value="1">
            <text:p text:style-name="P44"><text:span text:style-name="T1">Adhere:</text:span> An object is covered in extremely sticky slime.</text:p>
          </text:list-item>
          <text:list-item>
            <text:p text:style-name="P44"><text:span text:style-name="T1">Anchor:</text:span> A strong wire sprouts from your arms, affixing itself to two points within 50ft on each side.</text:p>
          </text:list-item>
          <text:list-item>
            <text:p text:style-name="P44"><text:span text:style-name="T1">Animate Object:</text:span> An object obeys your commands as best it can.</text:p>
          </text:list-item>
          <text:list-item>
            <text:p text:style-name="P44"><text:span text:style-name="T1">Anthropomorphize:</text:span> An animal either gains human intelligence or human appearance for one day.</text:p>
          </text:list-item>
          <text:list-item>
            <text:p text:style-name="P44"><text:span text:style-name="T1">Arcane Eye:</text:span> You can see through a magical floating eyeball that flies around at your command.</text:p>
          </text:list-item>
          <text:list-item>
            <text:p text:style-name="P44"><text:span text:style-name="T1">Astral Prison:</text:span> An object is frozen in time and space within an invulnerable crystal shell.</text:p>
          </text:list-item>
          <text:list-item>
            <text:p text:style-name="P44"><text:span text:style-name="T1">Attract:</text:span> Two objects are strongly magnetically attracted to each other if they come within 10 feet.</text:p>
          </text:list-item>
          <text:list-item>
            <text:p text:style-name="P44"><text:span text:style-name="T1">Auditory Illusion:</text:span> You create illusory sounds that seem to come from a direction of your choice.</text:p>
          </text:list-item>
          <text:list-item>
            <text:p text:style-name="P44"><text:span text:style-name="T1">Babble:</text:span> A creature must loudly and clearly repeat everything you think. It is otherwise mute.</text:p>
          </text:list-item>
          <text:list-item>
            <text:p text:style-name="P44"><text:span text:style-name="T1">Bait Flower:</text:span> A plant sprouts from the ground that emanates the smell of decaying flesh.</text:p>
          </text:list-item>
          <text:list-item>
            <text:p text:style-name="P44"><text:span text:style-name="T1">Beast Form:</text:span> You and your possessions transform into a mundane animal.</text:p>
          </text:list-item>
          <text:list-item>
            <text:p text:style-name="P44"><text:soft-page-break/><text:span text:style-name="T1">Befuddle:</text:span> A creature of your choice is unable to form new short-term memories for the duration of the spell.</text:p>
          </text:list-item>
          <text:list-item>
            <text:p text:style-name="P44"><text:span text:style-name="T1">Body Swap:</text:span> You switch bodies with a creature you touch. If one body dies, the other dies as well.</text:p>
          </text:list-item>
          <text:list-item>
            <text:p text:style-name="P44"><text:span text:style-name="T1">Charm:</text:span> A creature you can see treats you as a friend.</text:p>
          </text:list-item>
          <text:list-item>
            <text:p text:style-name="P44"><text:span text:style-name="T1">Command:</text:span> A target obeys a single three-word command that does not cause it harm.</text:p>
          </text:list-item>
          <text:list-item>
            <text:p text:style-name="P44"><text:span text:style-name="T1">Comprehend:</text:span> You become fluent in all languages for a short while.</text:p>
          </text:list-item>
          <text:list-item>
            <text:p text:style-name="P44"><text:span text:style-name="T1">Cone of Foam:</text:span> Dense foam sprays from your hand, coating the target.</text:p>
          </text:list-item>
          <text:list-item>
            <text:p text:style-name="P44"><text:span text:style-name="T1">Control Plants:</text:span> Nearby plants and trees obey you and gain the ability to move at a slow pace.</text:p>
          </text:list-item>
          <text:list-item>
            <text:p text:style-name="P44"><text:span text:style-name="T1">Control Weather:</text:span> You may alter the type of weather at will, but you do not otherwise control it.</text:p>
          </text:list-item>
          <text:list-item>
            <text:p text:style-name="P44"><text:span text:style-name="T1">Cure Wounds:</text:span> Restore 1d4 STR per day to a creature you can touch.</text:p>
          </text:list-item>
          <text:list-item>
            <text:p text:style-name="P44"><text:span text:style-name="T1">Deafen:</text:span> All nearby creatures are deafened.</text:p>
          </text:list-item>
          <text:list-item>
            <text:p text:style-name="P44"><text:span text:style-name="T1">Detect Magic:</text:span> You can see or hear nearby magical auras.</text:p>
          </text:list-item>
          <text:list-item>
            <text:p text:style-name="P44"><text:span text:style-name="T1">Disassemble:</text:span> Any of your body parts may be detached and reattached at will, without causing pain or damage. You can still control them.</text:p>
          </text:list-item>
          <text:list-item>
            <text:p text:style-name="P44"><text:span text:style-name="T1">Disguise:</text:span> You may alter the appearance of one character atwill as long as they remain humanoid. Attempts to duplicate othercharacters will seem uncanny.</text:p>
          </text:list-item>
          <text:list-item>
            <text:p text:style-name="P44"><text:span text:style-name="T1">Displace:</text:span> An object appears to be up to 15ft from its actual position.</text:p>
          </text:list-item>
          <text:list-item>
            <text:p text:style-name="P44"><text:span text:style-name="T1">Earthquake:</text:span> The ground begins shaking violently. Structures maybe damaged or collapse.</text:p>
          </text:list-item>
          <text:list-item>
            <text:p text:style-name="P44"><text:span text:style-name="T1">Elasticity:</text:span> Your body can stretch up to 10ft.</text:p>
          </text:list-item>
          <text:list-item>
            <text:p text:style-name="P44"><text:span text:style-name="T1">Elemental Wall:</text:span> A straight wall of ice or fire 50ft long and 10ft high rises from the ground.</text:p>
          </text:list-item>
          <text:list-item>
            <text:p text:style-name="P44"><text:span text:style-name="T1">Filch:</text:span> A visible item teleports to your hands.</text:p>
          </text:list-item>
          <text:list-item>
            <text:p text:style-name="P44"><text:span text:style-name="T1">Fish Lung:</text:span> A target can breathe underwater until they surface again. Smells strongly of the sea.</text:p>
          </text:list-item>
          <text:list-item>
            <text:p text:style-name="P44"><text:span text:style-name="T1">Flare:</text:span> A bright ball of energy fires a trail of light into the sky, revealing your location to friend or foe.</text:p>
          </text:list-item>
          <text:list-item>
            <text:p text:style-name="P44"><text:span text:style-name="T1">Fog Cloud:</text:span> A dense fog spreads out from you.</text:p>
          </text:list-item>
          <text:list-item>
            <text:p text:style-name="P44"><text:span text:style-name="T1">Frenzy:</text:span> A nearby creature erupts in a frenzy of violence.</text:p>
          </text:list-item>
          <text:list-item>
            <text:p text:style-name="P44"><text:span text:style-name="T1">Gate:</text:span> A portal to a random plane opens.</text:p>
          </text:list-item>
          <text:list-item>
            <text:p text:style-name="P44"><text:span text:style-name="T1">Gravity Shift:</text:span> You can change the direction of gravity, but only for yourself.</text:p>
          </text:list-item>
          <text:list-item>
            <text:p text:style-name="P44"><text:span text:style-name="T1">Greed:</text:span> A creature develops the overwhelming urge to possess a visible item of your choice.</text:p>
          </text:list-item>
          <text:list-item>
            <text:p text:style-name="P44"><text:span text:style-name="T1">Haste:</text:span> Your movement speed is tripled.</text:p>
          </text:list-item>
          <text:list-item>
            <text:p text:style-name="P44"><text:span text:style-name="T1">Hatred:</text:span> A creature develops a deep hatred of another creatureor group and wishes to destroy them.</text:p>
          </text:list-item>
          <text:list-item>
            <text:p text:style-name="P44"><text:span text:style-name="T1">Hear Whispers:</text:span> You can hear faint sounds clearly.</text:p>
          </text:list-item>
          <text:list-item>
            <text:p text:style-name="P44"><text:span text:style-name="T1">Hover:</text:span> An object hovers, frictionless, 2ft above the ground. It can hold up to one humanoid.</text:p>
          </text:list-item>
          <text:list-item>
            <text:p text:style-name="P44"><text:span text:style-name="T1">Hypnotize:</text:span> A creature enters a trance and will truthfully answer one yes or no question you ask it.</text:p>
          </text:list-item>
          <text:list-item>
            <text:p text:style-name="P44"><text:span text:style-name="T1">Icy Touch:</text:span> A thick ice layer spreads across a touched surface, up to 10ft in radius.</text:p>
          </text:list-item>
          <text:list-item>
            <text:p text:style-name="P44"><text:span text:style-name="T1">Identify Owner:</text:span> Letters appear over the object you touch,spelling out the name of the object’s owners, if there are any.</text:p>
          </text:list-item>
          <text:list-item>
            <text:p text:style-name="P44"><text:span text:style-name="T1">Illuminate:</text:span> A floating light moves as you command. When held inlight, the pages become a prism of vibrant rainbows.</text:p>
          </text:list-item>
          <text:list-item>
            <text:p text:style-name="P44"><text:span text:style-name="T1">Invisible Tether:</text:span> Two objects within 10ft of each other cannotbe moved more than 10ft apart.</text:p>
          </text:list-item>
          <text:list-item>
            <text:p text:style-name="P44"><text:span text:style-name="T1">Knock:</text:span> A nearby mundane or magical lock unlocks loudly.</text:p>
          </text:list-item>
          <text:list-item>
            <text:p text:style-name="P44"><text:span text:style-name="T1">Leap:</text:span> You jump up to 10ft high, once.</text:p>
          </text:list-item>
          <text:list-item>
            <text:p text:style-name="P44"><text:soft-page-break/><text:span text:style-name="T1">Liquid Air:</text:span> The air around you becomes swimmable.</text:p>
          </text:list-item>
          <text:list-item>
            <text:p text:style-name="P44"><text:span text:style-name="T1">Magic Dampener:</text:span> All nearby magical effects have their effectiveness halved.</text:p>
          </text:list-item>
          <text:list-item>
            <text:p text:style-name="P44"><text:span text:style-name="T1">Manse:</text:span> A sturdy, furnished cottage appears for hours. You can permit and forbid entry to it at will.</text:p>
          </text:list-item>
          <text:list-item>
            <text:p text:style-name="P44"><text:span text:style-name="T1">Madness of Marbles:</text:span> Your pockets are full of marbles and willrefill every 30 seconds.</text:p>
          </text:list-item>
          <text:list-item>
            <text:p text:style-name="P44"><text:span text:style-name="T1">Masquerade:</text:span> A character’s appearance and voice becomesidentical to those of a character you touch.</text:p>
          </text:list-item>
          <text:list-item>
            <text:p text:style-name="P44"><text:span text:style-name="T1">Miniaturize:</text:span> A creature you touch is shrunk down to the size ofa mouse.</text:p>
          </text:list-item>
          <text:list-item>
            <text:p text:style-name="P44"><text:span text:style-name="T1">Mirror Image:</text:span> An illusory duplicate of yourself appears and isunder your control.</text:p>
          </text:list-item>
          <text:list-item>
            <text:p text:style-name="P44"><text:span text:style-name="T1">Mirrorwalk:</text:span> A mirror becomes a gateway to another mirror thatyou looked into today.</text:p>
          </text:list-item>
          <text:list-item>
            <text:p text:style-name="P44"><text:span text:style-name="T1">Multiarm:</text:span> You temporarily gain an extra arm.</text:p>
          </text:list-item>
          <text:list-item>
            <text:p text:style-name="P44"><text:span text:style-name="T1">Night Sphere:</text:span> A 50ft-wide sphere of darkness displaying thenight sky appears before you.</text:p>
          </text:list-item>
          <text:list-item>
            <text:p text:style-name="P44"><text:span text:style-name="T1">Objectify:</text:span> You become any inanimate object between the size ofa grand piano and an apple.</text:p>
          </text:list-item>
          <text:list-item>
            <text:p text:style-name="P44"><text:span text:style-name="T1">Ooze Form:</text:span> You become a living jelly.</text:p>
          </text:list-item>
          <text:list-item>
            <text:p text:style-name="P44"><text:span text:style-name="T1">Pacify:</text:span> A creature near you has an aversion to violence.</text:p>
          </text:list-item>
          <text:list-item>
            <text:p text:style-name="P44"><text:span text:style-name="T1">Passage:</text:span> Creates a temporary path through wood, stone or brick.</text:p>
          </text:list-item>
          <text:list-item>
            <text:p text:style-name="P44"><text:span text:style-name="T1">Phobia:</text:span> A nearby creature becomes terrified of an object ofyour choice.</text:p>
          </text:list-item>
          <text:list-item>
            <text:p text:style-name="P44"><text:span text:style-name="T1">Pit:</text:span> A pit 10ft wide and 10ft deep opens in the ground.</text:p>
          </text:list-item>
          <text:list-item>
            <text:p text:style-name="P44"><text:span text:style-name="T1">Primal Surge:</text:span> A creature rapidly evolves into a future versionof its species.</text:p>
          </text:list-item>
          <text:list-item>
            <text:p text:style-name="P44"><text:span text:style-name="T1">Push/Pull:</text:span> An object of any size is pulled directly towards youor pushed directly away from you with the strength of one man.</text:p>
          </text:list-item>
          <text:list-item>
            <text:p text:style-name="P44"><text:span text:style-name="T1">Raise Dead:</text:span> A skeleton rises from the ground to serve you. Theyare incredibly stupid and can only obey simple orders.</text:p>
          </text:list-item>
          <text:list-item>
            <text:p text:style-name="P44"><text:span text:style-name="T1">Raise Spirit:</text:span> The spirit of a nearby corpse manifests and will answer 1 question.</text:p>
          </text:list-item>
          <text:list-item>
            <text:p text:style-name="P44"><text:span text:style-name="T1">Read Mind:</text:span> You can hear the surface thoughts of nearby creatures.</text:p>
          </text:list-item>
          <text:list-item>
            <text:p text:style-name="P44"><text:span text:style-name="T1">Repel:</text:span> Two objects are strongly magnetically repelled from each other within 10 feet.</text:p>
          </text:list-item>
          <text:list-item>
            <text:p text:style-name="P44"><text:span text:style-name="T1">Scry:</text:span> You can see through the eyes of a creature you touched earlier today.</text:p>
          </text:list-item>
          <text:list-item>
            <text:p text:style-name="P44"><text:span text:style-name="T1">Sculpt Elements:</text:span> Inanimate material behaves like clay in your hands.</text:p>
          </text:list-item>
          <text:list-item>
            <text:p text:style-name="P44"><text:span text:style-name="T1">Sense:</text:span> Choose one kind of object (key, gold, arrow, jug, etc). You can sense the nearest example.</text:p>
          </text:list-item>
          <text:list-item>
            <text:p text:style-name="P44"><text:span text:style-name="T1">Shield:</text:span> A creature you touch is protected from mundane attacks for one minute.</text:p>
          </text:list-item>
          <text:list-item>
            <text:p text:style-name="P44"><text:span text:style-name="T1">Shroud:</text:span> A creature you touch is invisible until they move.</text:p>
          </text:list-item>
          <text:list-item>
            <text:p text:style-name="P44"><text:span text:style-name="T1">Shuffle:</text:span> Two creatures you can see instantly switch places.</text:p>
          </text:list-item>
          <text:list-item>
            <text:p text:style-name="P44"><text:span text:style-name="T1">Skillful Repair:</text:span> You make minor repairs to a nonliving object.</text:p>
          </text:list-item>
          <text:list-item>
            <text:p text:style-name="P44"><text:span text:style-name="T1">Sleep:</text:span> A creature you can see falls into a light sleep.</text:p>
          </text:list-item>
          <text:list-item>
            <text:p text:style-name="P44"><text:span text:style-name="T1">Slick:</text:span> Every surface in a 30ft radius becomes extremely slippery.</text:p>
          </text:list-item>
          <text:list-item>
            <text:p text:style-name="P44"><text:span text:style-name="T1">Smoke Form:</text:span> Every surface in a 30ft radius becomes extremely slippery.</text:p>
          </text:list-item>
          <text:list-item>
            <text:p text:style-name="P44"><text:span text:style-name="T1">Sniff:</text:span> You can smell even the faintest traces of scents.</text:p>
          </text:list-item>
          <text:list-item>
            <text:p text:style-name="P44"><text:span text:style-name="T1">Snuff:</text:span> The source of any mundane light you can see is instantly snuffed out.</text:p>
          </text:list-item>
          <text:list-item>
            <text:p text:style-name="P44"><text:span text:style-name="T1">Sort:</text:span> Inanimate items sort themselves according to categories you set.</text:p>
          </text:list-item>
          <text:list-item>
            <text:p text:style-name="P44"><text:span text:style-name="T1">Spellsaw:</text:span> A whirling blade flies from your chest, clearing any plant material in its way. It is otherwise harmless.</text:p>
          </text:list-item>
          <text:list-item>
            <text:p text:style-name="P44"><text:span text:style-name="T1">Spider Climb:</text:span> You can climb surfaces like a spider.</text:p>
          </text:list-item>
          <text:list-item>
            <text:p text:style-name="P44"><text:span text:style-name="T1">Swarm:</text:span> You become a swarm of crows, rats, or piranhas. You can only be harmed by blast attacks.</text:p>
          </text:list-item>
          <text:list-item>
            <text:p text:style-name="P44"><text:span text:style-name="T1">Target Lure:</text:span> An object you touch becomes the target of any nearby spell.</text:p>
          </text:list-item>
          <text:list-item>
            <text:p text:style-name="P44"><text:soft-page-break/><text:span text:style-name="T1">Telekinesis:</text:span> You may mentally 1 move item under 60lbs. .</text:p>
          </text:list-item>
          <text:list-item>
            <text:p text:style-name="P44"><text:span text:style-name="T1">Telepathy:</text:span> Two creatures can hear each other’s thoughts, no matter how far apart.</text:p>
          </text:list-item>
          <text:list-item>
            <text:p text:style-name="P44"><text:span text:style-name="T1">Teleport:</text:span> An object or person you can see is transported from one place to another in a 50ft radius.</text:p>
          </text:list-item>
          <text:list-item>
            <text:p text:style-name="P44"><text:span text:style-name="T1">Thicket:</text:span> A thicket of trees and dense brush up to 50ft wide suddenly sprouts up.</text:p>
          </text:list-item>
          <text:list-item>
            <text:p text:style-name="P44"><text:span text:style-name="T1">Time Control:</text:span> Time in a 50ft bubble slows down or increases by 10% for 30 seconds.</text:p>
          </text:list-item>
          <text:list-item>
            <text:p text:style-name="P44"><text:span text:style-name="T1">True Sight:</text:span> You see through all nearby illusions.</text:p>
          </text:list-item>
          <text:list-item>
            <text:p text:style-name="P44"><text:span text:style-name="T1">Upwell:</text:span> A spring of seawater appears.</text:p>
          </text:list-item>
          <text:list-item>
            <text:p text:style-name="P44"><text:span text:style-name="T1">Vision:</text:span> You completely control what a creature sees.</text:p>
          </text:list-item>
          <text:list-item>
            <text:p text:style-name="P44"><text:span text:style-name="T1">Visual Illusion:</text:span> A silent, immobile, room-sized illusion of your choice appears.</text:p>
          </text:list-item>
          <text:list-item>
            <text:p text:style-name="P44"><text:span text:style-name="T1">Ward:</text:span> A silver circle 50ft across appears on the ground. Choose one species that cannot cross it.</text:p>
          </text:list-item>
          <text:list-item>
            <text:p text:style-name="P44"><text:span text:style-name="T1">Web:</text:span> Your wrists shoot thick webbing.</text:p>
          </text:list-item>
          <text:list-item>
            <text:p text:style-name="P44"><text:span text:style-name="T1">Widget:</text:span> A primitive version of a drawn tool or item appears before you and disappears after a short time.</text:p>
          </text:list-item>
          <text:list-item>
            <text:p text:style-name="P20"><text:span text:style-name="T11">Wizard Mark:</text:span><text:span text:style-name="T10"> Your finger can shoot a stream of ulfire-colored paint. This paint is only visible to you and can be seen at any distance, even through solid objects.</text:span></text:p>
          </text:list-item>
          <text:list-item>
            <text:p text:style-name="P44"><text:span text:style-name="T1">X-Ray Vision:</text:span> You can see through walls, dirt, clothing, etc.</text:p>
          </text:list-item>
        </text:list>
        <text:h text:style-name="P60" text:outline-level="2"><text:bookmark-start text:name="magic-attacks"/>Magic Attacks<text:bookmark-end text:name="magic-attacks"/></text:h>
        <text:list xml:id="list135624310996796" text:continue-list="list135625157430916" text:style-name="WWNum1027">
          <text:list-item text:start-value="1">
            <text:p text:style-name="P45"><text:span text:style-name="T1">Acid Splash:</text:span> Hurl a bubble of acid for d8 damage which can be split between 2 adjacent targets.</text:p>
          </text:list-item>
          <text:list-item>
            <text:p text:style-name="P45"><text:span text:style-name="T1">Fire Bolt:</text:span> 1d10 damage. Can light things on fire.</text:p>
          </text:list-item>
          <text:list-item>
            <text:p text:style-name="P45"><text:span text:style-name="T1">Poison Spray:</text:span> d12 poison damage if the nearby target fails a STR save.</text:p>
          </text:list-item>
          <text:list-item>
            <text:p text:style-name="P45"><text:span text:style-name="T1">Ray of Frost:</text:span> Deals 1d8 cold damage and target has disadvantage on DEX saves.</text:p>
          </text:list-item>
          <text:list-item>
            <text:p text:style-name="P46"><text:span text:style-name="T1">Shocking Grasp:</text:span> Deliver a d10 electric shock to a creature you touch.</text:p>
          </text:list-item>
        </text:list>
        <text:section text:style-name="Sect2" text:name="Section2">
          <text:p text:style-name="P114">Character Sheet</text:p>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2" office:value-type="string">
                <text:p text:style-name="P78">Name:</text:p>
              </table:table-cell>
              <table:covered-table-cell/>
              <table:table-cell table:style-name="Table1.C1" table:number-columns-spanned="2" office:value-type="string">
                <text:p text:style-name="P78">Player:</text:p>
              </table:table-cell>
              <table:covered-table-cell/>
            </table:table-row>
            <table:table-row table:style-name="Table1.1">
              <table:table-cell table:style-name="Table1.A2" table:number-columns-spanned="2" office:value-type="string">
                <text:p text:style-name="P78">Quote:</text:p>
              </table:table-cell>
              <table:covered-table-cell/>
              <table:table-cell table:style-name="Table1.C2" table:number-columns-spanned="2" office:value-type="string">
                <text:p text:style-name="P78">Campaign:</text:p>
              </table:table-cell>
              <table:covered-table-cell/>
            </table:table-row>
            <table:table-row table:style-name="Table1.1">
              <table:table-cell table:style-name="Table1.A3" table:number-columns-spanned="4" office:value-type="string">
                <text:p text:style-name="P78">Appearance:</text:p>
              </table:table-cell>
              <table:covered-table-cell/>
              <table:covered-table-cell/>
              <table:covered-table-cell/>
            </table:table-row>
            <table:table-row table:style-name="Table1.1">
              <table:table-cell table:style-name="Table1.A4" office:value-type="string">
                <text:p text:style-name="P78">Age:</text:p>
              </table:table-cell>
              <table:table-cell table:style-name="Table1.B4" office:value-type="string">
                <text:p text:style-name="P78">Sex:</text:p>
              </table:table-cell>
              <table:table-cell table:style-name="Table1.B4" office:value-type="string">
                <text:p text:style-name="P78">Height:</text:p>
              </table:table-cell>
              <table:table-cell table:style-name="Table1.D4" office:value-type="string">
                <text:p text:style-name="P78">Weight:</text:p>
              </table:table-cell>
            </table:table-row>
          </table:table>
          <text:p text:style-name="P115"/>
          <table:table table:name="Table2" table:style-name="Table2">
            <table:table-column table:style-name="Table2.A" table:number-columns-repeated="3"/>
            <table:table-row table:style-name="Table2.1">
              <table:table-cell table:style-name="Table2.A1" office:value-type="string">
                <text:p text:style-name="P78"><text:span text:style-name="T15"><text:s/>STR</text:span>:</text:p>
              </table:table-cell>
              <table:table-cell table:style-name="Table2.A1" office:value-type="string">
                <text:p text:style-name="P98"><text:s/>DEX:</text:p>
              </table:table-cell>
              <table:table-cell table:style-name="Table2.C1" office:value-type="string">
                <text:p text:style-name="P82">Perks:</text:p>
              </table:table-cell>
            </table:table-row>
            <table:table-row table:style-name="Table2.1">
              <table:table-cell table:style-name="Table2.A2" office:value-type="string">
                <text:p text:style-name="P98"><text:s/>Current:</text:p>
              </table:table-cell>
              <table:table-cell table:style-name="Table2.A2" office:value-type="string">
                <text:p text:style-name="P98"><text:s/>Current:</text:p>
              </table:table-cell>
              <table:table-cell table:style-name="Table2.C2" office:value-type="string">
                <text:p text:style-name="P86"/>
              </table:table-cell>
            </table:table-row>
            <table:table-row table:style-name="Table2.1">
              <table:table-cell table:style-name="Table2.A2" office:value-type="string">
                <text:p text:style-name="P86"/>
              </table:table-cell>
              <table:table-cell table:style-name="Table2.A2" office:value-type="string">
                <text:p text:style-name="P86"/>
              </table:table-cell>
              <table:table-cell table:style-name="Table2.C2" office:value-type="string">
                <text:p text:style-name="P86"/>
              </table:table-cell>
            </table:table-row>
            <table:table-row table:style-name="Table2.1">
              <table:table-cell table:style-name="Table2.A2" office:value-type="string">
                <text:p text:style-name="P86"/>
              </table:table-cell>
              <table:table-cell table:style-name="Table2.A2" office:value-type="string">
                <text:p text:style-name="P86"/>
              </table:table-cell>
              <table:table-cell table:style-name="Table2.C2" office:value-type="string">
                <text:p text:style-name="P86"/>
              </table:table-cell>
            </table:table-row>
            <table:table-row table:style-name="Table2.1">
              <table:table-cell table:style-name="Table2.A2" office:value-type="string">
                <text:p text:style-name="P86"/>
              </table:table-cell>
              <table:table-cell table:style-name="Table2.A2" office:value-type="string">
                <text:p text:style-name="P86"/>
              </table:table-cell>
              <table:table-cell table:style-name="Table2.C2" office:value-type="string">
                <text:p text:style-name="P86"/>
              </table:table-cell>
            </table:table-row>
            <table:table-row table:style-name="Table2.1">
              <table:table-cell table:style-name="Table2.A1" office:value-type="string">
                <text:p text:style-name="P79"><text:s/><text:span text:style-name="T15">INT:</text:span></text:p>
              </table:table-cell>
              <table:table-cell table:style-name="Table2.A1" office:value-type="string">
                <text:p text:style-name="P98">CHA:</text:p>
              </table:table-cell>
              <table:table-cell table:style-name="Table2.C1" office:value-type="string">
                <text:p text:style-name="P82">Complications:</text:p>
              </table:table-cell>
            </table:table-row>
            <table:table-row table:style-name="Table2.1">
              <table:table-cell table:style-name="Table2.A2" office:value-type="string">
                <text:p text:style-name="P98">Current:</text:p>
              </table:table-cell>
              <table:table-cell table:style-name="Table2.A2" office:value-type="string">
                <text:p text:style-name="P98">Current:</text:p>
              </table:table-cell>
              <table:table-cell table:style-name="Table2.C2" office:value-type="string">
                <text:p text:style-name="P86"/>
              </table:table-cell>
            </table:table-row>
            <table:table-row table:style-name="Table2.1">
              <table:table-cell table:style-name="Table2.A2" office:value-type="string">
                <text:p text:style-name="P86"/>
              </table:table-cell>
              <table:table-cell table:style-name="Table2.A2" office:value-type="string">
                <text:p text:style-name="P86"/>
              </table:table-cell>
              <table:table-cell table:style-name="Table2.C2" office:value-type="string">
                <text:p text:style-name="P86"/>
              </table:table-cell>
            </table:table-row>
            <table:table-row table:style-name="Table2.1">
              <table:table-cell table:style-name="Table2.A2" office:value-type="string">
                <text:p text:style-name="P86"/>
              </table:table-cell>
              <table:table-cell table:style-name="Table2.A2" office:value-type="string">
                <text:p text:style-name="P86"/>
              </table:table-cell>
              <table:table-cell table:style-name="Table2.C2" office:value-type="string">
                <text:p text:style-name="P86"/>
              </table:table-cell>
            </table:table-row>
            <table:table-row table:style-name="Table2.1">
              <table:table-cell table:style-name="Table2.A10" office:value-type="string">
                <text:p text:style-name="P86"/>
              </table:table-cell>
              <table:table-cell table:style-name="Table2.A10" office:value-type="string">
                <text:p text:style-name="P86"/>
              </table:table-cell>
              <table:table-cell table:style-name="Table2.C10" office:value-type="string">
                <text:p text:style-name="P87"/>
              </table:table-cell>
            </table:table-row>
          </table:table>
          <text:p text:style-name="P116"/>
          <text:p text:style-name="P11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0"><text:s text:c="2"/>Weapon</text:p>
                <text:p text:style-name="P89"/>
              </table:table-cell>
              <table:table-cell table:style-name="Table4.A1" office:value-type="string">
                <text:p text:style-name="P88">Damage</text:p>
              </table:table-cell>
              <table:table-cell table:style-name="Table4.C1" office:value-type="string">
                <text:p text:style-name="P88">Range</text:p>
              </table:table-cell>
              <table:table-cell table:style-name="Table4.D1" office:value-type="string">
                <text:p text:style-name="P80"/>
              </table:table-cell>
              <table:table-cell table:style-name="Table4.C1" office:value-type="string">
                <text:p text:style-name="P99">Background:</text:p>
              </table:table-cell>
            </table:table-row>
            <table:table-row table:style-name="Table4.2">
              <table:table-cell table:style-name="Table4.A2" office:value-type="string">
                <text:p text:style-name="P91"/>
              </table:table-cell>
              <table:table-cell table:style-name="Table4.A2" office:value-type="string">
                <text:p text:style-name="P92"/>
              </table:table-cell>
              <table:table-cell table:style-name="Table4.C2" office:value-type="string">
                <text:p text:style-name="P92"/>
              </table:table-cell>
              <table:table-cell table:style-name="Table4.D1" office:value-type="string">
                <text:p text:style-name="P91"/>
              </table:table-cell>
              <table:table-cell table:style-name="Table4.C2" office:value-type="string">
                <text:p text:style-name="P83"/>
              </table:table-cell>
            </table:table-row>
            <table:table-row table:style-name="Table4.2">
              <table:table-cell table:style-name="Table4.A2" office:value-type="string">
                <text:p text:style-name="P91"/>
              </table:table-cell>
              <table:table-cell table:style-name="Table4.A2" office:value-type="string">
                <text:p text:style-name="P92"/>
              </table:table-cell>
              <table:table-cell table:style-name="Table4.C2" office:value-type="string">
                <text:p text:style-name="P92"/>
              </table:table-cell>
              <table:table-cell table:style-name="Table4.D1" office:value-type="string">
                <text:p text:style-name="P91"/>
              </table:table-cell>
              <table:table-cell table:style-name="Table4.C2" office:value-type="string">
                <text:p text:style-name="P83"/>
              </table:table-cell>
            </table:table-row>
            <table:table-row table:style-name="Table4.2">
              <table:table-cell table:style-name="Table4.A2" office:value-type="string">
                <text:p text:style-name="P91"/>
              </table:table-cell>
              <table:table-cell table:style-name="Table4.A2" office:value-type="string">
                <text:p text:style-name="P91"/>
              </table:table-cell>
              <table:table-cell table:style-name="Table4.C2" office:value-type="string">
                <text:p text:style-name="P91"/>
              </table:table-cell>
              <table:table-cell table:style-name="Table4.D1" office:value-type="string">
                <text:p text:style-name="P91"/>
              </table:table-cell>
              <table:table-cell table:style-name="Table4.C2" office:value-type="string">
                <text:p text:style-name="P83"/>
              </table:table-cell>
            </table:table-row>
            <table:table-row table:style-name="Table4.2">
              <table:table-cell table:style-name="Table4.A2" office:value-type="string">
                <text:p text:style-name="P91"/>
              </table:table-cell>
              <table:table-cell table:style-name="Table4.A2" office:value-type="string">
                <text:p text:style-name="P91"/>
              </table:table-cell>
              <table:table-cell table:style-name="Table4.C2" office:value-type="string">
                <text:p text:style-name="P91"/>
              </table:table-cell>
              <table:table-cell table:style-name="Table4.D1" office:value-type="string">
                <text:p text:style-name="P91"/>
              </table:table-cell>
              <table:table-cell table:style-name="Table4.C2" office:value-type="string">
                <text:p text:style-name="P83"/>
              </table:table-cell>
            </table:table-row>
            <table:table-row table:style-name="Table4.2">
              <table:table-cell table:style-name="Table4.A6" office:value-type="string">
                <text:p text:style-name="P91"/>
              </table:table-cell>
              <table:table-cell table:style-name="Table4.A6" office:value-type="string">
                <text:p text:style-name="P91"/>
              </table:table-cell>
              <table:table-cell table:style-name="Table4.C6" office:value-type="string">
                <text:p text:style-name="P91"/>
              </table:table-cell>
              <table:table-cell table:style-name="Table4.D1" office:value-type="string">
                <text:p text:style-name="P91"/>
              </table:table-cell>
              <table:table-cell table:style-name="Table4.C6" office:value-type="string">
                <text:p text:style-name="P91"/>
              </table:table-cell>
            </table:table-row>
          </table:table>
          <text:p text:style-name="P7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0">Inventory:</text:p>
              </table:table-cell>
              <table:table-cell table:style-name="Table5.A1" office:value-type="string">
                <text:p text:style-name="P93"/>
              </table:table-cell>
              <table:table-cell table:style-name="Table5.C1" office:value-type="string">
                <text:p text:style-name="P81"/>
              </table:table-cell>
              <table:table-cell table:style-name="Table5.D1" office:value-type="string">
                <text:p text:style-name="P102">Notes:</text:p>
              </table:table-cell>
            </table:table-row>
            <table:table-row table:style-name="Table5.2">
              <table:table-cell table:style-name="Table5.A2" office:value-type="string">
                <text:p text:style-name="P94"/>
              </table:table-cell>
              <table:table-cell table:style-name="Table5.B2" office:value-type="string">
                <text:p text:style-name="P95"/>
              </table:table-cell>
              <table:table-cell table:style-name="Table5.C1" office:value-type="string">
                <text:p text:style-name="P94"/>
              </table:table-cell>
              <table:table-cell table:style-name="Table5.D2" office:value-type="string">
                <text:p text:style-name="P96"/>
              </table:table-cell>
            </table:table-row>
            <table:table-row table:style-name="Table5.2">
              <table:table-cell table:style-name="Table5.A2" office:value-type="string">
                <text:p text:style-name="P94"/>
              </table:table-cell>
              <table:table-cell table:style-name="Table5.B2" office:value-type="string">
                <text:p text:style-name="P95"/>
              </table:table-cell>
              <table:table-cell table:style-name="Table5.C1" office:value-type="string">
                <text:p text:style-name="P94"/>
              </table:table-cell>
              <table:table-cell table:style-name="Table5.D2" office:value-type="string">
                <text:p text:style-name="P94"/>
              </table:table-cell>
            </table:table-row>
            <table:table-row table:style-name="Table5.2">
              <table:table-cell table:style-name="Table5.A2" office:value-type="string">
                <text:p text:style-name="P94"/>
              </table:table-cell>
              <table:table-cell table:style-name="Table5.B4" office:value-type="string">
                <text:p text:style-name="P95"/>
              </table:table-cell>
              <table:table-cell table:style-name="Table5.C1" office:value-type="string">
                <text:p text:style-name="P94"/>
              </table:table-cell>
              <table:table-cell table:style-name="Table5.D4" office:value-type="string">
                <text:p text:style-name="P84"/>
              </table:table-cell>
            </table:table-row>
            <table:table-row table:style-name="Table5.2">
              <table:table-cell table:style-name="Table5.A5" office:value-type="string">
                <text:p text:style-name="P94"/>
              </table:table-cell>
              <table:table-cell table:style-name="Table5.B5" office:value-type="string">
                <text:p text:style-name="P94"/>
              </table:table-cell>
              <table:table-cell table:style-name="Table5.C1" office:value-type="string">
                <text:p text:style-name="P94"/>
              </table:table-cell>
              <table:table-cell table:style-name="Table5.D5" office:value-type="string">
                <text:p text:style-name="P85"/>
              </table:table-cell>
            </table:table-row>
            <table:table-row table:style-name="Table5.2">
              <table:table-cell table:style-name="Table5.A2" office:value-type="string">
                <text:p text:style-name="P94"/>
              </table:table-cell>
              <table:table-cell table:style-name="Table5.B6" office:value-type="string">
                <text:p text:style-name="P94"/>
              </table:table-cell>
              <table:table-cell table:style-name="Table5.C6" office:value-type="string">
                <text:p text:style-name="P94"/>
              </table:table-cell>
              <table:table-cell table:style-name="Table5.D6" office:value-type="string">
                <text:p text:style-name="P103"/>
              </table:table-cell>
            </table:table-row>
            <table:table-row table:style-name="Table5.7">
              <table:table-cell table:style-name="Table5.A7" office:value-type="string">
                <text:p text:style-name="P94"/>
              </table:table-cell>
              <table:table-cell table:style-name="Table5.B7" office:value-type="string">
                <text:p text:style-name="P94"/>
              </table:table-cell>
              <table:table-cell table:style-name="Table5.C7" office:value-type="string">
                <text:p text:style-name="P94"/>
              </table:table-cell>
              <table:table-cell table:style-name="Table5.D7" office:value-type="string">
                <text:p text:style-name="P77"/>
              </table:table-cell>
            </table:table-row>
            <table:table-row table:style-name="Table5.1">
              <table:table-cell table:style-name="Table5.A8" office:value-type="string">
                <text:p text:style-name="P101">HP:</text:p>
              </table:table-cell>
              <table:table-cell table:style-name="Table5.B8" office:value-type="string">
                <text:p text:style-name="P101">Current HP:</text:p>
              </table:table-cell>
              <table:table-cell table:style-name="Table5.C8" office:value-type="string">
                <text:p text:style-name="P94"/>
              </table:table-cell>
              <table:table-cell table:style-name="Table5.D8" office:value-type="string">
                <text:p text:style-name="P97"><text:span text:style-name="T7"><text:s text:c="2"/></text:span><text:span text:style-name="T19">XP:</text:span></text:p>
              </table:table-cell>
            </table:table-row>
          </table:table>
          <text:p text:style-name="P10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9.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9.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9.5pt"/>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2in" fo:margin-bottom="0in" style:contextual-spacing="false" fo:keep-together="always" fo:keep-with-next="always"/>
      <style:text-properties fo:text-transform="uppercase" fo:color="#000000" loext:opacity="100%" style:font-name="Calibri" fo:font-family="Calibri" style:font-family-generic="roman" style:font-pitch="variable" fo:font-size="14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402in" fo:margin-bottom="0.0598in" style:contextual-spacing="false" fo:keep-together="always" fo:keep-with-next="always"/>
      <style:text-properties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5pt" style:font-size-asian="8.30000019073486pt" style:font-size-complex="9.5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5pt" style:font-size-asian="8.30000019073486pt" style:font-size-complex="9.5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FreeSerif" fo:font-family="FreeSerif" style:font-family-generic="roman" style:font-pitch="variable" fo:font-size="9.5pt" style:font-size-asian="8.30000019073486pt" style:font-size-complex="9.5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1402in" fo:margin-left="0.1402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15in" fo:margin-left="0.1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FreeSerif" fo:font-size="9pt" style:font-size-asian="9pt" style:font-size-complex="9pt"/>
    </style:style>
    <style:page-layout style:name="Mpm1" style:page-usage="mirrored">
      <style:page-layout-properties fo:page-width="5.5in" fo:page-height="8.5in" style:num-format="1" style:print-orientation="portrait" fo:margin-top="0.3in" fo:margin-bottom="0.1in" fo:margin-left="0.5201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1T00:39:56</meta:creation-date>
    <dc:date>2026-07-11T13:56:23.164063213</dc:date>
    <meta:generator>LibreOffice/7.3.7.2$Linux_X86_64 LibreOffice_project/30$Build-2</meta:generator>
    <meta:editing-duration>PT3H21M55S</meta:editing-duration>
    <meta:editing-cycles>16</meta:editing-cycles>
    <meta:print-date>2026-07-10T20:42:19.063708744</meta:print-date>
    <meta:document-statistic meta:table-count="4" meta:image-count="0" meta:object-count="0" meta:page-count="24" meta:paragraph-count="537" meta:word-count="12116" meta:character-count="70497" meta:non-whitespace-character-count="59153"/>
    <meta:user-defined meta:name="AppVersion">12.0000</meta:user-defined>
    <meta:template xlink:type="simple" xlink:actuate="onRequest" xlink:title="Normal.dotm" xlink:href=""/>
  </office:meta>
</office:document-meta>
</file>